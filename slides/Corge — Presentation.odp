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Mono" svg:font-family="JetBrainsMono"/>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SourceSansPro" svg:font-family="SourceSansPro"/>
    <style:font-face style:name="SourceSansPro-It" svg:font-family="SourceSansPro-It"/>
    <style:font-face style:name="SourceSansPro-SemiboldIt" svg:font-family="SourceSansPro-SemiboldIt"/>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be29ec" loext:decorative="false"/>
    </style:style>
    <style:style style:name="gr3" style:family="graphic" style:parent-style-name="standard">
      <style:graphic-properties draw:stroke="none" draw:fill="none" draw:textarea-horizontal-align="left" draw:textarea-vertical-align="top" draw:auto-grow-height="true" draw:auto-grow-width="true" fo:min-height="2.073cm" fo:min-width="2.073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888cm" fo:min-width="0.888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43cm" fo:min-width="0.443cm" fo:padding-top="0cm" fo:padding-bottom="0cm" fo:padding-left="0cm" fo:padding-right="0cm" loext:decorative="false"/>
      <style:paragraph-properties style:writing-mode="lr-tb"/>
    </style:style>
    <style:style style:name="gr6" style:family="graphic" style:parent-style-name="standard">
      <style:graphic-properties draw:stroke="none" draw:fill="solid" draw:fill-color="#000000" draw:opacity="40%" loext:decorative="false"/>
    </style:style>
    <style:style style:name="gr7"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loext:decorative="false"/>
      <style:paragraph-properties style:writing-mode="lr-tb"/>
    </style:style>
    <style:style style:name="gr8" style:family="graphic" style:parent-style-name="standard">
      <style:graphic-properties draw:stroke="none" draw:fill="solid" draw:fill-color="#fafafa" loext:decorative="false"/>
    </style:style>
    <style:style style:name="gr9" style:family="graphic" style:parent-style-name="standard">
      <style:graphic-properties draw:stroke="none" draw:fill="none" draw:textarea-horizontal-align="left" draw:textarea-vertical-align="top" draw:auto-grow-height="true" draw:auto-grow-width="true" fo:min-height="0.999cm" fo:min-width="0.999cm" fo:padding-top="0cm" fo:padding-bottom="0cm" fo:padding-left="0cm" fo:padding-right="0cm" loext:decorative="false"/>
      <style:paragraph-properties style:writing-mode="lr-tb"/>
    </style:style>
    <style:style style:name="gr10" style:family="graphic" style:parent-style-name="standard">
      <style:graphic-properties draw:stroke="none" draw:fill="solid" draw:fill-color="#d896ff" loext:decorative="false"/>
    </style:style>
    <style:style style:name="gr11" style:family="graphic" style:parent-style-name="standard">
      <style:graphic-properties draw:stroke="none" draw:fill="none" draw:textarea-horizontal-align="left" draw:textarea-vertical-align="top" draw:auto-grow-height="true" draw:auto-grow-width="true" fo:min-height="0.555cm" fo:min-width="0.555cm" fo:padding-top="0cm" fo:padding-bottom="0cm" fo:padding-left="0cm" fo:padding-right="0cm" loext:decorative="false"/>
      <style:paragraph-properties style:writing-mode="lr-tb"/>
    </style:style>
    <style:style style:name="gr12" style:family="graphic" style:parent-style-name="standard">
      <style:graphic-properties draw:stroke="none" draw:fill="solid" draw:fill-color="#be29ec" draw:opacity="15%" loext:decorative="false"/>
    </style:style>
    <style:style style:name="gr13" style:family="graphic" style:parent-style-name="standard">
      <style:graphic-properties draw:stroke="none" draw:fill="none" draw:textarea-horizontal-align="left" draw:textarea-vertical-align="top" draw:auto-grow-height="true" draw:auto-grow-width="true" fo:min-height="0.406cm" fo:min-width="0.406cm" fo:padding-top="0cm" fo:padding-bottom="0cm" fo:padding-left="0cm" fo:padding-right="0cm" loext:decorative="false"/>
      <style:paragraph-properties style:writing-mode="lr-tb"/>
    </style:style>
    <style:style style:name="gr14" style:family="graphic" style:parent-style-name="standard">
      <style:graphic-properties draw:stroke="none" draw:fill="solid" draw:fill-color="#660066" loext:decorative="false"/>
    </style:style>
    <style:style style:name="gr15" style:family="graphic" style:parent-style-name="standard">
      <style:graphic-properties draw:stroke="none" draw:fill="none" draw:textarea-horizontal-align="left" draw:textarea-vertical-align="top" draw:auto-grow-height="true" draw:auto-grow-width="true" fo:min-height="3.703cm" fo:min-width="3.703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4cm" fo:min-width="0.7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1a1a2e" loext:decorative="false"/>
    </style:style>
    <style:style style:name="gr18" style:family="graphic" style:parent-style-name="standard">
      <style:graphic-properties draw:stroke="none" draw:fill="none" draw:textarea-horizontal-align="left" draw:textarea-vertical-align="top" draw:auto-grow-height="true" draw:auto-grow-width="true" fo:min-height="0.481cm" fo:min-width="0.481cm" fo:padding-top="0cm" fo:padding-bottom="0cm" fo:padding-left="0cm" fo:padding-right="0cm" loext:decorative="false"/>
      <style:paragraph-properties style:writing-mode="lr-tb"/>
    </style:style>
    <style:style style:name="gr19" style:family="graphic" style:parent-style-name="standard">
      <style:graphic-properties draw:stroke="none" draw:fill="solid" draw:fill-color="#2ecc71" loext:decorative="false"/>
    </style:style>
    <style:style style:name="gr20" style:family="graphic" style:parent-style-name="standard">
      <style:graphic-properties draw:stroke="none" draw:fill="none" draw:textarea-horizontal-align="left" draw:textarea-vertical-align="top" draw:auto-grow-height="true" draw:auto-grow-width="true" fo:min-height="0.592cm" fo:min-width="0.592cm" fo:padding-top="0cm" fo:padding-bottom="0cm" fo:padding-left="0cm" fo:padding-right="0cm" loext:decorative="false"/>
      <style:paragraph-properties style:writing-mode="lr-tb"/>
    </style:style>
    <style:style style:name="gr21" style:family="graphic" style:parent-style-name="standard">
      <style:graphic-properties draw:stroke="none" draw:fill="solid" draw:fill-color="#e74c3c" loext:decorative="false"/>
    </style:style>
    <style:style style:name="gr22" style:family="graphic" style:parent-style-name="standard">
      <style:graphic-properties draw:stroke="none" draw:fill="solid" draw:fill-color="#000000" draw:opacity="20%" loext:decorative="false"/>
    </style:style>
    <style:style style:name="gr23" style:family="graphic" style:parent-style-name="standard">
      <style:graphic-properties draw:stroke="none" draw:fill="solid" draw:fill-color="#ffffff" draw:opacity="5%" loext:decorative="false"/>
    </style:style>
    <style:style style:name="gr24" style:family="graphic" style:parent-style-name="standard">
      <style:graphic-properties draw:stroke="none" draw:fill="none" draw:textarea-horizontal-align="left" draw:textarea-vertical-align="top" draw:auto-grow-height="true" draw:auto-grow-width="true" fo:min-height="0.518cm" fo:min-width="0.518cm" fo:padding-top="0cm" fo:padding-bottom="0cm" fo:padding-left="0cm" fo:padding-right="0cm" loext:decorative="false"/>
      <style:paragraph-properties style:writing-mode="lr-tb"/>
    </style:style>
    <style:style style:name="gr25" style:family="graphic" style:parent-style-name="standard">
      <style:graphic-properties draw:stroke="solid" svg:stroke-width="0.052cm" svg:stroke-color="#be29ec" draw:stroke-linejoin="miter" svg:stroke-linecap="butt" draw:fill="none" fo:padding-top="0.026cm" fo:padding-bottom="0.026cm" fo:padding-left="0.026cm" fo:padding-right="0.026cm" loext:decorative="false"/>
    </style:style>
    <style:style style:name="gr26" style:family="graphic" style:parent-style-name="standard">
      <style:graphic-properties draw:stroke="none" draw:fill="none" draw:textarea-horizontal-align="left" draw:textarea-vertical-align="top" draw:auto-grow-height="true" draw:auto-grow-width="true" fo:min-height="0.703cm" fo:min-width="0.703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49cm" fo:min-width="0.449cm" fo:padding-top="0cm" fo:padding-bottom="0cm" fo:padding-left="0cm" fo:padding-right="0cm" loext:decorative="false"/>
      <style:paragraph-properties style:writing-mode="lr-tb"/>
    </style:style>
    <style:style style:name="gr28" style:family="graphic" style:parent-style-name="standard">
      <style:graphic-properties draw:stroke="none" draw:fill="solid" draw:fill-color="#800080" loext:decorative="false"/>
    </style:style>
    <style:style style:name="gr29" style:family="graphic" style:parent-style-name="standard">
      <style:graphic-properties draw:stroke="none" draw:fill="none" draw:textarea-horizontal-align="left" draw:textarea-vertical-align="top" draw:auto-grow-height="true" draw:auto-grow-width="true" fo:min-height="0.237cm" fo:min-width="0.237cm" fo:padding-top="0cm" fo:padding-bottom="0cm" fo:padding-left="0cm" fo:padding-right="0cm" loext:decorative="false"/>
      <style:paragraph-properties style:writing-mode="lr-tb"/>
    </style:style>
    <style:style style:name="gr30" style:family="graphic" style:parent-style-name="standard">
      <style:graphic-properties draw:stroke="none" draw:fill="solid" draw:fill-color="#efbbff" draw:opacity="6%" loext:decorative="false"/>
    </style:style>
    <style:style style:name="gr31" style:family="graphic" style:parent-style-name="standard">
      <style:graphic-properties draw:stroke="none" draw:fill="solid" draw:fill-color="#be29ec" draw:opacity="12%" loext:decorative="false"/>
    </style:style>
    <style:style style:name="gr32" style:family="graphic" style:parent-style-name="standard">
      <style:graphic-properties draw:stroke="none" draw:fill="none" draw:textarea-horizontal-align="left" draw:textarea-vertical-align="top" draw:auto-grow-height="true" draw:auto-grow-width="true" fo:min-height="0.199cm" fo:min-width="0.199cm" fo:padding-top="0cm" fo:padding-bottom="0cm" fo:padding-left="0cm" fo:padding-right="0cm" loext:decorative="false"/>
      <style:paragraph-properties style:writing-mode="lr-tb"/>
    </style:style>
    <style:style style:name="gr33" style:family="graphic" style:parent-style-name="standard">
      <style:graphic-properties draw:stroke="none" draw:fill="solid" draw:fill-color="#be29ec" draw:opacity="8%" loext:decorative="false"/>
    </style:style>
    <style:style style:name="gr34" style:family="graphic" style:parent-style-name="standard">
      <style:graphic-properties draw:stroke="none" draw:fill="none" draw:textarea-horizontal-align="left" draw:textarea-vertical-align="top" draw:auto-grow-height="true" draw:auto-grow-width="true" fo:min-height="0.377cm" fo:min-width="0.377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23cm" fo:min-width="0.223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14cm" fo:min-width="0.314cm" fo:padding-top="0cm" fo:padding-bottom="0cm" fo:padding-left="0cm" fo:padding-right="0cm" loext:decorative="false"/>
      <style:paragraph-properties style:writing-mode="lr-tb"/>
    </style:style>
    <style:style style:name="gr37" style:family="graphic" style:parent-style-name="standard">
      <style:graphic-properties draw:stroke="none" draw:fill="solid" draw:fill-color="#efbbff" draw:opacity="15%" loext:decorative="false"/>
    </style:style>
    <style:style style:name="gr38" style:family="graphic" style:parent-style-name="standard">
      <style:graphic-properties draw:stroke="none" draw:fill="solid" draw:fill-color="#efbbff" loext:decorative="false"/>
    </style:style>
    <style:style style:name="gr39" style:family="graphic" style:parent-style-name="standard">
      <style:graphic-properties draw:stroke="solid" svg:stroke-width="0.036cm" svg:stroke-color="#be29ec" draw:stroke-linejoin="miter" svg:stroke-linecap="butt" draw:fill="none" fo:padding-top="0.018cm" fo:padding-bottom="0.018cm" fo:padding-left="0.018cm" fo:padding-right="0.018cm" loext:decorative="false"/>
    </style:style>
    <style:style style:name="gr40"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loext:decorative="false"/>
      <style:paragraph-properties style:writing-mode="lr-tb"/>
    </style:style>
    <style:style style:name="gr41" style:family="graphic" style:parent-style-name="standard">
      <style:graphic-properties draw:stroke="solid" svg:stroke-width="0.054cm" svg:stroke-color="#800080" draw:stroke-linejoin="miter" svg:stroke-linecap="butt" draw:fill="none" fo:padding-top="0.027cm" fo:padding-bottom="0.027cm" fo:padding-left="0.027cm" fo:padding-right="0.027cm" loext:decorative="false"/>
    </style:style>
    <style:style style:name="gr42" style:family="graphic" style:parent-style-name="standard">
      <style:graphic-properties draw:stroke="none" draw:fill="none" draw:textarea-horizontal-align="left" draw:textarea-vertical-align="top" draw:auto-grow-height="true" draw:auto-grow-width="true" fo:min-height="0.362cm" fo:min-width="0.362cm" fo:padding-top="0cm" fo:padding-bottom="0cm" fo:padding-left="0cm" fo:padding-right="0cm" loext:decorative="false"/>
      <style:paragraph-properties style:writing-mode="lr-tb"/>
    </style:style>
    <style:style style:name="gr43" style:family="graphic" style:parent-style-name="standard">
      <style:graphic-properties draw:stroke="solid" svg:stroke-width="0.036cm" svg:stroke-color="#a020d0" draw:stroke-linejoin="miter" svg:stroke-linecap="butt" draw:fill="none" fo:padding-top="0.018cm" fo:padding-bottom="0.018cm" fo:padding-left="0.018cm" fo:padding-right="0.018cm" loext:decorative="false"/>
    </style:style>
    <style:style style:name="gr44" style:family="graphic" style:parent-style-name="standard">
      <style:graphic-properties draw:stroke="solid" svg:stroke-width="0.036cm" svg:stroke-color="#660066" draw:stroke-linejoin="miter" svg:stroke-linecap="butt" draw:fill="none" fo:padding-top="0.018cm" fo:padding-bottom="0.018cm" fo:padding-left="0.018cm" fo:padding-right="0.018cm" loext:decorative="false"/>
    </style:style>
    <style:style style:name="gr45" style:family="graphic" style:parent-style-name="standard">
      <style:graphic-properties draw:stroke="solid" svg:stroke-width="0.036cm" svg:stroke-color="#4a004a" draw:stroke-linejoin="miter" svg:stroke-linecap="butt" draw:fill="none" fo:padding-top="0.018cm" fo:padding-bottom="0.018cm" fo:padding-left="0.018cm" fo:padding-right="0.018cm" loext:decorative="false"/>
    </style:style>
    <style:style style:name="gr46" style:family="graphic" style:parent-style-name="standard">
      <style:graphic-properties draw:stroke="solid" svg:stroke-width="0.05cm" svg:stroke-color="#be29ec" draw:stroke-linejoin="miter" svg:stroke-linecap="butt" draw:fill="none" fo:padding-top="0.025cm" fo:padding-bottom="0.025cm" fo:padding-left="0.025cm" fo:padding-right="0.025cm" loext:decorative="false"/>
    </style:style>
    <style:style style:name="gr47" style:family="graphic" style:parent-style-name="standard">
      <style:graphic-properties draw:stroke="none" draw:fill="none" draw:textarea-horizontal-align="left" draw:textarea-vertical-align="top" draw:auto-grow-height="true" draw:auto-grow-width="true" fo:min-height="0.433cm" fo:min-width="0.433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loext:decorative="false"/>
      <style:paragraph-properties style:writing-mode="lr-tb"/>
    </style:style>
    <style:style style:name="gr49" style:family="graphic" style:parent-style-name="standard">
      <style:graphic-properties draw:stroke="solid" svg:stroke-width="0.05cm" svg:stroke-color="#660066" draw:stroke-linejoin="miter" svg:stroke-linecap="butt" draw:fill="none" fo:padding-top="0.025cm" fo:padding-bottom="0.025cm" fo:padding-left="0.025cm" fo:padding-right="0.025cm" loext:decorative="false"/>
    </style:style>
    <style:style style:name="gr50" style:family="graphic" style:parent-style-name="standard">
      <style:graphic-properties draw:stroke="solid" svg:stroke-width="0.05cm" svg:stroke-color="#4a004a" draw:stroke-linejoin="miter" svg:stroke-linecap="butt" draw:fill="none" fo:padding-top="0.025cm" fo:padding-bottom="0.025cm" fo:padding-left="0.025cm" fo:padding-right="0.025cm" loext:decorative="false"/>
    </style:style>
    <style:style style:name="gr51"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loext:decorative="false"/>
      <style:paragraph-properties style:writing-mode="lr-tb"/>
    </style:style>
    <style:style style:name="gr52" style:family="graphic" style:parent-style-name="standard">
      <style:graphic-properties draw:stroke="none" draw:fill="solid" draw:fill-color="#f7f9ff" loext:decorative="false"/>
    </style:style>
    <style:style style:name="gr53" style:family="graphic" style:parent-style-name="standard">
      <style:graphic-properties draw:stroke="solid" svg:stroke-width="0.008cm" svg:stroke-color="#cfdbf3" draw:stroke-linejoin="miter" svg:stroke-linecap="butt" draw:fill="none" fo:padding-top="0.004cm" fo:padding-bottom="0.004cm" fo:padding-left="0.004cm" fo:padding-right="0.004cm" loext:decorative="false"/>
    </style:style>
    <style:style style:name="gr54" style:family="graphic" style:parent-style-name="standard">
      <style:graphic-properties draw:stroke="none" draw:fill="none" draw:textarea-horizontal-align="left" draw:textarea-vertical-align="top" draw:auto-grow-height="true" draw:auto-grow-width="true" fo:min-height="0.088cm" fo:min-width="0.088cm" fo:padding-top="0cm" fo:padding-bottom="0cm" fo:padding-left="0cm" fo:padding-right="0cm" loext:decorative="false"/>
      <style:paragraph-properties style:writing-mode="lr-tb"/>
    </style:style>
    <style:style style:name="gr55" style:family="graphic" style:parent-style-name="standard">
      <style:graphic-properties draw:stroke="solid" svg:stroke-width="0.008cm" svg:stroke-color="#0b0b0b" draw:stroke-linejoin="miter" svg:stroke-linecap="butt" draw:fill="none" fo:padding-top="0.004cm" fo:padding-bottom="0.004cm" fo:padding-left="0.004cm" fo:padding-right="0.004cm" loext:decorative="false"/>
    </style:style>
    <style:style style:name="gr56" style:family="graphic" style:parent-style-name="standard">
      <style:graphic-properties draw:stroke="none" draw:fill="solid" draw:fill-color="#0b0b0b" loext:decorative="false"/>
    </style:style>
    <style:style style:name="gr57" style:family="graphic" style:parent-style-name="standard">
      <style:graphic-properties draw:stroke="none" draw:fill="solid" draw:fill-color="#f4ddff" draw:opacity="50%" loext:decorative="false"/>
    </style:style>
    <style:style style:name="gr58" style:family="graphic" style:parent-style-name="standard">
      <style:graphic-properties draw:stroke="none" draw:fill="solid" draw:fill-color="#f4ddff" loext:decorative="false"/>
    </style:style>
    <style:style style:name="gr59" style:family="graphic" style:parent-style-name="standard">
      <style:graphic-properties draw:stroke="none" draw:fill="solid" draw:fill-color="#ffe0b2" loext:decorative="false"/>
    </style:style>
    <style:style style:name="gr60" style:family="graphic" style:parent-style-name="standard">
      <style:graphic-properties draw:stroke="solid" svg:stroke-width="0.016cm" svg:stroke-color="#f57c00" draw:stroke-linejoin="miter" svg:stroke-linecap="butt" draw:fill="none" fo:padding-top="0.008cm" fo:padding-bottom="0.008cm" fo:padding-left="0.008cm" fo:padding-right="0.008cm" loext:decorative="false"/>
    </style:style>
    <style:style style:name="gr61" style:family="graphic" style:parent-style-name="standard">
      <style:graphic-properties draw:stroke="none" draw:fill="solid" draw:fill-color="#eceff1" loext:decorative="false"/>
    </style:style>
    <style:style style:name="gr62" style:family="graphic" style:parent-style-name="standard">
      <style:graphic-properties draw:stroke="none" draw:fill="solid" draw:fill-color="#607d8b" loext:decorative="false"/>
    </style:style>
    <style:style style:name="gr63" style:family="graphic" style:parent-style-name="standard">
      <style:graphic-properties draw:stroke="none" draw:fill="solid" draw:fill-color="#e1bee7" loext:decorative="false"/>
    </style:style>
    <style:style style:name="gr64" style:family="graphic" style:parent-style-name="standard">
      <style:graphic-properties draw:stroke="solid" svg:stroke-width="0.016cm" svg:stroke-color="#8e24aa" draw:stroke-linejoin="miter" svg:stroke-linecap="butt" draw:fill="none" fo:padding-top="0.008cm" fo:padding-bottom="0.008cm" fo:padding-left="0.008cm" fo:padding-right="0.008cm" loext:decorative="false"/>
    </style:style>
    <style:style style:name="gr65" style:family="graphic" style:parent-style-name="standard">
      <style:graphic-properties draw:stroke="none" draw:fill="solid" draw:fill-color="#fff9c4" loext:decorative="false"/>
    </style:style>
    <style:style style:name="gr66" style:family="graphic" style:parent-style-name="standard">
      <style:graphic-properties draw:stroke="solid" svg:stroke-width="0.016cm" svg:stroke-color="#fbc02d" draw:stroke-linejoin="miter" svg:stroke-linecap="butt" draw:fill="none" fo:padding-top="0.008cm" fo:padding-bottom="0.008cm" fo:padding-left="0.008cm" fo:padding-right="0.008cm" loext:decorative="false"/>
    </style:style>
    <style:style style:name="gr67" style:family="graphic" style:parent-style-name="standard">
      <style:graphic-properties draw:stroke="none" draw:fill="solid" draw:fill-color="#c8e6c9" loext:decorative="false"/>
    </style:style>
    <style:style style:name="gr68" style:family="graphic" style:parent-style-name="standard">
      <style:graphic-properties draw:stroke="solid" svg:stroke-width="0.016cm" svg:stroke-color="#388e3c" draw:stroke-linejoin="miter" svg:stroke-linecap="butt" draw:fill="none" fo:padding-top="0.008cm" fo:padding-bottom="0.008cm" fo:padding-left="0.008cm" fo:padding-right="0.008cm" loext:decorative="false"/>
    </style:style>
    <style:style style:name="gr69" style:family="graphic" style:parent-style-name="standard">
      <style:graphic-properties draw:stroke="none" draw:fill="solid" draw:fill-color="#bbdefb" loext:decorative="false"/>
    </style:style>
    <style:style style:name="gr70" style:family="graphic" style:parent-style-name="standard">
      <style:graphic-properties draw:stroke="solid" svg:stroke-width="0.016cm" svg:stroke-color="#1976d2" draw:stroke-linejoin="miter" svg:stroke-linecap="butt" draw:fill="none" fo:padding-top="0.008cm" fo:padding-bottom="0.008cm" fo:padding-left="0.008cm" fo:padding-right="0.008cm" loext:decorative="false"/>
    </style:style>
    <style:style style:name="gr71" style:family="graphic" style:parent-style-name="standard">
      <style:graphic-properties draw:stroke="none" draw:fill="solid" draw:fill-color="#ffcdd2" loext:decorative="false"/>
    </style:style>
    <style:style style:name="gr72" style:family="graphic" style:parent-style-name="standard">
      <style:graphic-properties draw:stroke="solid" svg:stroke-width="0.016cm" svg:stroke-color="#d32f2f" draw:stroke-linejoin="miter" svg:stroke-linecap="butt" draw:fill="none" fo:padding-top="0.008cm" fo:padding-bottom="0.008cm" fo:padding-left="0.008cm" fo:padding-right="0.008cm" loext:decorative="false"/>
    </style:style>
    <style:style style:name="gr73" style:family="graphic" style:parent-style-name="standard">
      <style:graphic-properties draw:stroke="none" draw:fill="solid" draw:fill-color="#e0f7fa" loext:decorative="false"/>
    </style:style>
    <style:style style:name="gr74" style:family="graphic" style:parent-style-name="standard">
      <style:graphic-properties draw:stroke="solid" svg:stroke-width="0.016cm" svg:stroke-color="#0097a7" draw:stroke-linejoin="miter" svg:stroke-linecap="butt" draw:fill="none" fo:padding-top="0.008cm" fo:padding-bottom="0.008cm" fo:padding-left="0.008cm" fo:padding-right="0.008cm" loext:decorative="false"/>
    </style:style>
    <style:style style:name="gr75" style:family="graphic" style:parent-style-name="standard">
      <style:graphic-properties draw:stroke="none" draw:fill="none" draw:textarea-horizontal-align="left" draw:textarea-vertical-align="top" draw:auto-grow-height="true" draw:auto-grow-width="true" fo:min-height="0.408cm" fo:min-width="0.408cm" fo:padding-top="0cm" fo:padding-bottom="0cm" fo:padding-left="0cm" fo:padding-right="0cm" loext:decorative="false"/>
      <style:paragraph-properties style:writing-mode="lr-tb"/>
    </style:style>
    <style:style style:name="gr76" style:family="graphic" style:parent-style-name="standard">
      <style:graphic-properties draw:stroke="none" draw:fill="solid" draw:fill-color="#000000" draw:opacity="15%" loext:decorative="false"/>
    </style:style>
    <style:style style:name="gr77" style:family="graphic" style:parent-style-name="standard">
      <style:graphic-properties draw:stroke="none" draw:fill="solid" draw:fill-color="#1e1e2e" loext:decorative="false"/>
    </style:style>
    <style:style style:name="gr78" style:family="graphic" style:parent-style-name="standard">
      <style:graphic-properties draw:stroke="none" draw:fill="none" draw:textarea-horizontal-align="left" draw:textarea-vertical-align="top" draw:auto-grow-height="true" draw:auto-grow-width="true" fo:min-height="0.332cm" fo:min-width="0.332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45cm" fo:min-width="0.345cm" fo:padding-top="0cm" fo:padding-bottom="0cm" fo:padding-left="0cm" fo:padding-right="0cm" loext:decorative="false"/>
      <style:paragraph-properties style:writing-mode="lr-tb"/>
    </style:style>
    <style:style style:name="gr80" style:family="graphic" style:parent-style-name="standard">
      <style:graphic-properties draw:stroke="none" draw:fill="solid" draw:fill-color="#be29ec" draw:opacity="10%" loext:decorative="false"/>
    </style:style>
    <style:style style:name="gr81" style:family="graphic" style:parent-style-name="standard">
      <style:graphic-properties draw:stroke="solid" svg:stroke-width="0.066cm" svg:stroke-color="#be29ec" draw:stroke-linejoin="miter" svg:stroke-linecap="butt" draw:fill="none" fo:padding-top="0.033cm" fo:padding-bottom="0.033cm" fo:padding-left="0.033cm" fo:padding-right="0.033cm" loext:decorative="false"/>
    </style:style>
    <style:style style:name="gr82" style:family="graphic" style:parent-style-name="standard">
      <style:graphic-properties draw:stroke="none" draw:fill="none" draw:textarea-horizontal-align="left" draw:textarea-vertical-align="top" draw:auto-grow-height="true" draw:auto-grow-width="true" fo:min-height="0.395cm" fo:min-width="0.395cm" fo:padding-top="0cm" fo:padding-bottom="0cm" fo:padding-left="0cm" fo:padding-right="0cm" loext:decorative="false"/>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07cm" fo:min-width="0.307cm" fo:padding-top="0cm" fo:padding-bottom="0cm" fo:padding-left="0cm" fo:padding-right="0cm" loext:decorative="false"/>
      <style:paragraph-properties style:writing-mode="lr-tb"/>
    </style:style>
    <style:style style:name="gr84" style:family="graphic" style:parent-style-name="standard">
      <style:graphic-properties draw:stroke="none" draw:fill="solid" draw:fill-color="#800080" draw:opacity="12%" loext:decorative="false"/>
    </style:style>
    <style:style style:name="gr85" style:family="graphic" style:parent-style-name="standard">
      <style:graphic-properties draw:stroke="solid" svg:stroke-width="0.066cm" svg:stroke-color="#800080" draw:stroke-linejoin="miter" svg:stroke-linecap="butt" draw:fill="none" fo:padding-top="0.033cm" fo:padding-bottom="0.033cm" fo:padding-left="0.033cm" fo:padding-right="0.033cm" loext:decorative="false"/>
    </style:style>
    <style:style style:name="gr86" style:family="graphic" style:parent-style-name="standard">
      <style:graphic-properties draw:stroke="none" draw:fill="solid" draw:fill-color="#660066" draw:opacity="15%" loext:decorative="false"/>
    </style:style>
    <style:style style:name="gr87" style:family="graphic" style:parent-style-name="standard">
      <style:graphic-properties draw:stroke="solid" svg:stroke-width="0.066cm" svg:stroke-color="#660066" draw:stroke-linejoin="miter" svg:stroke-linecap="butt" draw:fill="none" fo:padding-top="0.033cm" fo:padding-bottom="0.033cm" fo:padding-left="0.033cm" fo:padding-right="0.033cm" loext:decorative="false"/>
    </style:style>
    <style:style style:name="gr88" style:family="graphic" style:parent-style-name="standard">
      <style:graphic-properties draw:stroke="none" draw:fill="none" draw:textarea-horizontal-align="left" draw:textarea-vertical-align="top" draw:auto-grow-height="true" draw:auto-grow-width="true" fo:min-height="0.295cm" fo:min-width="0.295cm" fo:padding-top="0cm" fo:padding-bottom="0cm" fo:padding-left="0cm" fo:padding-right="0cm" loext:decorative="false"/>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258cm" fo:min-width="0.258cm" fo:padding-top="0cm" fo:padding-bottom="0cm" fo:padding-left="0cm" fo:padding-right="0cm" loext:decorative="false"/>
      <style:paragraph-properties style:writing-mode="lr-tb"/>
    </style:style>
    <style:style style:name="gr90" style:family="graphic" style:parent-style-name="standard">
      <style:graphic-properties draw:stroke="none" draw:fill="solid" draw:fill-color="#efbbff" draw:opacity="35%" loext:decorative="false"/>
    </style:style>
    <style:style style:name="gr91" style:family="graphic" style:parent-style-name="standard">
      <style:graphic-properties draw:stroke="solid" svg:stroke-width="0.057cm" svg:stroke-color="#be29ec" draw:stroke-linejoin="miter" svg:stroke-linecap="butt" draw:fill="none" fo:padding-top="0.028cm" fo:padding-bottom="0.028cm" fo:padding-left="0.028cm" fo:padding-right="0.028cm" loext:decorative="false"/>
    </style:style>
    <style:style style:name="gr92" style:family="graphic" style:parent-style-name="standard">
      <style:graphic-properties draw:stroke="none" draw:fill="none" draw:textarea-horizontal-align="left" draw:textarea-vertical-align="top" draw:auto-grow-height="true" draw:auto-grow-width="true" fo:min-height="0.615cm" fo:min-width="0.615cm" fo:padding-top="0cm" fo:padding-bottom="0cm" fo:padding-left="0cm" fo:padding-right="0cm" loext:decorative="false"/>
      <style:paragraph-properties style:writing-mode="lr-tb"/>
    </style:style>
    <style:style style:name="gr93" style:family="graphic" style:parent-style-name="standard">
      <style:graphic-properties draw:stroke="none" draw:fill="solid" draw:fill-color="#d896ff" draw:opacity="35%" loext:decorative="false"/>
    </style:style>
    <style:style style:name="gr9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538cm" fo:min-width="0.538cm" fo:padding-top="0cm" fo:padding-bottom="0cm" fo:padding-left="0cm" fo:padding-right="0cm" loext:decorative="false"/>
      <style:paragraph-properties style:writing-mode="lr-tb"/>
    </style:style>
    <style:style style:name="gr96" style:family="graphic" style:parent-style-name="standard">
      <style:graphic-properties draw:stroke="solid" svg:stroke-width="0.057cm" svg:stroke-color="#800080" draw:stroke-linejoin="miter" svg:stroke-linecap="butt" draw:fill="none" fo:padding-top="0.028cm" fo:padding-bottom="0.028cm" fo:padding-left="0.028cm" fo:padding-right="0.028cm" loext:decorative="false"/>
    </style:style>
    <style:style style:name="gr97"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loext:decorative="false"/>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61cm" fo:min-width="0.461cm" fo:padding-top="0cm" fo:padding-bottom="0cm" fo:padding-left="0cm" fo:padding-right="0cm" loext:decorative="false"/>
      <style:paragraph-properties style:writing-mode="lr-tb"/>
    </style:style>
    <style:style style:name="gr99" style:family="graphic" style:parent-style-name="standard">
      <style:graphic-properties draw:stroke="none" draw:fill="solid" draw:fill-color="#800080" draw:opacity="15%" loext:decorative="false"/>
    </style:style>
    <style:style style:name="gr100" style:family="graphic" style:parent-style-name="standard">
      <style:graphic-properties draw:stroke="solid" svg:stroke-width="0.057cm" svg:stroke-color="#660066" draw:stroke-linejoin="miter" svg:stroke-linecap="butt" draw:fill="none" fo:padding-top="0.028cm" fo:padding-bottom="0.028cm" fo:padding-left="0.028cm" fo:padding-right="0.028cm" loext:decorative="false"/>
    </style:style>
    <style:style style:name="gr101"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loext:decorative="false"/>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1.481cm" fo:min-width="1.481cm" fo:padding-top="0cm" fo:padding-bottom="0cm" fo:padding-left="0cm" fo:padding-right="0cm" loext:decorative="false"/>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47cm" fo:min-width="0.347cm" fo:padding-top="0cm" fo:padding-bottom="0cm" fo:padding-left="0cm" fo:padding-right="0cm" loext:decorative="false"/>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629cm" fo:min-width="0.629cm" fo:padding-top="0cm" fo:padding-bottom="0cm" fo:padding-left="0cm" fo:padding-right="0cm" loext:decorative="false"/>
      <style:paragraph-properties style:writing-mode="lr-tb"/>
    </style:style>
    <style:style style:name="gr105" style:family="graphic" style:parent-style-name="standard">
      <style:graphic-properties draw:stroke="none" draw:fill="solid" draw:fill-color="#ffffff" draw:opacity="20%" loext:decorative="false"/>
    </style:style>
    <style:style style:name="gr106" style:family="graphic" style:parent-style-name="standard">
      <style:graphic-properties draw:stroke="none" draw:fill="none" draw:textarea-horizontal-align="left" draw:textarea-vertical-align="top" draw:auto-grow-height="true" draw:auto-grow-width="true" fo:min-height="1.332cm" fo:min-width="1.332cm" fo:padding-top="0cm" fo:padding-bottom="0cm" fo:padding-left="0cm" fo:padding-right="0cm" loext:decorative="false"/>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814cm" fo:min-width="0.814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be29ec"/>
    </style:style>
    <style:style style:name="P3" style:family="paragraph">
      <style:paragraph-properties fo:text-align="start" style:writing-mode="lr-tb"/>
    </style:style>
    <style:style style:name="P4" style:family="paragraph">
      <loext:graphic-properties draw:fill="none"/>
      <style:text-properties fo:font-size="58.7999992370606pt" style:font-size-asian="58.7999992370606pt" style:font-size-complex="58.7999992370606pt"/>
    </style:style>
    <style:style style:name="P5" style:family="paragraph">
      <loext:graphic-properties draw:fill="none"/>
      <style:text-properties fo:font-size="25.2000007629395pt" style:font-size-asian="25.2000007629395pt" style:font-size-complex="25.2000007629395pt"/>
    </style:style>
    <style:style style:name="P6" style:family="paragraph">
      <loext:graphic-properties draw:fill="none"/>
      <style:text-properties fo:font-size="12.6000003814697pt" style:font-size-asian="12.6000003814697pt" style:font-size-complex="12.6000003814697pt"/>
    </style:style>
    <style:style style:name="P7" style:family="paragraph">
      <loext:graphic-properties draw:fill="solid" draw:fill-color="#000000" draw:opacity="40%"/>
    </style:style>
    <style:style style:name="P8" style:family="paragraph">
      <loext:graphic-properties draw:fill="none"/>
      <style:text-properties fo:font-size="10.5pt" style:font-size-asian="10.5pt" style:font-size-complex="10.5pt"/>
    </style:style>
    <style:style style:name="P9" style:family="paragraph">
      <loext:graphic-properties draw:fill="solid" draw:fill-color="#fafafa"/>
    </style:style>
    <style:style style:name="P10" style:family="paragraph">
      <loext:graphic-properties draw:fill="none"/>
      <style:text-properties fo:font-size="28.2999992370605pt" style:font-size-asian="28.2999992370605pt" style:font-size-complex="28.2999992370605pt"/>
    </style:style>
    <style:style style:name="P11" style:family="paragraph">
      <loext:graphic-properties draw:fill="solid" draw:fill-color="#d896ff"/>
    </style:style>
    <style:style style:name="P12" style:family="paragraph">
      <loext:graphic-properties draw:fill="none"/>
      <style:text-properties fo:font-size="15.8000001907349pt" style:font-size-asian="15.8000001907349pt" style:font-size-complex="15.8000001907349pt"/>
    </style:style>
    <style:style style:name="P13" style:family="paragraph">
      <loext:graphic-properties draw:fill="solid" draw:fill-color="#be29ec" draw:opacity="15%"/>
    </style:style>
    <style:style style:name="P14" style:family="paragraph">
      <loext:graphic-properties draw:fill="none"/>
      <style:text-properties fo:font-size="11.5pt" style:font-size-asian="11.5pt" style:font-size-complex="11.5pt"/>
    </style:style>
    <style:style style:name="P15" style:family="paragraph">
      <loext:graphic-properties draw:fill="solid" draw:fill-color="#660066"/>
    </style:style>
    <style:style style:name="P16" style:family="paragraph">
      <loext:graphic-properties draw:fill="none"/>
      <style:text-properties fo:font-size="105pt" style:font-size-asian="105pt" style:font-size-complex="105pt"/>
    </style:style>
    <style:style style:name="P17" style:family="paragraph">
      <loext:graphic-properties draw:fill="none"/>
      <style:text-properties fo:font-size="21pt" style:font-size-asian="21pt" style:font-size-complex="21pt"/>
    </style:style>
    <style:style style:name="P18" style:family="paragraph">
      <loext:graphic-properties draw:fill="solid" draw:fill-color="#1a1a2e"/>
    </style:style>
    <style:style style:name="P19" style:family="paragraph">
      <loext:graphic-properties draw:fill="none"/>
      <style:text-properties fo:font-size="13.6999998092651pt" style:font-size-asian="13.6999998092651pt" style:font-size-complex="13.6999998092651pt"/>
    </style:style>
    <style:style style:name="P20" style:family="paragraph">
      <loext:graphic-properties draw:fill="solid" draw:fill-color="#2ecc71"/>
    </style:style>
    <style:style style:name="P21" style:family="paragraph">
      <loext:graphic-properties draw:fill="none"/>
      <style:text-properties fo:font-size="16.7999992370605pt" style:font-size-asian="16.7999992370605pt" style:font-size-complex="16.7999992370605pt"/>
    </style:style>
    <style:style style:name="P22" style:family="paragraph">
      <loext:graphic-properties draw:fill="solid" draw:fill-color="#e74c3c"/>
    </style:style>
    <style:style style:name="P23" style:family="paragraph">
      <loext:graphic-properties draw:fill="solid" draw:fill-color="#000000" draw:opacity="20%"/>
    </style:style>
    <style:style style:name="P24" style:family="paragraph">
      <loext:graphic-properties draw:fill="solid" draw:fill-color="#ffffff" draw:opacity="5%"/>
    </style:style>
    <style:style style:name="P25" style:family="paragraph">
      <loext:graphic-properties draw:fill="none"/>
      <style:text-properties fo:font-size="14.6999998092651pt" style:font-size-asian="14.6999998092651pt" style:font-size-complex="14.6999998092651pt"/>
    </style:style>
    <style:style style:name="P26" style:family="paragraph">
      <loext:graphic-properties draw:fill="none"/>
    </style:style>
    <style:style style:name="P27" style:family="paragraph">
      <loext:graphic-properties draw:fill="none"/>
      <style:text-properties fo:font-size="20pt" style:font-size-asian="20pt" style:font-size-complex="20pt"/>
    </style:style>
    <style:style style:name="P28" style:family="paragraph">
      <loext:graphic-properties draw:fill="none"/>
      <style:text-properties fo:font-size="12.8000001907349pt" style:font-size-asian="12.8000001907349pt" style:font-size-complex="12.8000001907349pt"/>
    </style:style>
    <style:style style:name="P29" style:family="paragraph">
      <loext:graphic-properties draw:fill="solid" draw:fill-color="#800080"/>
    </style:style>
    <style:style style:name="P30" style:family="paragraph">
      <loext:graphic-properties draw:fill="none"/>
      <style:text-properties fo:font-size="6.69999980926514pt" style:font-size-asian="6.69999980926514pt" style:font-size-complex="6.69999980926514pt"/>
    </style:style>
    <style:style style:name="P31" style:family="paragraph">
      <loext:graphic-properties draw:fill="solid" draw:fill-color="#efbbff" draw:opacity="6%"/>
    </style:style>
    <style:style style:name="P32" style:family="paragraph">
      <loext:graphic-properties draw:fill="solid" draw:fill-color="#be29ec" draw:opacity="12%"/>
    </style:style>
    <style:style style:name="P33" style:family="paragraph">
      <loext:graphic-properties draw:fill="none"/>
      <style:text-properties fo:font-size="5.59999990463257pt" style:font-size-asian="5.59999990463257pt" style:font-size-complex="5.59999990463257pt"/>
    </style:style>
    <style:style style:name="P34" style:family="paragraph">
      <loext:graphic-properties draw:fill="solid" draw:fill-color="#be29ec" draw:opacity="8%"/>
    </style:style>
    <style:style style:name="P35" style:family="paragraph">
      <loext:graphic-properties draw:fill="none"/>
      <style:text-properties fo:font-size="10.6999998092651pt" style:font-size-asian="10.6999998092651pt" style:font-size-complex="10.6999998092651pt"/>
    </style:style>
    <style:style style:name="P36" style:family="paragraph">
      <loext:graphic-properties draw:fill="none"/>
      <style:text-properties fo:font-size="6.30000019073486pt" style:font-size-asian="6.30000019073486pt" style:font-size-complex="6.30000019073486pt"/>
    </style:style>
    <style:style style:name="P37" style:family="paragraph">
      <loext:graphic-properties draw:fill="none"/>
      <style:text-properties fo:font-size="8.89999961853027pt" style:font-size-asian="8.89999961853027pt" style:font-size-complex="8.89999961853027pt"/>
    </style:style>
    <style:style style:name="P38" style:family="paragraph">
      <loext:graphic-properties draw:fill="solid" draw:fill-color="#efbbff" draw:opacity="15%"/>
    </style:style>
    <style:style style:name="P39" style:family="paragraph">
      <loext:graphic-properties draw:fill="solid" draw:fill-color="#efbbff"/>
    </style:style>
    <style:style style:name="P40" style:family="paragraph">
      <loext:graphic-properties draw:fill="none"/>
      <style:text-properties fo:font-size="14.3999996185303pt" style:font-size-asian="14.3999996185303pt" style:font-size-complex="14.3999996185303pt"/>
    </style:style>
    <style:style style:name="P41" style:family="paragraph">
      <loext:graphic-properties draw:fill="none"/>
      <style:text-properties fo:font-size="10.3000001907349pt" style:font-size-asian="10.3000001907349pt" style:font-size-complex="10.3000001907349pt"/>
    </style:style>
    <style:style style:name="P42" style:family="paragraph">
      <loext:graphic-properties draw:fill="none"/>
      <style:text-properties fo:font-size="12.3000001907349pt" style:font-size-asian="12.3000001907349pt" style:font-size-complex="12.3000001907349pt"/>
    </style:style>
    <style:style style:name="P43" style:family="paragraph">
      <loext:graphic-properties draw:fill="none"/>
      <style:text-properties fo:font-size="9.39999961853027pt" style:font-size-asian="9.39999961853027pt" style:font-size-complex="9.39999961853027pt"/>
    </style:style>
    <style:style style:name="P44" style:family="paragraph">
      <loext:graphic-properties draw:fill="none"/>
      <style:text-properties fo:font-size="18pt" style:font-size-asian="18pt" style:font-size-complex="18pt"/>
    </style:style>
    <style:style style:name="P45" style:family="paragraph">
      <loext:graphic-properties draw:fill="solid" draw:fill-color="#f7f9ff"/>
    </style:style>
    <style:style style:name="P46" style:family="paragraph">
      <loext:graphic-properties draw:fill="none"/>
      <style:text-properties fo:font-size="2.59999990463257pt" style:font-size-asian="2.59999990463257pt" style:font-size-complex="2.59999990463257pt"/>
    </style:style>
    <style:style style:name="P47" style:family="paragraph">
      <loext:graphic-properties draw:fill="solid" draw:fill-color="#0b0b0b"/>
    </style:style>
    <style:style style:name="P48" style:family="paragraph">
      <loext:graphic-properties draw:fill="solid" draw:fill-color="#f4ddff" draw:opacity="50%"/>
    </style:style>
    <style:style style:name="P49" style:family="paragraph">
      <loext:graphic-properties draw:fill="solid" draw:fill-color="#f4ddff"/>
    </style:style>
    <style:style style:name="P50" style:family="paragraph">
      <loext:graphic-properties draw:fill="solid" draw:fill-color="#ffe0b2"/>
    </style:style>
    <style:style style:name="P51" style:family="paragraph">
      <loext:graphic-properties draw:fill="solid" draw:fill-color="#eceff1"/>
    </style:style>
    <style:style style:name="P52" style:family="paragraph">
      <loext:graphic-properties draw:fill="solid" draw:fill-color="#607d8b"/>
    </style:style>
    <style:style style:name="P53" style:family="paragraph">
      <loext:graphic-properties draw:fill="solid" draw:fill-color="#e1bee7"/>
    </style:style>
    <style:style style:name="P54" style:family="paragraph">
      <loext:graphic-properties draw:fill="solid" draw:fill-color="#fff9c4"/>
    </style:style>
    <style:style style:name="P55" style:family="paragraph">
      <loext:graphic-properties draw:fill="solid" draw:fill-color="#c8e6c9"/>
    </style:style>
    <style:style style:name="P56" style:family="paragraph">
      <loext:graphic-properties draw:fill="solid" draw:fill-color="#bbdefb"/>
    </style:style>
    <style:style style:name="P57" style:family="paragraph">
      <loext:graphic-properties draw:fill="solid" draw:fill-color="#ffcdd2"/>
    </style:style>
    <style:style style:name="P58" style:family="paragraph">
      <loext:graphic-properties draw:fill="solid" draw:fill-color="#e0f7fa"/>
    </style:style>
    <style:style style:name="P59" style:family="paragraph">
      <loext:graphic-properties draw:fill="none"/>
      <style:text-properties fo:font-size="11.6000003814697pt" style:font-size-asian="11.6000003814697pt" style:font-size-complex="11.6000003814697pt"/>
    </style:style>
    <style:style style:name="P60" style:family="paragraph">
      <loext:graphic-properties draw:fill="solid" draw:fill-color="#000000" draw:opacity="15%"/>
    </style:style>
    <style:style style:name="P61" style:family="paragraph">
      <loext:graphic-properties draw:fill="solid" draw:fill-color="#1e1e2e"/>
    </style:style>
    <style:style style:name="P62" style:family="paragraph">
      <loext:graphic-properties draw:fill="none"/>
      <style:text-properties fo:font-size="9.80000019073486pt" style:font-size-asian="9.80000019073486pt" style:font-size-complex="9.80000019073486pt"/>
    </style:style>
    <style:style style:name="P63" style:family="paragraph">
      <loext:graphic-properties draw:fill="solid" draw:fill-color="#be29ec" draw:opacity="10%"/>
    </style:style>
    <style:style style:name="P64" style:family="paragraph">
      <loext:graphic-properties draw:fill="none"/>
      <style:text-properties fo:font-size="11.3000001907349pt" style:font-size-asian="11.3000001907349pt" style:font-size-complex="11.3000001907349pt"/>
    </style:style>
    <style:style style:name="P65" style:family="paragraph">
      <loext:graphic-properties draw:fill="none"/>
      <style:text-properties fo:font-size="8.80000019073486pt" style:font-size-asian="8.80000019073486pt" style:font-size-complex="8.80000019073486pt"/>
    </style:style>
    <style:style style:name="P66" style:family="paragraph">
      <loext:graphic-properties draw:fill="solid" draw:fill-color="#800080" draw:opacity="12%"/>
    </style:style>
    <style:style style:name="P67" style:family="paragraph">
      <loext:graphic-properties draw:fill="solid" draw:fill-color="#660066" draw:opacity="15%"/>
    </style:style>
    <style:style style:name="P68" style:family="paragraph">
      <loext:graphic-properties draw:fill="none"/>
      <style:text-properties fo:font-size="8.39999961853027pt" style:font-size-asian="8.39999961853027pt" style:font-size-complex="8.39999961853027pt"/>
    </style:style>
    <style:style style:name="P69" style:family="paragraph">
      <loext:graphic-properties draw:fill="none"/>
      <style:text-properties fo:font-size="7.30000019073486pt" style:font-size-asian="7.30000019073486pt" style:font-size-complex="7.30000019073486pt"/>
    </style:style>
    <style:style style:name="P70" style:family="paragraph">
      <loext:graphic-properties draw:fill="solid" draw:fill-color="#efbbff" draw:opacity="35%"/>
    </style:style>
    <style:style style:name="P71" style:family="paragraph">
      <loext:graphic-properties draw:fill="none"/>
      <style:text-properties fo:font-size="17.5pt" style:font-size-asian="17.5pt" style:font-size-complex="17.5pt"/>
    </style:style>
    <style:style style:name="P72" style:family="paragraph">
      <loext:graphic-properties draw:fill="solid" draw:fill-color="#d896ff" draw:opacity="35%"/>
    </style:style>
    <style:style style:name="P73" style:family="paragraph">
      <loext:graphic-properties draw:fill="none"/>
      <style:text-properties fo:font-size="12pt" style:font-size-asian="12pt" style:font-size-complex="12pt"/>
    </style:style>
    <style:style style:name="P74" style:family="paragraph">
      <loext:graphic-properties draw:fill="none"/>
      <style:text-properties fo:font-size="15.3000001907349pt" style:font-size-asian="15.3000001907349pt" style:font-size-complex="15.3000001907349pt"/>
    </style:style>
    <style:style style:name="P75" style:family="paragraph">
      <loext:graphic-properties draw:fill="none"/>
      <style:text-properties fo:font-size="10.8999996185303pt" style:font-size-asian="10.8999996185303pt" style:font-size-complex="10.8999996185303pt"/>
    </style:style>
    <style:style style:name="P76" style:family="paragraph">
      <loext:graphic-properties draw:fill="none"/>
      <style:text-properties fo:font-size="13.1000003814697pt" style:font-size-asian="13.1000003814697pt" style:font-size-complex="13.1000003814697pt"/>
    </style:style>
    <style:style style:name="P77" style:family="paragraph">
      <loext:graphic-properties draw:fill="solid" draw:fill-color="#800080" draw:opacity="15%"/>
    </style:style>
    <style:style style:name="P78" style:family="paragraph">
      <loext:graphic-properties draw:fill="none"/>
      <style:text-properties fo:font-size="8.69999980926514pt" style:font-size-asian="8.69999980926514pt" style:font-size-complex="8.69999980926514pt"/>
    </style:style>
    <style:style style:name="P79" style:family="paragraph">
      <loext:graphic-properties draw:fill="none"/>
      <style:text-properties fo:font-size="7.5pt" style:font-size-asian="7.5pt" style:font-size-complex="7.5pt"/>
    </style:style>
    <style:style style:name="P80" style:family="paragraph">
      <loext:graphic-properties draw:fill="none"/>
      <style:text-properties fo:font-size="42pt" style:font-size-asian="42pt" style:font-size-complex="42pt"/>
    </style:style>
    <style:style style:name="P81" style:family="paragraph">
      <loext:graphic-properties draw:fill="none"/>
      <style:text-properties fo:font-size="17.8999996185303pt" style:font-size-asian="17.8999996185303pt" style:font-size-complex="17.8999996185303pt"/>
    </style:style>
    <style:style style:name="P82" style:family="paragraph">
      <loext:graphic-properties draw:fill="solid" draw:fill-color="#ffffff" draw:opacity="20%"/>
    </style:style>
    <style:style style:name="P83" style:family="paragraph">
      <loext:graphic-properties draw:fill="none"/>
      <style:text-properties fo:font-size="37.7999992370606pt" style:font-size-asian="37.7999992370606pt" style:font-size-complex="37.7999992370606pt"/>
    </style:style>
    <style:style style:name="P84" style:family="paragraph">
      <loext:graphic-properties draw:fill="none"/>
      <style:text-properties fo:font-size="23.1000003814697pt" style:font-size-asian="23.1000003814697pt" style:font-size-complex="23.1000003814697pt"/>
    </style:style>
    <style:style style:name="T1" style:family="text">
      <style:text-properties fo:color="#660066" loext:opacity="100%" style:font-name="Montserrat" fo:font-size="58.7999992370606pt" fo:font-weight="100" style:font-name-asian="Montserrat" style:font-size-asian="58.7999992370606pt" style:font-weight-asian="100" style:font-name-complex="Montserrat" style:font-size-complex="58.7999992370606pt" style:font-weight-complex="100"/>
    </style:style>
    <style:style style:name="T2" style:family="text">
      <style:text-properties fo:color="#800080" loext:opacity="100%" style:font-name="Montserrat" fo:font-size="25.2000007629395pt" fo:font-weight="100" style:font-name-asian="Montserrat" style:font-size-asian="25.2000007629395pt" style:font-weight-asian="100" style:font-name-complex="Montserrat" style:font-size-complex="25.2000007629395pt" style:font-weight-complex="100"/>
    </style:style>
    <style:style style:name="T3" style:family="text">
      <style:text-properties fo:color="#be29ec" loext:opacity="100%" style:font-name="SourceSansPro" fo:font-size="12.6000003814697pt" fo:font-weight="600" style:font-name-asian="SourceSansPro" style:font-size-asian="12.6000003814697pt" style:font-weight-asian="600" style:font-name-complex="SourceSansPro" style:font-size-complex="12.6000003814697pt" style:font-weight-complex="600"/>
    </style:style>
    <style:style style:name="T4" style:family="text">
      <style:text-properties fo:color="#777777" loext:opacity="100%" style:font-name="SourceSansPro" fo:font-size="12.6000003814697pt" fo:font-weight="normal" style:font-name-asian="SourceSansPro" style:font-size-asian="12.6000003814697pt" style:font-weight-asian="normal" style:font-name-complex="SourceSansPro" style:font-size-complex="12.6000003814697pt" style:font-weight-complex="normal"/>
    </style:style>
    <style:style style:name="T5" style:family="text">
      <style:text-properties fo:color="#999999" loext:opacity="100%" style:font-name="SourceSansPro" fo:font-size="10.5pt" fo:font-weight="normal" style:font-name-asian="SourceSansPro" style:font-size-asian="10.5pt" style:font-weight-asian="normal" style:font-name-complex="SourceSansPro" style:font-size-complex="10.5pt" style:font-weight-complex="normal"/>
    </style:style>
    <style:style style:name="T6" style:family="text">
      <style:text-properties fo:color="#800080" loext:opacity="100%" style:font-name="JetBrainsMono" fo:font-size="10.5pt" fo:font-weight="normal" style:font-name-asian="JetBrainsMono" style:font-size-asian="10.5pt" style:font-weight-asian="normal" style:font-name-complex="JetBrainsMono" style:font-size-complex="10.5pt" style:font-weight-complex="normal"/>
    </style:style>
    <style:style style:name="T7" style:family="text">
      <style:text-properties fo:color="#800080" loext:opacity="100%" style:font-name="Montserrat" fo:font-size="28.2999992370605pt" fo:font-weight="100" style:font-name-asian="Montserrat" style:font-size-asian="28.2999992370605pt" style:font-weight-asian="100" style:font-name-complex="Montserrat" style:font-size-complex="28.2999992370605pt" style:font-weight-complex="100"/>
    </style:style>
    <style:style style:name="T8" style:family="text">
      <style:text-properties fo:color="#800080" loext:opacity="100%" style:font-name="SourceSansPro" fo:font-size="15.8000001907349pt" fo:font-weight="600" style:font-name-asian="SourceSansPro" style:font-size-asian="15.8000001907349pt" style:font-weight-asian="600" style:font-name-complex="SourceSansPro" style:font-size-complex="15.8000001907349pt" style:font-weight-complex="600"/>
    </style:style>
    <style:style style:name="T9" style:family="text">
      <style:text-properties fo:color="#be29ec" loext:opacity="100%" style:font-name="SourceSansPro" fo:font-size="11.5pt" fo:font-weight="600" style:font-name-asian="SourceSansPro" style:font-size-asian="11.5pt" style:font-weight-asian="600" style:font-name-complex="SourceSansPro" style:font-size-complex="11.5pt" style:font-weight-complex="600"/>
    </style:style>
    <style:style style:name="T10" style:family="text">
      <style:text-properties fo:color="#1a1a2e" loext:opacity="100%" style:font-name="SourceSansPro" fo:font-size="11.5pt" fo:font-weight="normal" style:font-name-asian="SourceSansPro" style:font-size-asian="11.5pt" style:font-weight-asian="normal" style:font-name-complex="SourceSansPro" style:font-size-complex="11.5pt" style:font-weight-complex="normal"/>
    </style:style>
    <style:style style:name="T11" style:family="text">
      <style:text-properties fo:color="#ffffff" loext:opacity="100%" style:font-name="Montserrat" fo:font-size="28.2999992370605pt" fo:font-weight="100" style:font-name-asian="Montserrat" style:font-size-asian="28.2999992370605pt" style:font-weight-asian="100" style:font-name-complex="Montserrat" style:font-size-complex="28.2999992370605pt" style:font-weight-complex="100"/>
    </style:style>
    <style:style style:name="T12" style:family="text">
      <style:text-properties fo:color="#ffffff" loext:opacity="100%" style:font-name="JetBrainsMono" fo:font-size="105pt" fo:font-weight="normal" style:font-name-asian="JetBrainsMono" style:font-size-asian="105pt" style:font-weight-asian="normal" style:font-name-complex="JetBrainsMono" style:font-size-complex="105pt" style:font-weight-complex="normal"/>
    </style:style>
    <style:style style:name="T13" style:family="text">
      <style:text-properties fo:color="#ffffff" loext:opacity="100%" style:font-name="SourceSansPro" fo:font-size="21pt" fo:font-weight="normal" style:font-name-asian="SourceSansPro" style:font-size-asian="21pt" style:font-weight-asian="normal" style:font-name-complex="SourceSansPro" style:font-size-complex="21pt" style:font-weight-complex="normal"/>
    </style:style>
    <style:style style:name="T14" style:family="text">
      <style:text-properties fo:color="#be29ec" loext:opacity="100%" style:font-name="Montserrat" fo:font-size="15.8000001907349pt" fo:font-weight="100" style:font-name-asian="Montserrat" style:font-size-asian="15.8000001907349pt" style:font-weight-asian="100" style:font-name-complex="Montserrat" style:font-size-complex="15.8000001907349pt" style:font-weight-complex="100"/>
    </style:style>
    <style:style style:name="T15" style:family="text">
      <style:text-properties fo:color="#1a1a2e" loext:opacity="100%" style:font-name="SourceSansPro" fo:font-size="12.6000003814697pt" fo:font-weight="normal" style:font-name-asian="SourceSansPro" style:font-size-asian="12.6000003814697pt" style:font-weight-asian="normal" style:font-name-complex="SourceSansPro" style:font-size-complex="12.6000003814697pt" style:font-weight-complex="normal"/>
    </style:style>
    <style:style style:name="T16" style:family="text">
      <style:text-properties fo:color="#800080" loext:opacity="100%" style:font-name="SourceSansPro" fo:font-size="13.6999998092651pt" fo:font-weight="600" style:font-name-asian="SourceSansPro" style:font-size-asian="13.6999998092651pt" style:font-weight-asian="600" style:font-name-complex="SourceSansPro" style:font-size-complex="13.6999998092651pt" style:font-weight-complex="600"/>
    </style:style>
    <style:style style:name="T17" style:family="text">
      <style:text-properties fo:color="#1a1a2e" loext:opacity="100%" style:font-name="SourceSansPro" fo:font-size="13.6999998092651pt" fo:font-weight="normal" style:font-name-asian="SourceSansPro" style:font-size-asian="13.6999998092651pt" style:font-weight-asian="normal" style:font-name-complex="SourceSansPro" style:font-size-complex="13.6999998092651pt" style:font-weight-complex="normal"/>
    </style:style>
    <style:style style:name="T18" style:family="text">
      <style:text-properties fo:color="#be29ec" loext:opacity="100%" style:font-name="SourceSansPro-It" fo:font-size="13.6999998092651pt" fo:font-style="italic" fo:font-weight="normal" style:font-name-asian="SourceSansPro-It" style:font-size-asian="13.6999998092651pt" style:font-style-asian="italic" style:font-weight-asian="normal" style:font-name-complex="SourceSansPro-It" style:font-size-complex="13.6999998092651pt" style:font-style-complex="italic" style:font-weight-complex="normal"/>
    </style:style>
    <style:style style:name="T19" style:family="text">
      <style:text-properties fo:color="#2ecc71" loext:opacity="100%" style:font-name="Montserrat" fo:font-size="16.7999992370605pt" fo:font-weight="100" style:font-name-asian="Montserrat" style:font-size-asian="16.7999992370605pt" style:font-weight-asian="100" style:font-name-complex="Montserrat" style:font-size-complex="16.7999992370605pt" style:font-weight-complex="100"/>
    </style:style>
    <style:style style:name="T20" style:family="text">
      <style:text-properties fo:color="#e74c3c" loext:opacity="100%" style:font-name="Montserrat" fo:font-size="16.7999992370605pt" fo:font-weight="100" style:font-name-asian="Montserrat" style:font-size-asian="16.7999992370605pt" style:font-weight-asian="100" style:font-name-complex="Montserrat" style:font-size-complex="16.7999992370605pt" style:font-weight-complex="100"/>
    </style:style>
    <style:style style:name="T21" style:family="text">
      <style:text-properties fo:color="#1a1a2e" loext:opacity="100%" style:font-name="SourceSansPro-It" fo:font-size="14.6999998092651pt" fo:font-style="italic" fo:font-weight="normal" style:font-name-asian="SourceSansPro-It" style:font-size-asian="14.6999998092651pt" style:font-style-asian="italic" style:font-weight-asian="normal" style:font-name-complex="SourceSansPro-It" style:font-size-complex="14.6999998092651pt" style:font-style-complex="italic" style:font-weight-complex="normal"/>
    </style:style>
    <style:style style:name="T22" style:family="text">
      <style:text-properties fo:color="#be29ec" loext:opacity="100%" style:font-name="SourceSansPro-It" fo:font-size="14.6999998092651pt" fo:font-style="italic" fo:font-weight="normal" style:font-name-asian="SourceSansPro-It" style:font-size-asian="14.6999998092651pt" style:font-style-asian="italic" style:font-weight-asian="normal" style:font-name-complex="SourceSansPro-It" style:font-size-complex="14.6999998092651pt" style:font-style-complex="italic" style:font-weight-complex="normal"/>
    </style:style>
    <style:style style:name="T23" style:family="text">
      <style:text-properties fo:color="#1a1a2e" loext:opacity="100%" style:font-name="SourceSansPro" fo:font-size="20pt" fo:font-weight="600" style:font-name-asian="SourceSansPro" style:font-size-asian="20pt" style:font-weight-asian="600" style:font-name-complex="SourceSansPro" style:font-size-complex="20pt" style:font-weight-complex="600"/>
    </style:style>
    <style:style style:name="T24" style:family="text">
      <style:text-properties fo:color="#800080" loext:opacity="100%" style:font-name="SourceSansPro" fo:font-size="20pt" fo:font-weight="600" style:font-name-asian="SourceSansPro" style:font-size-asian="20pt" style:font-weight-asian="600" style:font-name-complex="SourceSansPro" style:font-size-complex="20pt" style:font-weight-complex="600"/>
    </style:style>
    <style:style style:name="T25" style:family="text">
      <style:text-properties fo:color="#be29ec" loext:opacity="100%" style:font-name="SourceSansPro-It" fo:font-size="15.8000001907349pt" fo:font-style="italic" fo:font-weight="normal" style:font-name-asian="SourceSansPro-It" style:font-size-asian="15.8000001907349pt" style:font-style-asian="italic" style:font-weight-asian="normal" style:font-name-complex="SourceSansPro-It" style:font-size-complex="15.8000001907349pt" style:font-style-complex="italic" style:font-weight-complex="normal"/>
    </style:style>
    <style:style style:name="T26" style:family="text">
      <style:text-properties fo:color="#800080" loext:opacity="100%" style:font-name="SourceSansPro-SemiboldIt" fo:font-size="15.8000001907349pt" fo:font-style="italic" fo:font-weight="normal" style:font-name-asian="SourceSansPro-SemiboldIt" style:font-size-asian="15.8000001907349pt" style:font-style-asian="italic" style:font-weight-asian="normal" style:font-name-complex="SourceSansPro-SemiboldIt" style:font-size-complex="15.8000001907349pt" style:font-style-complex="italic" style:font-weight-complex="normal"/>
    </style:style>
    <style:style style:name="T27" style:family="text">
      <style:text-properties fo:color="#800080" loext:opacity="100%" style:font-name="SourceSansPro" fo:font-size="12.6000003814697pt" fo:font-weight="600" style:font-name-asian="SourceSansPro" style:font-size-asian="12.6000003814697pt" style:font-weight-asian="600" style:font-name-complex="SourceSansPro" style:font-size-complex="12.6000003814697pt" style:font-weight-complex="600"/>
    </style:style>
    <style:style style:name="T28" style:family="text">
      <style:text-properties fo:color="#ffffff" loext:opacity="100%" style:font-name="SourceSansPro" fo:font-size="12.8000001907349pt" fo:font-weight="600" style:font-name-asian="SourceSansPro" style:font-size-asian="12.8000001907349pt" style:font-weight-asian="600" style:font-name-complex="SourceSansPro" style:font-size-complex="12.8000001907349pt" style:font-weight-complex="600"/>
    </style:style>
    <style:style style:name="T29" style:family="text">
      <style:text-properties fo:color="#800080" loext:opacity="100%" style:font-name="SourceSansPro" fo:font-size="6.69999980926514pt" fo:font-weight="normal" style:font-name-asian="SourceSansPro" style:font-size-asian="6.69999980926514pt" style:font-weight-asian="normal" style:font-name-complex="SourceSansPro" style:font-size-complex="6.69999980926514pt" style:font-weight-complex="normal"/>
    </style:style>
    <style:style style:name="T30" style:family="text">
      <style:text-properties fo:color="#ffffff" loext:opacity="100%" style:font-name="SourceSansPro" fo:font-size="12.6000003814697pt" fo:font-weight="600" style:font-name-asian="SourceSansPro" style:font-size-asian="12.6000003814697pt" style:font-weight-asian="600" style:font-name-complex="SourceSansPro" style:font-size-complex="12.6000003814697pt" style:font-weight-complex="600"/>
    </style:style>
    <style:style style:name="T31" style:family="text">
      <style:text-properties fo:color="#ffffff" loext:opacity="100%" style:font-name="SourceSansPro" fo:font-size="5.59999990463257pt" fo:font-weight="600" style:font-name-asian="SourceSansPro" style:font-size-asian="5.59999990463257pt" style:font-weight-asian="600" style:font-name-complex="SourceSansPro" style:font-size-complex="5.59999990463257pt" style:font-weight-complex="600"/>
    </style:style>
    <style:style style:name="T32" style:family="text">
      <style:text-properties fo:color="#1a1a2e" loext:opacity="100%" style:font-name="JetBrainsMono" fo:font-size="10.6999998092651pt" fo:font-weight="normal" style:font-name-asian="JetBrainsMono" style:font-size-asian="10.6999998092651pt" style:font-weight-asian="normal" style:font-name-complex="JetBrainsMono" style:font-size-complex="10.6999998092651pt" style:font-weight-complex="normal"/>
    </style:style>
    <style:style style:name="T33" style:family="text">
      <style:text-properties fo:color="#800080" loext:opacity="100%" style:font-name="SourceSansPro" fo:font-size="11.5pt" fo:font-weight="normal" style:font-name-asian="SourceSansPro" style:font-size-asian="11.5pt" style:font-weight-asian="normal" style:font-name-complex="SourceSansPro" style:font-size-complex="11.5pt" style:font-weight-complex="normal"/>
    </style:style>
    <style:style style:name="T34" style:family="text">
      <style:text-properties fo:color="#ffffff" loext:opacity="100%" style:font-name="SourceSansPro" fo:font-size="6.30000019073486pt" fo:font-weight="600" style:font-name-asian="SourceSansPro" style:font-size-asian="6.30000019073486pt" style:font-weight-asian="600" style:font-name-complex="SourceSansPro" style:font-size-complex="6.30000019073486pt" style:font-weight-complex="600"/>
    </style:style>
    <style:style style:name="T35" style:family="text">
      <style:text-properties fo:color="#800080" loext:opacity="100%" style:font-name="SourceSansPro" fo:font-size="11.5pt" fo:font-weight="600" style:font-name-asian="SourceSansPro" style:font-size-asian="11.5pt" style:font-weight-asian="600" style:font-name-complex="SourceSansPro" style:font-size-complex="11.5pt" style:font-weight-complex="600"/>
    </style:style>
    <style:style style:name="T36" style:family="text">
      <style:text-properties fo:color="#1a1a2e" loext:opacity="100%" style:font-name="SourceSansPro" fo:font-size="10.5pt" fo:font-weight="normal" style:font-name-asian="SourceSansPro" style:font-size-asian="10.5pt" style:font-weight-asian="normal" style:font-name-complex="SourceSansPro" style:font-size-complex="10.5pt" style:font-weight-complex="normal"/>
    </style:style>
    <style:style style:name="T37" style:family="text">
      <style:text-properties fo:color="#1a1a2e" loext:opacity="100%" style:font-name="JetBrainsMono" fo:font-size="8.89999961853027pt" fo:font-weight="normal" style:font-name-asian="JetBrainsMono" style:font-size-asian="8.89999961853027pt" style:font-weight-asian="normal" style:font-name-complex="JetBrainsMono" style:font-size-complex="8.89999961853027pt" style:font-weight-complex="normal"/>
    </style:style>
    <style:style style:name="T38" style:family="text">
      <style:text-properties fo:color="#be29ec" loext:opacity="100%" style:font-name="Montserrat" fo:font-size="16.7999992370605pt" fo:font-weight="100" style:font-name-asian="Montserrat" style:font-size-asian="16.7999992370605pt" style:font-weight-asian="100" style:font-name-complex="Montserrat" style:font-size-complex="16.7999992370605pt" style:font-weight-complex="100"/>
    </style:style>
    <style:style style:name="T39" style:family="text">
      <style:text-properties fo:color="#660066" loext:opacity="100%" style:font-name="Montserrat" fo:font-size="16.7999992370605pt" fo:font-weight="100" style:font-name-asian="Montserrat" style:font-size-asian="16.7999992370605pt" style:font-weight-asian="100" style:font-name-complex="Montserrat" style:font-size-complex="16.7999992370605pt" style:font-weight-complex="100"/>
    </style:style>
    <style:style style:name="T40" style:family="text">
      <style:text-properties fo:color="#660066" loext:opacity="100%" style:font-name="SourceSansPro" fo:font-size="14.3999996185303pt" fo:font-weight="600" style:font-name-asian="SourceSansPro" style:font-size-asian="14.3999996185303pt" style:font-weight-asian="600" style:font-name-complex="SourceSansPro" style:font-size-complex="14.3999996185303pt" style:font-weight-complex="600"/>
    </style:style>
    <style:style style:name="T41" style:family="text">
      <style:text-properties fo:color="#800080" loext:opacity="100%" style:font-name="SourceSansPro" fo:font-size="10.3000001907349pt" fo:font-weight="normal" style:font-name-asian="SourceSansPro" style:font-size-asian="10.3000001907349pt" style:font-weight-asian="normal" style:font-name-complex="SourceSansPro" style:font-size-complex="10.3000001907349pt" style:font-weight-complex="normal"/>
    </style:style>
    <style:style style:name="T42" style:family="text">
      <style:text-properties fo:color="#ffffff" loext:opacity="100%" style:font-name="SourceSansPro" fo:font-size="14.3999996185303pt" fo:font-weight="600" style:font-name-asian="SourceSansPro" style:font-size-asian="14.3999996185303pt" style:font-weight-asian="600" style:font-name-complex="SourceSansPro" style:font-size-complex="14.3999996185303pt" style:font-weight-complex="600"/>
    </style:style>
    <style:style style:name="T43" style:family="text">
      <style:text-properties fo:color="#ffffff" loext:opacity="100%" style:font-name="SourceSansPro" fo:font-size="10.3000001907349pt" fo:font-weight="normal" style:font-name-asian="SourceSansPro" style:font-size-asian="10.3000001907349pt" style:font-weight-asian="normal" style:font-name-complex="SourceSansPro" style:font-size-complex="10.3000001907349pt" style:font-weight-complex="normal"/>
    </style:style>
    <style:style style:name="T44" style:family="text">
      <style:text-properties fo:color="#efbbff" loext:opacity="100%" style:font-name="SourceSansPro" fo:font-size="14.3999996185303pt" fo:font-weight="600" style:font-name-asian="SourceSansPro" style:font-size-asian="14.3999996185303pt" style:font-weight-asian="600" style:font-name-complex="SourceSansPro" style:font-size-complex="14.3999996185303pt" style:font-weight-complex="600"/>
    </style:style>
    <style:style style:name="T45" style:family="text">
      <style:text-properties fo:color="#efbbff" loext:opacity="100%" style:font-name="SourceSansPro" fo:font-size="10.3000001907349pt" fo:font-weight="normal" style:font-name-asian="SourceSansPro" style:font-size-asian="10.3000001907349pt" style:font-weight-asian="normal" style:font-name-complex="SourceSansPro" style:font-size-complex="10.3000001907349pt" style:font-weight-complex="normal"/>
    </style:style>
    <style:style style:name="T46" style:family="text">
      <style:text-properties fo:color="#660066" loext:opacity="100%" style:font-name="SourceSansPro" fo:font-size="12.3000001907349pt" fo:font-weight="600" style:font-name-asian="SourceSansPro" style:font-size-asian="12.3000001907349pt" style:font-weight-asian="600" style:font-name-complex="SourceSansPro" style:font-size-complex="12.3000001907349pt" style:font-weight-complex="600"/>
    </style:style>
    <style:style style:name="T47" style:family="text">
      <style:text-properties fo:color="#800080"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48" style:family="text">
      <style:text-properties fo:color="#660066"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49" style:family="text">
      <style:text-properties fo:color="#ffffff" loext:opacity="100%" style:font-name="SourceSansPro" fo:font-size="12.3000001907349pt" fo:font-weight="600" style:font-name-asian="SourceSansPro" style:font-size-asian="12.3000001907349pt" style:font-weight-asian="600" style:font-name-complex="SourceSansPro" style:font-size-complex="12.3000001907349pt" style:font-weight-complex="600"/>
    </style:style>
    <style:style style:name="T50" style:family="text">
      <style:text-properties fo:color="#ffffff"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51" style:family="text">
      <style:text-properties fo:color="#efbbff" loext:opacity="100%" style:font-name="SourceSansPro" fo:font-size="12.3000001907349pt" fo:font-weight="600" style:font-name-asian="SourceSansPro" style:font-size-asian="12.3000001907349pt" style:font-weight-asian="600" style:font-name-complex="SourceSansPro" style:font-size-complex="12.3000001907349pt" style:font-weight-complex="600"/>
    </style:style>
    <style:style style:name="T52" style:family="text">
      <style:text-properties fo:color="#efbbff"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53" style:family="text">
      <style:text-properties fo:color="#800080" loext:opacity="100%" style:font-name="SourceSansPro" fo:font-size="18pt" fo:font-weight="normal" style:font-name-asian="SourceSansPro" style:font-size-asian="18pt" style:font-weight-asian="normal" style:font-name-complex="SourceSansPro" style:font-size-complex="18pt" style:font-weight-complex="normal"/>
    </style:style>
    <style:style style:name="T54" style:family="text">
      <style:text-properties fo:color="#800080" loext:opacity="100%" style:font-name="SourceSansPro" fo:font-size="10.5pt" fo:font-weight="600" style:font-name-asian="SourceSansPro" style:font-size-asian="10.5pt" style:font-weight-asian="600" style:font-name-complex="SourceSansPro" style:font-size-complex="10.5pt" style:font-weight-complex="600"/>
    </style:style>
    <style:style style:name="T55" style:family="text">
      <style:text-properties fo:color="#080600" loext:opacity="100%" style:font-name="JetBrainsMono" fo:font-size="2.59999990463257pt" fo:font-weight="normal" style:font-name-asian="JetBrainsMono" style:font-size-asian="2.59999990463257pt" style:font-weight-asian="normal" style:font-name-complex="JetBrainsMono" style:font-size-complex="2.59999990463257pt" style:font-weight-complex="normal"/>
    </style:style>
    <style:style style:name="T56" style:family="text">
      <style:text-properties fo:color="#333333" loext:opacity="100%" style:font-name="JetBrainsMono" fo:font-size="2.59999990463257pt" fo:font-weight="normal" style:font-name-asian="JetBrainsMono" style:font-size-asian="2.59999990463257pt" style:font-weight-asian="normal" style:font-name-complex="JetBrainsMono" style:font-size-complex="2.59999990463257pt" style:font-weight-complex="normal"/>
    </style:style>
    <style:style style:name="T57" style:family="text">
      <style:text-properties fo:color="#000000" loext:opacity="100%" style:font-name="JetBrainsMono" fo:font-size="2.59999990463257pt" fo:font-weight="normal" style:font-name-asian="JetBrainsMono" style:font-size-asian="2.59999990463257pt" style:font-weight-asian="normal" style:font-name-complex="JetBrainsMono" style:font-size-complex="2.59999990463257pt" style:font-weight-complex="normal"/>
    </style:style>
    <style:style style:name="T58" style:family="text">
      <style:text-properties fo:color="#1a1a2e" loext:opacity="100%" style:font-name="JetBrainsMono" fo:font-size="11.6000003814697pt" fo:font-weight="normal" style:font-name-asian="JetBrainsMono" style:font-size-asian="11.6000003814697pt" style:font-weight-asian="normal" style:font-name-complex="JetBrainsMono" style:font-size-complex="11.6000003814697pt" style:font-weight-complex="normal"/>
    </style:style>
    <style:style style:name="T59" style:family="text">
      <style:text-properties fo:color="#be29ec" loext:opacity="100%" style:font-name="SourceSansPro-It" fo:font-size="11.5pt" fo:font-style="italic" fo:font-weight="normal" style:font-name-asian="SourceSansPro-It" style:font-size-asian="11.5pt" style:font-style-asian="italic" style:font-weight-asian="normal" style:font-name-complex="SourceSansPro-It" style:font-size-complex="11.5pt" style:font-style-complex="italic" style:font-weight-complex="normal"/>
    </style:style>
    <style:style style:name="T60" style:family="text">
      <style:text-properties fo:color="#cdd6f4" loext:opacity="100%" style:font-name="JetBrainsMono" fo:font-size="9.39999961853027pt" fo:font-weight="normal" style:font-name-asian="JetBrainsMono" style:font-size-asian="9.39999961853027pt" style:font-weight-asian="normal" style:font-name-complex="JetBrainsMono" style:font-size-complex="9.39999961853027pt" style:font-weight-complex="normal"/>
    </style:style>
    <style:style style:name="T61" style:family="text">
      <style:text-properties fo:color="#1a1a2e" loext:opacity="100%" style:font-name="JetBrainsMono" fo:font-size="9.80000019073486pt" fo:font-weight="normal" style:font-name-asian="JetBrainsMono" style:font-size-asian="9.80000019073486pt" style:font-weight-asian="normal" style:font-name-complex="JetBrainsMono" style:font-size-complex="9.80000019073486pt" style:font-weight-complex="normal"/>
    </style:style>
    <style:style style:name="T62" style:family="text">
      <style:text-properties fo:color="#888888"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63" style:family="text">
      <style:text-properties fo:color="#800080" loext:opacity="100%" style:font-name="SourceSansPro" fo:font-size="11.3000001907349pt" fo:font-weight="600" style:font-name-asian="SourceSansPro" style:font-size-asian="11.3000001907349pt" style:font-weight-asian="600" style:font-name-complex="SourceSansPro" style:font-size-complex="11.3000001907349pt" style:font-weight-complex="600"/>
    </style:style>
    <style:style style:name="T64" style:family="text">
      <style:text-properties fo:color="#e74c3c" loext:opacity="100%" style:font-name="SourceSansPro" fo:font-size="8.80000019073486pt" fo:font-weight="normal" style:font-name-asian="SourceSansPro" style:font-size-asian="8.80000019073486pt" style:font-weight-asian="normal" style:font-name-complex="SourceSansPro" style:font-size-complex="8.80000019073486pt" style:font-weight-complex="normal"/>
    </style:style>
    <style:style style:name="T65" style:family="text">
      <style:text-properties fo:color="#660066" loext:opacity="100%" style:font-name="SourceSansPro" fo:font-size="11.3000001907349pt" fo:font-weight="600" style:font-name-asian="SourceSansPro" style:font-size-asian="11.3000001907349pt" style:font-weight-asian="600" style:font-name-complex="SourceSansPro" style:font-size-complex="11.3000001907349pt" style:font-weight-complex="600"/>
    </style:style>
    <style:style style:name="T66" style:family="text">
      <style:text-properties fo:color="#888888" loext:opacity="100%" style:font-name="SourceSansPro" fo:font-size="8.80000019073486pt" fo:font-weight="normal" style:font-name-asian="SourceSansPro" style:font-size-asian="8.80000019073486pt" style:font-weight-asian="normal" style:font-name-complex="SourceSansPro" style:font-size-complex="8.80000019073486pt" style:font-weight-complex="normal"/>
    </style:style>
    <style:style style:name="T67" style:family="text">
      <style:text-properties fo:color="#cdd6f4" loext:opacity="100%" style:font-name="JetBrainsMono" fo:font-size="8.39999961853027pt" fo:font-weight="normal" style:font-name-asian="JetBrainsMono" style:font-size-asian="8.39999961853027pt" style:font-weight-asian="normal" style:font-name-complex="JetBrainsMono" style:font-size-complex="8.39999961853027pt" style:font-weight-complex="normal"/>
    </style:style>
    <style:style style:name="T68" style:family="text">
      <style:text-properties fo:color="#800080" loext:opacity="100%" style:font-name="Montserrat" fo:font-size="16.7999992370605pt" fo:font-weight="100" style:font-name-asian="Montserrat" style:font-size-asian="16.7999992370605pt" style:font-weight-asian="100" style:font-name-complex="Montserrat" style:font-size-complex="16.7999992370605pt" style:font-weight-complex="100"/>
    </style:style>
    <style:style style:name="T69" style:family="text">
      <style:text-properties fo:color="#ffffff" loext:opacity="100%" style:font-name="SourceSansPro" fo:font-size="9.39999961853027pt" fo:font-weight="600" style:font-name-asian="SourceSansPro" style:font-size-asian="9.39999961853027pt" style:font-weight-asian="600" style:font-name-complex="SourceSansPro" style:font-size-complex="9.39999961853027pt" style:font-weight-complex="600"/>
    </style:style>
    <style:style style:name="T70" style:family="text">
      <style:text-properties fo:color="#800080" loext:opacity="100%" style:font-name="SourceSansPro" fo:font-size="9.39999961853027pt" fo:font-weight="600" style:font-name-asian="SourceSansPro" style:font-size-asian="9.39999961853027pt" style:font-weight-asian="600" style:font-name-complex="SourceSansPro" style:font-size-complex="9.39999961853027pt" style:font-weight-complex="600"/>
    </style:style>
    <style:style style:name="T71" style:family="text">
      <style:text-properties fo:color="#1a1a2e" loext:opacity="100%" style:font-name="SourceSansPro" fo:font-size="9.39999961853027pt" fo:font-weight="normal" style:font-name-asian="SourceSansPro" style:font-size-asian="9.39999961853027pt" style:font-weight-asian="normal" style:font-name-complex="SourceSansPro" style:font-size-complex="9.39999961853027pt" style:font-weight-complex="normal"/>
    </style:style>
    <style:style style:name="T72" style:family="text">
      <style:text-properties fo:color="#cdd6f4" loext:opacity="100%" style:font-name="JetBrainsMono" fo:font-size="7.30000019073486pt" fo:font-weight="normal" style:font-name-asian="JetBrainsMono" style:font-size-asian="7.30000019073486pt" style:font-weight-asian="normal" style:font-name-complex="JetBrainsMono" style:font-size-complex="7.30000019073486pt" style:font-weight-complex="normal"/>
    </style:style>
    <style:style style:name="T73" style:family="text">
      <style:text-properties fo:color="#660066" loext:opacity="100%" style:font-name="SourceSansPro" fo:font-size="17.5pt" fo:font-weight="600" style:font-name-asian="SourceSansPro" style:font-size-asian="17.5pt" style:font-weight-asian="600" style:font-name-complex="SourceSansPro" style:font-size-complex="17.5pt" style:font-weight-complex="600"/>
    </style:style>
    <style:style style:name="T74" style:family="text">
      <style:text-properties fo:color="#800080" loext:opacity="100%" style:font-name="SourceSansPro" fo:font-size="12pt" fo:font-weight="normal" style:font-name-asian="SourceSansPro" style:font-size-asian="12pt" style:font-weight-asian="normal" style:font-name-complex="SourceSansPro" style:font-size-complex="12pt" style:font-weight-complex="normal"/>
    </style:style>
    <style:style style:name="T75" style:family="text">
      <style:text-properties fo:color="#660066" loext:opacity="100%" style:font-name="SourceSansPro" fo:font-size="15.3000001907349pt" fo:font-weight="600" style:font-name-asian="SourceSansPro" style:font-size-asian="15.3000001907349pt" style:font-weight-asian="600" style:font-name-complex="SourceSansPro" style:font-size-complex="15.3000001907349pt" style:font-weight-complex="600"/>
    </style:style>
    <style:style style:name="T76" style:family="text">
      <style:text-properties fo:color="#800080" loext:opacity="100%" style:font-name="SourceSansPro" fo:font-size="10.8999996185303pt" fo:font-weight="normal" style:font-name-asian="SourceSansPro" style:font-size-asian="10.8999996185303pt" style:font-weight-asian="normal" style:font-name-complex="SourceSansPro" style:font-size-complex="10.8999996185303pt" style:font-weight-complex="normal"/>
    </style:style>
    <style:style style:name="T77" style:family="text">
      <style:text-properties fo:color="#660066" loext:opacity="100%" style:font-name="SourceSansPro" fo:font-size="13.1000003814697pt" fo:font-weight="600" style:font-name-asian="SourceSansPro" style:font-size-asian="13.1000003814697pt" style:font-weight-asian="600" style:font-name-complex="SourceSansPro" style:font-size-complex="13.1000003814697pt" style:font-weight-complex="600"/>
    </style:style>
    <style:style style:name="T78" style:family="text">
      <style:text-properties fo:color="#800080" loext:opacity="100%" style:font-name="SourceSansPro" fo:font-size="9.80000019073486pt" fo:font-weight="normal" style:font-name-asian="SourceSansPro" style:font-size-asian="9.80000019073486pt" style:font-weight-asian="normal" style:font-name-complex="SourceSansPro" style:font-size-complex="9.80000019073486pt" style:font-weight-complex="normal"/>
    </style:style>
    <style:style style:name="T79" style:family="text">
      <style:text-properties fo:color="#660066" loext:opacity="100%" style:font-name="SourceSansPro" fo:font-size="10.8999996185303pt" fo:font-weight="600" style:font-name-asian="SourceSansPro" style:font-size-asian="10.8999996185303pt" style:font-weight-asian="600" style:font-name-complex="SourceSansPro" style:font-size-complex="10.8999996185303pt" style:font-weight-complex="600"/>
    </style:style>
    <style:style style:name="T80" style:family="text">
      <style:text-properties fo:color="#800080" loext:opacity="100%" style:font-name="SourceSansPro" fo:font-size="8.69999980926514pt" fo:font-weight="normal" style:font-name-asian="SourceSansPro" style:font-size-asian="8.69999980926514pt" style:font-weight-asian="normal" style:font-name-complex="SourceSansPro" style:font-size-complex="8.69999980926514pt" style:font-weight-complex="normal"/>
    </style:style>
    <style:style style:name="T81" style:family="text">
      <style:text-properties fo:color="#ffffff" loext:opacity="100%" style:font-name="SourceSansPro" fo:font-size="7.5pt" fo:font-weight="600" style:font-name-asian="SourceSansPro" style:font-size-asian="7.5pt" style:font-weight-asian="600" style:font-name-complex="SourceSansPro" style:font-size-complex="7.5pt" style:font-weight-complex="600"/>
    </style:style>
    <style:style style:name="T82" style:family="text">
      <style:text-properties fo:color="#ffffff" loext:opacity="100%" style:font-name="SourceSansPro" fo:font-size="42pt" fo:font-weight="normal" style:font-name-asian="SourceSansPro" style:font-size-asian="42pt" style:font-weight-asian="normal" style:font-name-complex="SourceSansPro" style:font-size-complex="42pt" style:font-weight-complex="normal"/>
    </style:style>
    <style:style style:name="T83" style:family="text">
      <style:text-properties fo:color="#ffffff" loext:opacity="100%" style:font-name="SourceSansPro" fo:font-size="11.5pt" fo:font-weight="600" style:font-name-asian="SourceSansPro" style:font-size-asian="11.5pt" style:font-weight-asian="600" style:font-name-complex="SourceSansPro" style:font-size-complex="11.5pt" style:font-weight-complex="600"/>
    </style:style>
    <style:style style:name="T84" style:family="text">
      <style:text-properties fo:color="#1a1a2e" loext:opacity="100%" style:font-name="SourceSansPro" fo:font-size="21pt" fo:font-weight="normal" style:font-name-asian="SourceSansPro" style:font-size-asian="21pt" style:font-weight-asian="normal" style:font-name-complex="SourceSansPro" style:font-size-complex="21pt" style:font-weight-complex="normal"/>
    </style:style>
    <style:style style:name="T85" style:family="text">
      <style:text-properties fo:color="#800080" loext:opacity="100%" style:font-name="SourceSansPro" fo:font-size="21pt" fo:font-weight="600" style:font-name-asian="SourceSansPro" style:font-size-asian="21pt" style:font-weight-asian="600" style:font-name-complex="SourceSansPro" style:font-size-complex="21pt" style:font-weight-complex="600"/>
    </style:style>
    <style:style style:name="T86" style:family="text">
      <style:text-properties fo:color="#1a1a2e" loext:opacity="100%" style:font-name="SourceSansPro" fo:font-size="11.6000003814697pt" fo:font-weight="normal" style:font-name-asian="SourceSansPro" style:font-size-asian="11.6000003814697pt" style:font-weight-asian="normal" style:font-name-complex="SourceSansPro" style:font-size-complex="11.6000003814697pt" style:font-weight-complex="normal"/>
    </style:style>
    <style:style style:name="T87" style:family="text">
      <style:text-properties fo:color="#1a1a2e" loext:opacity="100%" style:font-name="SourceSansPro" fo:font-size="17.8999996185303pt" fo:font-weight="normal" style:font-name-asian="SourceSansPro" style:font-size-asian="17.8999996185303pt" style:font-weight-asian="normal" style:font-name-complex="SourceSansPro" style:font-size-complex="17.8999996185303pt" style:font-weight-complex="normal"/>
    </style:style>
    <style:style style:name="T88" style:family="text">
      <style:text-properties fo:color="#ffffff" loext:opacity="100%" style:font-name="Montserrat" fo:font-size="37.7999992370606pt" fo:font-weight="100" style:font-name-asian="Montserrat" style:font-size-asian="37.7999992370606pt" style:font-weight-asian="100" style:font-name-complex="Montserrat" style:font-size-complex="37.7999992370606pt" style:font-weight-complex="100"/>
    </style:style>
    <style:style style:name="T89" style:family="text">
      <style:text-properties fo:color="#be29ec" loext:opacity="100%" style:font-name="SourceSansPro-It" fo:font-size="21pt" fo:font-style="italic" fo:font-weight="normal" style:font-name-asian="SourceSansPro-It" style:font-size-asian="21pt" style:font-style-asian="italic" style:font-weight-asian="normal" style:font-name-complex="SourceSansPro-It" style:font-size-complex="21pt" style:font-style-complex="italic" style:font-weight-complex="normal"/>
    </style:style>
    <style:style style:name="T90" style:family="text">
      <style:text-properties fo:color="#ffffff" loext:opacity="100%" style:font-name="SourceSansPro" fo:font-size="23.1000003814697pt" fo:font-weight="normal" style:font-name-asian="SourceSansPro" style:font-size-asian="23.1000003814697pt" style:font-weight-asian="normal" style:font-name-complex="SourceSansPro" style:font-size-complex="23.100000381469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6.405cm" svg:height="19.235cm" svg:x="0cm" svg:y="0cm" svg:viewBox="0 0 26406 19236" draw:points="0,0 26406,0 26406,19236 0,19236">
          <text:p/>
        </draw:polygon>
        <draw:path draw:style-name="gr2" draw:text-style-name="P2" draw:layer="layout" svg:width="5.292cm" svg:height="0.08cm" svg:x="10.556cm" svg:y="12.17cm" svg:viewBox="0 0 5293 81" svg:d="M0 41c0-6 1-11 3-16s5-9 9-13 8-7 13-9 10-3 15-3h5213c6 0 11 1 16 3 4 2 9 5 12 9 4 4 7 8 9 13s3 10 3 16c0 5-1 10-3 15s-5 9-9 13c-3 4-8 7-12 9-5 2-10 3-16 3h-5213c-5 0-10-1-15-3s-9-5-13-9-7-8-9-13-3-10-3-15z">
          <text:p/>
        </draw:path>
        <draw:frame draw:style-name="gr3" draw:text-style-name="P4" draw:layer="layout" svg:width="7.609cm" svg:height="2.321cm" svg:x="9.49cm" svg:y="5.663cm">
          <draw:text-box>
            <text:p text:style-name="P3"><text:span text:style-name="T1">CORGE</text:span></text:p>
          </draw:text-box>
        </draw:frame>
        <draw:frame draw:style-name="gr4" draw:text-style-name="P5" draw:layer="layout" svg:width="10.473cm" svg:height="0.996cm" svg:x="7.623cm" svg:y="8.615cm">
          <draw:text-box>
            <text:p text:style-name="P3"><text:span text:style-name="T2">SPECIFICATION-DRIVEN</text:span></text:p>
          </draw:text-box>
        </draw:frame>
        <draw:frame draw:style-name="gr4" draw:text-style-name="P5" draw:layer="layout" svg:width="10.919cm" svg:height="0.996cm" svg:x="7.402cm" svg:y="9.673cm">
          <draw:text-box>
            <text:p text:style-name="P3"><text:span text:style-name="T2">AGENTIC DEVELOPMENT</text:span></text:p>
          </draw:text-box>
        </draw:frame>
        <draw:frame draw:style-name="gr5" draw:text-style-name="P6" draw:layer="layout" svg:width="9.117cm" svg:height="0.496cm" svg:x="9.127cm" svg:y="11.054cm">
          <draw:text-box>
            <text:p text:style-name="P3"><text:span text:style-name="T3">Human-Led</text:span><text:span text:style-name="T4"> · </text:span><text:span text:style-name="T3">Machine-Assisted</text:span><text:span text:style-name="T4"> Engineering</text:span></text:p>
          </draw:text-box>
        </draw:frame>
        <draw:polygon draw:style-name="gr6" draw:text-style-name="P7" draw:layer="layout" svg:width="0.476cm" svg:height="0.635cm" svg:x="25.717cm" svg:y="18.388cm" svg:viewBox="0 0 477 636" draw:points="0,0 477,0 477,636 0,636">
          <text:p/>
        </draw:polygon>
        <draw:frame draw:style-name="gr7" draw:text-style-name="P8" draw:layer="layout" svg:width="4.588cm" svg:height="0.412cm" svg:x="11.062cm" svg:y="12.709cm">
          <draw:text-box>
            <text:p text:style-name="P3"><text:span text:style-name="T5">Product Presentation · 2026</text:span></text:p>
          </draw:text-box>
        </draw:frame>
        <draw:frame draw:style-name="gr7" draw:text-style-name="P8" draw:layer="layout" svg:width="0.369cm" svg:height="0.412cm" svg:x="25.839cm" svg:y="18.503cm">
          <draw:text-box>
            <text:p text:style-name="P3"><text:span text:style-name="T6">1</text:span></text:p>
          </draw:text-box>
        </draw:frame>
      </draw:page>
      <draw:page draw:name="page2"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8.176cm" svg:height="1.905cm" svg:x="0.502cm" svg:y="8.149cm" svg:viewBox="0 0 8177 1906" svg:d="M31 31c21-21 46-31 75-31h7965c29 0 54 10 75 31 20 20 31 45 31 74v1695c0 29-11 54-31 75-21 20-46 31-75 31h-7965c-29 0-54-11-75-31-20-21-31-46-31-75v-1695c0-29 11-54 31-74z">
          <text:p/>
        </draw:path>
        <draw:polygon draw:style-name="gr2" draw:text-style-name="P2" draw:layer="layout" svg:width="8.176cm" svg:height="0.066cm" svg:x="0.502cm" svg:y="8.149cm" svg:viewBox="0 0 8177 67" draw:points="8113,67 0,67 0,0 8177,0 8177,3">
          <text:p/>
        </draw:polygon>
        <draw:path draw:style-name="gr2" draw:text-style-name="P2" draw:layer="layout" svg:width="8.098cm" svg:height="0.051cm" svg:x="0.55cm" svg:y="10.003cm" svg:viewBox="0 0 8099 52" svg:d="M48 18c3 5 6 7 10 7h7965c22 0 41-9 56-24 1 0 1-1 1-1l19 18c0 2-1 2-1 3-21 20-46 31-75 31h-7965c-22 0-41-6-58-17z">
          <text:p/>
        </draw:path>
        <draw:path draw:style-name="gr2" draw:text-style-name="P2" draw:layer="layout" svg:width="0.05cm" svg:height="1.843cm" svg:x="8.628cm" svg:y="8.18cm" svg:viewBox="0 0 51 1844" svg:d="M0 1825c16-16 24-34 24-56v-1695c0-21-8-40-24-56l19-18c21 20 32 45 32 74v1695c0 29-11 54-32 75z">
          <text:p/>
        </draw:path>
        <draw:polygon draw:style-name="gr2" draw:text-style-name="P2" draw:layer="layout" svg:width="8.176cm" svg:height="1.905cm" svg:x="0.502cm" svg:y="8.149cm" svg:viewBox="0 0 8177 1906" draw:points="0,0 8177,0 8177,1906 0,1906">
          <text:p/>
        </draw:polygon>
        <draw:frame draw:style-name="gr9" draw:text-style-name="P10" draw:layer="layout" svg:width="2.777cm" svg:height="1.119cm" svg:x="11.697cm" svg:y="6.477cm">
          <draw:text-box>
            <text:p text:style-name="P3"><text:span text:style-name="T7">TEAM</text:span></text:p>
          </draw:text-box>
        </draw:frame>
        <draw:path draw:style-name="gr8" draw:text-style-name="P9" draw:layer="layout" svg:width="8.149cm" svg:height="1.905cm" svg:x="9.128cm" svg:y="8.149cm" svg:viewBox="0 0 8150 1906" svg:d="M31 31c20-21 45-31 74-31h7939c29 0 54 10 75 31 20 20 31 45 31 74v1695c0 29-11 54-31 75-21 20-46 31-75 31h-7939c-29 0-54-11-74-31-21-21-31-46-31-75v-1695c0-29 10-54 31-74z">
          <text:p/>
        </draw:path>
        <draw:polygon draw:style-name="gr2" draw:text-style-name="P2" draw:layer="layout" svg:width="8.149cm" svg:height="0.066cm" svg:x="9.128cm" svg:y="8.149cm" svg:viewBox="0 0 8150 67" draw:points="8086,67 0,67 0,0 8150,0 8150,3">
          <text:p/>
        </draw:polygon>
        <draw:path draw:style-name="gr2" draw:text-style-name="P2" draw:layer="layout" svg:width="8.071cm" svg:height="0.051cm" svg:x="9.176cm" svg:y="10.003cm" svg:viewBox="0 0 8072 52" svg:d="M47 18c3 5 7 7 10 7h7939c22 0 41-9 56-24 1 0 1-1 1-1l19 18c0 2-1 2-1 3-21 20-46 31-75 31h-7939c-21 0-40-6-57-17z">
          <text:p/>
        </draw:path>
        <draw:path draw:style-name="gr2" draw:text-style-name="P2" draw:layer="layout" svg:width="0.05cm" svg:height="1.843cm" svg:x="17.227cm" svg:y="8.18cm" svg:viewBox="0 0 51 1844" svg:d="M0 1825c16-16 23-34 23-56v-1695c0-21-7-40-23-56l19-18c20 20 32 45 32 74v1695c0 29-12 54-32 75z">
          <text:p/>
        </draw:path>
        <draw:polygon draw:style-name="gr10" draw:text-style-name="P11" draw:layer="layout" svg:width="8.149cm" svg:height="1.905cm" svg:x="9.128cm" svg:y="8.149cm" svg:viewBox="0 0 8150 1906" draw:points="0,0 8150,0 8150,1906 0,1906">
          <text:p/>
        </draw:polygon>
        <draw:frame draw:style-name="gr11" draw:text-style-name="P12" draw:layer="layout" svg:width="3.36cm" svg:height="0.624cm" svg:x="3.107cm" svg:y="8.784cm">
          <draw:text-box>
            <text:p text:style-name="P3"><text:span text:style-name="T8">Ahmad Fathi</text:span></text:p>
          </draw:text-box>
        </draw:frame>
        <draw:path draw:style-name="gr8" draw:text-style-name="P9" draw:layer="layout" svg:width="8.175cm" svg:height="1.905cm" svg:x="17.727cm" svg:y="8.149cm" svg:viewBox="0 0 8176 1906" svg:d="M31 31c20-21 45-31 74-31h7965c30 0 55 10 75 31 21 20 31 45 31 74v1695c0 29-10 54-31 75-20 20-45 31-75 31h-7965c-29 0-54-11-74-31-21-21-31-46-31-75v-1695c0-29 10-54 31-74z">
          <text:p/>
        </draw:path>
        <draw:polygon draw:style-name="gr2" draw:text-style-name="P2" draw:layer="layout" svg:width="8.175cm" svg:height="0.066cm" svg:x="17.727cm" svg:y="8.149cm" svg:viewBox="0 0 8176 67" draw:points="8113,67 0,67 0,0 8176,0 8176,3">
          <text:p/>
        </draw:polygon>
        <draw:path draw:style-name="gr2" draw:text-style-name="P2" draw:layer="layout" svg:width="8.098cm" svg:height="0.051cm" svg:x="17.775cm" svg:y="10.003cm" svg:viewBox="0 0 8099 52" svg:d="M47 18c3 5 7 7 10 7h7965c22 0 41-9 57-24 0 0 0-1 1-1l19 18c-1 2-1 2-2 3-20 20-45 31-75 31h-7965c-21 0-40-6-57-17z">
          <text:p/>
        </draw:path>
        <draw:polygon draw:style-name="gr2" draw:text-style-name="P2" draw:layer="layout" svg:width="8.175cm" svg:height="1.905cm" svg:x="17.727cm" svg:y="8.149cm" svg:viewBox="0 0 8176 1906" draw:points="0,0 8176,0 8176,1906 0,1906">
          <text:p/>
        </draw:polygon>
        <draw:path draw:style-name="gr2" draw:text-style-name="P2" draw:layer="layout" svg:width="0.096cm" svg:height="1.872cm" svg:x="17.727cm" svg:y="8.165cm" svg:viewBox="0 0 97 1873" svg:d="M97 16c-4 4-7 9-9 17-6 16-9 35-9 56v1695c0 22 3 40 9 56 2 8 5 14 9 18l-48 15c-7-4-13-9-18-14-21-21-31-46-31-75v-1695c0-29 10-54 31-74 5-6 11-11 18-15z">
          <text:p/>
        </draw:path>
        <draw:frame draw:style-name="gr11" draw:text-style-name="P12" draw:layer="layout" svg:width="3.237cm" svg:height="0.624cm" svg:x="11.769cm" svg:y="8.784cm">
          <draw:text-box>
            <text:p text:style-name="P3"><text:span text:style-name="T8">Ahmad Hani</text:span></text:p>
          </draw:text-box>
        </draw:frame>
        <draw:path draw:style-name="gr8" draw:text-style-name="P9" draw:layer="layout" svg:width="8.679cm" svg:height="1.905cm" svg:x="4.312cm" svg:y="10.715cm" svg:viewBox="0 0 8680 1906" svg:d="M32 31c21-21 46-31 75-31h8467c29 0 54 10 75 31 20 21 31 46 31 75v1694c0 30-11 54-31 75-21 21-46 31-75 31h-8467c-29 0-54-10-75-31s-32-45-32-75v-1694c0-29 11-54 32-75z">
          <text:p/>
        </draw:path>
        <draw:path draw:style-name="gr2" draw:text-style-name="P2" draw:layer="layout" svg:width="8.601cm" svg:height="0.051cm" svg:x="4.36cm" svg:y="10.715cm" svg:viewBox="0 0 8602 52" svg:d="M8583 52l-1-1c-16-16-34-23-57-23h-8467c-4 0-7 2-10 6l-48-17c17-11 36-17 58-17h8467c30 0 55 10 76 32 0 1 0 1 1 1z">
          <text:p/>
        </draw:path>
        <draw:path draw:style-name="gr2" draw:text-style-name="P2" draw:layer="layout" svg:width="8.601cm" svg:height="0.051cm" svg:x="4.36cm" svg:y="12.569cm" svg:viewBox="0 0 8602 52" svg:d="M48 19c3 5 6 7 10 7h8467c23 0 41-8 57-25 0 0 1 0 1-1l19 20c-1 0-1 1-1 1-21 21-46 31-76 31h-8467c-22 0-41-6-58-17z">
          <text:p/>
        </draw:path>
        <draw:path draw:style-name="gr2" draw:text-style-name="P2" draw:layer="layout" svg:width="0.05cm" svg:height="1.843cm" svg:x="12.941cm" svg:y="10.746cm" svg:viewBox="0 0 51 1844" svg:d="M0 1825c15-15 24-34 24-56v-1694c0-22-9-41-24-56l19-19c21 21 32 46 32 75v1694c0 30-11 54-32 75z">
          <text:p/>
        </draw:path>
        <draw:polygon draw:style-name="gr10" draw:text-style-name="P11" draw:layer="layout" svg:width="8.679cm" svg:height="1.905cm" svg:x="4.312cm" svg:y="10.715cm" svg:viewBox="0 0 8680 1906" draw:points="0,0 8680,0 8680,1906 0,1906">
          <text:p/>
        </draw:polygon>
        <draw:frame draw:style-name="gr11" draw:text-style-name="P12" draw:layer="layout" svg:width="4.409cm" svg:height="0.624cm" svg:x="19.805cm" svg:y="8.784cm">
          <draw:text-box>
            <text:p text:style-name="P3"><text:span text:style-name="T8">Hala Muhammad</text:span></text:p>
          </draw:text-box>
        </draw:frame>
        <draw:path draw:style-name="gr8" draw:text-style-name="P9" draw:layer="layout" svg:width="8.678cm" svg:height="1.905cm" svg:x="13.414cm" svg:y="10.715cm" svg:viewBox="0 0 8679 1906" svg:d="M31 31c21-21 45-31 75-31h8467c30 0 55 10 75 31 21 21 31 46 31 75v1694c0 30-10 54-31 75-20 21-45 31-75 31h-8467c-30 0-54-10-75-31s-31-45-31-75v-1694c0-29 10-54 31-75z">
          <text:p/>
        </draw:path>
        <draw:path draw:style-name="gr2" draw:text-style-name="P2" draw:layer="layout" svg:width="8.601cm" svg:height="0.051cm" svg:x="13.462cm" svg:y="10.715cm" svg:viewBox="0 0 8602 52" svg:d="M8583 52c-1 0-1-1-2-1-15-16-34-23-56-23h-8467c-4 0-8 2-11 6l-47-17c17-11 36-17 58-17h8467c30 0 55 10 75 32 1 1 1 1 2 1z">
          <text:p/>
        </draw:path>
        <draw:path draw:style-name="gr2" draw:text-style-name="P2" draw:layer="layout" svg:width="8.601cm" svg:height="0.051cm" svg:x="13.462cm" svg:y="12.569cm" svg:viewBox="0 0 8602 52" svg:d="M47 19c3 5 7 7 11 7h8467c22 0 41-8 56-25 1 0 1 0 2-1l19 20c-1 0-1 1-2 1-20 21-45 31-75 31h-8467c-22 0-41-6-58-17z">
          <text:p/>
        </draw:path>
        <draw:path draw:style-name="gr2" draw:text-style-name="P2" draw:layer="layout" svg:width="0.049cm" svg:height="1.843cm" svg:x="22.043cm" svg:y="10.746cm" svg:viewBox="0 0 50 1844" svg:d="M0 1825c15-15 23-34 23-56v-1694c0-22-8-41-23-56l18-19c22 21 32 46 32 75v1694c0 30-10 54-32 75z">
          <text:p/>
        </draw:path>
        <draw:polygon draw:style-name="gr2" draw:text-style-name="P2" draw:layer="layout" svg:width="8.678cm" svg:height="1.905cm" svg:x="13.414cm" svg:y="10.715cm" svg:viewBox="0 0 8679 1906" draw:points="0,0 8679,0 8679,1906 0,1906">
          <text:p/>
        </draw:polygon>
        <draw:frame draw:style-name="gr11" draw:text-style-name="P12" draw:layer="layout" svg:width="4.593cm" svg:height="0.624cm" svg:x="6.552cm" svg:y="11.377cm">
          <draw:text-box>
            <text:p text:style-name="P3"><text:span text:style-name="T8">Muhammad Nabil</text:span></text:p>
          </draw:text-box>
        </draw:frame>
        <draw:polygon draw:style-name="gr6" draw:text-style-name="P7" draw:layer="layout" svg:width="0.476cm" svg:height="0.635cm" svg:x="25.717cm" svg:y="18.388cm" svg:viewBox="0 0 477 636" draw:points="0,0 477,0 477,636 0,636">
          <text:p/>
        </draw:polygon>
        <draw:frame draw:style-name="gr11" draw:text-style-name="P12" draw:layer="layout" svg:width="5.025cm" svg:height="0.624cm" svg:x="15.481cm" svg:y="11.377cm">
          <draw:text-box>
            <text:p text:style-name="P3"><text:span text:style-name="T8">Radwa Muhammad</text:span></text:p>
          </draw:text-box>
        </draw:frame>
        <draw:frame draw:style-name="gr7" draw:text-style-name="P8" draw:layer="layout" svg:width="0.369cm" svg:height="0.412cm" svg:x="25.839cm" svg:y="18.503cm">
          <draw:text-box>
            <text:p text:style-name="P3"><text:span text:style-name="T6">2</text:span></text:p>
          </draw:text-box>
        </draw:frame>
      </draw:page>
      <draw:page draw:name="page3"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3.149cm" svg:height="0.82cm" svg:x="2.698cm" svg:y="9.472cm" svg:viewBox="0 0 3150 821" svg:d="M31 31c21-21 46-31 75-31h2938c29 0 54 10 75 31 20 20 31 45 31 74v609c0 29-11 54-31 76-21 20-46 31-75 31h-2938c-29 0-54-11-75-31-20-22-31-47-31-76v-609c0-29 11-54 31-74z">
          <text:p/>
        </draw:path>
        <draw:path draw:style-name="gr12" draw:text-style-name="P13" draw:layer="layout" svg:width="3.149cm" svg:height="0.82cm" svg:x="2.698cm" svg:y="9.472cm" svg:viewBox="0 0 3150 821" svg:d="M0 714v-609c0-29 11-54 31-74 21-21 46-31 75-31h2938c29 0 54 10 75 31 20 20 31 45 31 74v609c0 29-11 54-31 76-21 20-46 31-75 31h-2938c-29 0-54-11-75-31-20-22-31-47-31-76zM27 105v609c0 10 2 21 6 30 4 10 10 19 17 26 7 9 16 14 26 18 9 4 20 6 30 6h2938c10 0 21-2 30-6 10-4 19-9 26-18 8-7 13-16 17-26 4-9 6-20 6-30v-609c0-10-2-20-6-30s-9-18-17-26c-7-7-16-13-26-17-9-4-20-6-30-6h-2938c-10 0-21 2-30 6-10 4-19 10-26 17-7 8-13 16-17 26s-6 20-6 30z">
          <text:p/>
        </draw:path>
        <draw:frame draw:style-name="gr9" draw:text-style-name="P10" draw:layer="layout" svg:width="4.221cm" svg:height="1.119cm" svg:x="10.908cm" svg:y="7.932cm">
          <draw:text-box>
            <text:p text:style-name="P3"><text:span text:style-name="T7">AGENDA</text:span></text:p>
          </draw:text-box>
        </draw:frame>
        <draw:path draw:style-name="gr8" draw:text-style-name="P9" draw:layer="layout" svg:width="4.101cm" svg:height="0.82cm" svg:x="6.111cm" svg:y="9.472cm" svg:viewBox="0 0 4102 821" svg:d="M31 31c22-21 47-31 76-31h3890c29 0 54 10 74 31 21 20 31 45 31 74v609c0 29-10 54-31 76-20 20-45 31-74 31h-3890c-29 0-54-11-76-31-20-22-31-47-31-76v-609c0-29 11-54 31-74z">
          <text:p/>
        </draw:path>
        <draw:path draw:style-name="gr12" draw:text-style-name="P13" draw:layer="layout" svg:width="4.101cm" svg:height="0.82cm" svg:x="6.111cm" svg:y="9.472cm" svg:viewBox="0 0 4102 821" svg:d="M0 714v-609c0-29 11-54 31-74 22-21 47-31 76-31h3890c29 0 54 10 74 31 21 20 31 45 31 74v609c0 29-10 54-31 76-20 20-45 31-74 31h-3890c-29 0-54-11-76-31-20-22-31-47-31-76zM27 105v609c0 10 2 21 6 30 4 10 11 19 18 26 8 9 16 14 26 18s20 6 30 6h3890c10 0 20-2 30-6s18-9 26-18c7-7 13-16 17-26 4-9 6-20 6-30v-609c0-10-2-20-6-30s-10-18-17-26c-8-7-16-13-26-17s-20-6-30-6h-3890c-10 0-20 2-30 6s-18 10-26 17c-7 8-14 16-18 26s-6 20-6 30z">
          <text:p/>
        </draw:path>
        <draw:frame draw:style-name="gr13" draw:text-style-name="P14" draw:layer="layout" svg:width="2.893cm" svg:height="0.454cm" svg:x="2.925cm" svg:y="9.632cm">
          <draw:text-box>
            <text:p text:style-name="P3"><text:span text:style-name="T9">01</text:span><text:span text:style-name="T10"> The Problem</text:span></text:p>
          </draw:text-box>
        </draw:frame>
        <draw:path draw:style-name="gr8" draw:text-style-name="P9" draw:layer="layout" svg:width="4.736cm" svg:height="0.82cm" svg:x="10.477cm" svg:y="9.472cm" svg:viewBox="0 0 4737 821" svg:d="M31 31c21-21 46-31 75-31h4525c29 0 54 10 75 31 21 20 31 45 31 74v609c0 29-10 54-31 76-21 20-46 31-75 31h-4525c-29 0-54-11-75-31-21-22-31-47-31-76v-609c0-29 10-54 31-74z">
          <text:p/>
        </draw:path>
        <draw:path draw:style-name="gr12" draw:text-style-name="P13" draw:layer="layout" svg:width="4.736cm" svg:height="0.82cm" svg:x="10.477cm" svg:y="9.472cm" svg:viewBox="0 0 4737 821" svg:d="M0 714v-609c0-29 10-54 31-74 21-21 46-31 75-31h4525c29 0 54 10 75 31 21 20 31 45 31 74v609c0 29-10 54-31 76-21 20-46 31-75 31h-4525c-29 0-54-11-75-31-21-22-31-47-31-76zM26 105v609c0 10 2 21 6 30 5 10 10 19 18 26 7 9 16 14 25 18 10 4 20 6 31 6h4525c11 0 21-2 31-6 9-4 18-9 25-18 8-7 14-16 18-26 4-9 6-20 6-30v-609c0-10-2-20-6-30s-10-18-18-26c-7-7-16-13-25-17-10-4-20-6-31-6h-4525c-11 0-21 2-31 6-9 4-18 10-25 17-8 8-13 16-18 26-4 10-6 20-6 30z">
          <text:p/>
        </draw:path>
        <draw:frame draw:style-name="gr13" draw:text-style-name="P14" draw:layer="layout" svg:width="4.068cm" svg:height="0.454cm" svg:x="6.329cm" svg:y="9.632cm">
          <draw:text-box>
            <text:p text:style-name="P3"><text:span text:style-name="T9">02</text:span><text:span text:style-name="T10"> The Answer: Corge</text:span></text:p>
          </draw:text-box>
        </draw:frame>
        <draw:path draw:style-name="gr8" draw:text-style-name="P9" draw:layer="layout" svg:width="5.344cm" svg:height="0.82cm" svg:x="15.478cm" svg:y="9.472cm" svg:viewBox="0 0 5345 821" svg:d="M31 31c20-21 45-31 74-31h5134c30 0 55 10 75 31 21 20 31 45 31 74v609c0 29-10 54-31 76-20 20-45 31-75 31h-5134c-29 0-54-11-74-31-21-22-31-47-31-76v-609c0-29 10-54 31-74z">
          <text:p/>
        </draw:path>
        <draw:path draw:style-name="gr12" draw:text-style-name="P13" draw:layer="layout" svg:width="5.344cm" svg:height="0.82cm" svg:x="15.478cm" svg:y="9.472cm" svg:viewBox="0 0 5345 821" svg:d="M0 714v-609c0-29 10-54 31-74 20-21 45-31 74-31h5134c30 0 55 10 75 31 21 20 31 45 31 74v609c0 29-10 54-31 76-20 20-45 31-75 31h-5134c-29 0-54-11-74-31-21-22-31-47-31-76zM26 105v609c0 10 2 21 6 30 4 10 10 19 17 26 8 9 16 14 26 18s20 6 30 6h5134c11 0 21-2 31-6 9-4 18-9 26-18 7-7 13-16 17-26 4-9 6-20 6-30v-609c0-10-2-20-6-30s-10-18-17-26c-8-7-17-13-26-17-10-4-20-6-31-6h-5134c-10 0-20 2-30 6s-18 10-26 17c-7 8-13 16-17 26s-6 20-6 30z">
          <text:p/>
        </draw:path>
        <draw:frame draw:style-name="gr13" draw:text-style-name="P14" draw:layer="layout" svg:width="4.587cm" svg:height="0.454cm" svg:x="10.695cm" svg:y="9.632cm">
          <draw:text-box>
            <text:p text:style-name="P3"><text:span text:style-name="T9">03</text:span><text:span text:style-name="T10"> Technical Architecture</text:span></text:p>
          </draw:text-box>
        </draw:frame>
        <draw:path draw:style-name="gr8" draw:text-style-name="P9" draw:layer="layout" svg:width="2.619cm" svg:height="0.82cm" svg:x="21.087cm" svg:y="9.472cm" svg:viewBox="0 0 2620 821" svg:d="M31 31c20-21 45-31 75-31h2408c30 0 55 10 75 31 21 20 31 45 31 74v609c0 29-10 54-31 76-20 20-45 31-75 31h-2408c-30 0-55-11-75-31-21-22-31-47-31-76v-609c0-29 10-54 31-74z">
          <text:p/>
        </draw:path>
        <draw:path draw:style-name="gr12" draw:text-style-name="P13" draw:layer="layout" svg:width="2.619cm" svg:height="0.82cm" svg:x="21.087cm" svg:y="9.472cm" svg:viewBox="0 0 2620 821" svg:d="M0 714v-609c0-29 10-54 31-74 20-21 45-31 75-31h2408c30 0 55 10 75 31 21 20 31 45 31 74v609c0 29-10 54-31 76-20 20-45 31-75 31h-2408c-30 0-55-11-75-31-21-22-31-47-31-76zM26 105v609c0 10 2 21 6 30 4 10 10 19 17 26 8 9 17 14 26 18 10 4 20 6 31 6h2408c11 0 21-2 31-6 9-4 18-9 25-18 8-7 14-16 18-26 4-9 6-20 6-30v-609c0-10-2-20-6-30s-10-18-18-26c-7-7-16-13-25-17-10-4-20-6-31-6h-2408c-11 0-21 2-31 6-9 4-18 10-26 17-7 8-13 16-17 26s-6 20-6 30z">
          <text:p/>
        </draw:path>
        <draw:frame draw:style-name="gr13" draw:text-style-name="P14" draw:layer="layout" svg:width="5.424cm" svg:height="0.454cm" svg:x="15.696cm" svg:y="9.632cm">
          <draw:text-box>
            <text:p text:style-name="P3"><text:span text:style-name="T9">04</text:span><text:span text:style-name="T10"> Layer &amp; Module Deep Dive</text:span></text:p>
          </draw:text-box>
        </draw:frame>
        <draw:path draw:style-name="gr8" draw:text-style-name="P9" draw:layer="layout" svg:width="5.106cm" svg:height="0.821cm" svg:x="8.625cm" svg:y="10.556cm" svg:viewBox="0 0 5107 822" svg:d="M31 31c21-20 46-31 75-31h4896c29 0 54 11 74 31 21 21 31 46 31 75v610c0 29-10 54-31 75-20 20-45 31-74 31h-4896c-29 0-54-11-75-31-21-21-31-46-31-75v-610c0-29 10-54 31-75z">
          <text:p/>
        </draw:path>
        <draw:path draw:style-name="gr12" draw:text-style-name="P13" draw:layer="layout" svg:width="5.106cm" svg:height="0.821cm" svg:x="8.625cm" svg:y="10.556cm" svg:viewBox="0 0 5107 822" svg:d="M0 716v-610c0-29 10-54 31-75 21-20 46-31 75-31h4896c29 0 54 11 74 31 21 21 31 46 31 75v610c0 29-10 54-31 75-20 20-45 31-74 31h-4896c-29 0-54-11-75-31-21-21-31-46-31-75zM26 106v610c0 10 2 20 6 30s10 18 18 26c7 7 16 13 25 17 10 4 20 6 31 6h4896c10 0 20-2 30-6s18-10 26-17c7-8 13-16 17-26s6-20 6-30v-610c0-10-2-20-6-30s-10-18-17-26c-8-7-16-13-26-17s-20-6-30-6h-4896c-11 0-21 2-31 6-9 4-18 10-25 17-8 8-14 16-18 26s-6 20-6 30z">
          <text:p/>
        </draw:path>
        <draw:frame draw:style-name="gr13" draw:text-style-name="P14" draw:layer="layout" svg:width="2.306cm" svg:height="0.454cm" svg:x="21.319cm" svg:y="9.632cm">
          <draw:text-box>
            <text:p text:style-name="P3"><text:span text:style-name="T9">05</text:span><text:span text:style-name="T10"> Summary</text:span></text:p>
          </draw:text-box>
        </draw:frame>
        <draw:path draw:style-name="gr8" draw:text-style-name="P9" draw:layer="layout" svg:width="3.783cm" svg:height="0.821cm" svg:x="13.996cm" svg:y="10.556cm" svg:viewBox="0 0 3784 822" svg:d="M31 31c21-20 46-31 75-31h3573c29 0 54 11 75 31 20 21 30 46 30 75v610c0 29-10 54-30 75-21 20-46 31-75 31h-3573c-29 0-54-11-75-31-21-21-31-46-31-75v-610c0-29 10-54 31-75z">
          <text:p/>
        </draw:path>
        <draw:path draw:style-name="gr12" draw:text-style-name="P13" draw:layer="layout" svg:width="3.783cm" svg:height="0.821cm" svg:x="13.996cm" svg:y="10.556cm" svg:viewBox="0 0 3784 822" svg:d="M0 716v-610c0-29 10-54 31-75 21-20 46-31 75-31h3573c29 0 54 11 75 31 20 21 30 46 30 75v610c0 29-10 54-30 75-21 20-46 31-75 31h-3573c-29 0-54-11-75-31-21-21-31-46-31-75zM26 106v610c0 10 2 20 6 30s10 18 18 26c7 7 16 13 25 17 10 4 20 6 31 6h3573c10 0 20-2 30-6s18-10 26-17c7-8 13-16 17-26s6-20 6-30v-610c0-10-2-20-6-30s-10-18-17-26c-8-7-16-13-26-17s-20-6-30-6h-3573c-11 0-21 2-31 6-9 4-18 10-25 17-8 8-14 16-18 26s-6 20-6 30z">
          <text:p/>
        </draw:path>
        <draw:frame draw:style-name="gr13" draw:text-style-name="P14" draw:layer="layout" svg:width="5.062cm" svg:height="0.454cm" svg:x="8.861cm" svg:y="10.717cm">
          <draw:text-box>
            <text:p text:style-name="P3"><text:span text:style-name="T9">06</text:span><text:span text:style-name="T10"> Future Work &amp; Roadmap</text:span></text:p>
          </draw:text-box>
        </draw:frame>
        <draw:polygon draw:style-name="gr6" draw:text-style-name="P7" draw:layer="layout" svg:width="0.476cm" svg:height="0.635cm" svg:x="25.717cm" svg:y="18.388cm" svg:viewBox="0 0 477 636" draw:points="0,0 477,0 477,636 0,636">
          <text:p/>
        </draw:polygon>
        <draw:frame draw:style-name="gr13" draw:text-style-name="P14" draw:layer="layout" svg:width="3.685cm" svg:height="0.454cm" svg:x="14.223cm" svg:y="10.717cm">
          <draw:text-box>
            <text:p text:style-name="P3"><text:span text:style-name="T9">07</text:span><text:span text:style-name="T10"> Lessons Learned</text:span></text:p>
          </draw:text-box>
        </draw:frame>
        <draw:frame draw:style-name="gr7" draw:text-style-name="P8" draw:layer="layout" svg:width="0.369cm" svg:height="0.412cm" svg:x="25.839cm" svg:y="18.503cm">
          <draw:text-box>
            <text:p text:style-name="P3"><text:span text:style-name="T6">3</text:span></text:p>
          </draw:text-box>
        </draw:frame>
      </draw:page>
      <draw:page draw:name="page4"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7.163cm" svg:height="1.119cm" svg:x="9.364cm" svg:y="9.519cm">
          <draw:text-box>
            <text:p text:style-name="P3"><text:span text:style-name="T11">THE PROBLEM</text:span></text:p>
          </draw:text-box>
        </draw:frame>
        <draw:frame draw:style-name="gr15" draw:text-style-name="P16" draw:layer="layout" svg:width="4.122cm" svg:height="4.137cm" svg:x="10.98cm" svg:y="6.517cm">
          <draw:text-box>
            <text:p text:style-name="P3"><text:span text:style-name="T12">01</text:span></text:p>
          </draw:text-box>
        </draw:frame>
        <draw:polygon draw:style-name="gr6" draw:text-style-name="P7" draw:layer="layout" svg:width="0.476cm" svg:height="0.635cm" svg:x="25.717cm" svg:y="18.388cm" svg:viewBox="0 0 477 636" draw:points="0,0 477,0 477,636 0,636">
          <text:p/>
        </draw:polygon>
        <draw:frame draw:style-name="gr16" draw:text-style-name="P17" draw:layer="layout" svg:width="13.839cm" svg:height="0.827cm" svg:x="6.842cm" svg:y="11.077cm">
          <draw:text-box>
            <text:p text:style-name="P3"><text:span text:style-name="T13">Agentic Coding Has an Audience Problem</text:span></text:p>
          </draw:text-box>
        </draw:frame>
        <draw:frame draw:style-name="gr7" draw:text-style-name="P8" draw:layer="layout" svg:width="0.369cm" svg:height="0.412cm" svg:x="25.839cm" svg:y="18.503cm">
          <draw:text-box>
            <text:p text:style-name="P3"><text:span text:style-name="T6">4</text:span></text:p>
          </draw:text-box>
        </draw:frame>
      </draw:page>
      <draw:page draw:name="page5"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25.4cm" svg:height="1.958cm" svg:x="0.502cm" svg:y="11.668cm" svg:viewBox="0 0 25401 1959" svg:d="M31 31c21-21 46-31 75-31h25189c30 0 55 10 75 31 21 20 31 45 31 74v1748c0 29-10 54-31 75-20 20-45 31-75 31h-25189c-29 0-54-11-75-31-20-21-31-46-31-75v-1748c0-29 11-54 31-74z">
          <text:p/>
        </draw:path>
        <draw:path draw:style-name="gr2" draw:text-style-name="P2" draw:layer="layout" svg:width="25.323cm" svg:height="0.051cm" svg:x="0.55cm" svg:y="11.668cm" svg:viewBox="0 0 25324 52" svg:d="M25305 52c-1-1-1-1-1-2-16-16-35-24-57-24h-25189c-4 0-7 2-10 6l-48-15c17-12 36-17 58-17h25189c30 0 55 10 75 31 1 0 1 1 2 1z">
          <text:p/>
        </draw:path>
        <draw:path draw:style-name="gr2" draw:text-style-name="P2" draw:layer="layout" svg:width="25.323cm" svg:height="0.052cm" svg:x="0.55cm" svg:y="13.574cm" svg:viewBox="0 0 25324 53" svg:d="M48 20c3 4 6 6 10 6h25189c22 0 41-9 57-24 0-1 0-1 1-2l19 20c-1 1-1 1-2 2-20 20-45 31-75 31h-25189c-22 0-41-6-58-17z">
          <text:p/>
        </draw:path>
        <draw:path draw:style-name="gr2" draw:text-style-name="P2" draw:layer="layout" svg:width="0.049cm" svg:height="1.896cm" svg:x="25.853cm" svg:y="11.699cm" svg:viewBox="0 0 50 1897" svg:d="M0 1878c15-16 23-34 23-56v-1748c0-21-8-40-23-56l18-18c21 20 32 45 32 74v1748c0 29-11 54-32 75z">
          <text:p/>
        </draw:path>
        <draw:polygon draw:style-name="gr2" draw:text-style-name="P2" draw:layer="layout" svg:width="25.4cm" svg:height="1.958cm" svg:x="0.502cm" svg:y="11.668cm" svg:viewBox="0 0 25401 1959" draw:points="0,0 25401,0 25401,1959 0,1959">
          <text:p/>
        </draw:polygon>
        <draw:path draw:style-name="gr8" draw:text-style-name="P9" draw:layer="layout" svg:width="8.07cm" svg:height="4.366cm" svg:x="0.502cm" svg:y="7.011cm" svg:viewBox="0 0 8071 4367" svg:d="M31 31c21-21 46-31 75-31h7859c29 0 54 10 75 31s31 46 31 75v4155c0 29-10 54-31 75-21 20-46 31-75 31h-7859c-29 0-54-11-75-31-20-21-31-46-31-75v-4155c0-29 11-54 31-75z">
          <text:p/>
        </draw:path>
        <draw:path draw:style-name="gr12" draw:text-style-name="P13" draw:layer="layout" svg:width="8.07cm" svg:height="4.366cm" svg:x="0.502cm" svg:y="7.011cm" svg:viewBox="0 0 8071 4367" svg:d="M0 4261v-4155c0-29 11-54 31-75 21-21 46-31 75-31h7859c29 0 54 10 75 31s31 46 31 75v4155c0 29-10 54-31 75-21 20-46 31-75 31h-7859c-29 0-54-11-75-31-20-21-31-46-31-75zM27 106v4155c0 10 2 20 6 30s9 18 17 26c7 7 16 13 26 17 9 4 20 6 30 6h7859c11 0 21-2 31-6 9-4 18-10 25-17 8-8 13-16 17-26 5-10 7-20 7-30v-4155c0-11-2-21-7-31-4-9-9-18-17-25-7-8-16-14-25-18-10-4-20-6-31-6h-7859c-10 0-21 2-30 6-10 4-19 10-26 18-8 7-13 16-17 25-4 10-6 20-6 31z">
          <text:p/>
        </draw:path>
        <draw:frame draw:style-name="gr9" draw:text-style-name="P10" draw:layer="layout" svg:width="17.322cm" svg:height="1.119cm" svg:x="3.999cm" svg:y="5.471cm">
          <draw:text-box>
            <text:p text:style-name="P3"><text:span text:style-name="T7">THE AGENTIC CODING LANDSCAPE</text:span></text:p>
          </draw:text-box>
        </draw:frame>
        <draw:path draw:style-name="gr17" draw:text-style-name="P18" draw:layer="layout" svg:width="0.132cm" svg:height="0.132cm" svg:x="1.111cm" svg:y="8.519cm" svg:viewBox="0 0 133 133" svg:d="M133 66c0 9-2 17-5 26-3 8-8 15-14 21-7 6-14 11-22 15s-16 5-25 5-17-1-25-5c-9-4-16-9-22-15s-12-13-15-21c-4-9-5-17-5-26s1-17 5-25c3-8 9-15 15-22 6-6 13-11 22-14 8-3 16-5 25-5s17 2 25 5 15 8 22 14c6 7 11 14 14 22s5 16 5 25z">
          <text:p/>
        </draw:path>
        <draw:frame draw:style-name="gr11" draw:text-style-name="P12" draw:layer="layout" svg:width="6.042cm" svg:height="0.624cm" svg:x="1.122cm" svg:y="7.514cm">
          <draw:text-box>
            <text:p text:style-name="P3"><text:span text:style-name="T14">GENERAL AUDIENCES</text:span></text:p>
          </draw:text-box>
        </draw:frame>
        <draw:path draw:style-name="gr17" draw:text-style-name="P18" draw:layer="layout" svg:width="0.132cm" svg:height="0.132cm" svg:x="1.111cm" svg:y="9.128cm" svg:viewBox="0 0 133 133" svg:d="M133 67c0 9-2 17-5 25s-8 15-14 22c-7 6-14 11-22 14s-16 5-25 5-17-2-25-5c-9-3-16-8-22-14-6-7-12-14-15-22-4-8-5-16-5-25s1-17 5-27c3-8 9-15 15-21s13-11 22-14c8-4 16-5 25-5s17 1 25 5c8 3 15 8 22 14 6 6 11 13 14 21 3 10 5 18 5 27z">
          <text:p/>
        </draw:path>
        <draw:frame draw:style-name="gr5" draw:text-style-name="P6" draw:layer="layout" svg:width="3.807cm" svg:height="0.496cm" svg:x="1.566cm" svg:y="8.303cm">
          <draw:text-box>
            <text:p text:style-name="P3"><text:span text:style-name="T15">Vibe-coding culture</text:span></text:p>
          </draw:text-box>
        </draw:frame>
        <draw:path draw:style-name="gr17" draw:text-style-name="P18" draw:layer="layout" svg:width="0.132cm" svg:height="0.132cm" svg:x="1.111cm" svg:y="9.763cm" svg:viewBox="0 0 133 133" svg:d="M133 66c0 10-2 18-5 26s-8 15-14 22c-7 6-14 11-22 14s-16 5-25 5-17-2-25-5c-9-3-16-8-22-14-6-7-12-14-15-22-4-8-5-16-5-26 0-9 1-17 5-26 3-8 9-15 15-21s13-11 22-14c8-4 16-5 25-5s17 1 25 5c8 3 15 8 22 14 6 6 11 13 14 21 3 9 5 17 5 26z">
          <text:p/>
        </draw:path>
        <draw:frame draw:style-name="gr5" draw:text-style-name="P6" draw:layer="layout" svg:width="5.189cm" svg:height="0.496cm" svg:x="1.566cm" svg:y="8.911cm">
          <draw:text-box>
            <text:p text:style-name="P3"><text:span text:style-name="T15">Prompt-and-pray workflow</text:span></text:p>
          </draw:text-box>
        </draw:frame>
        <draw:path draw:style-name="gr8" draw:text-style-name="P9" draw:layer="layout" svg:width="8.096cm" svg:height="4.366cm" svg:x="9.154cm" svg:y="7.011cm" svg:viewBox="0 0 8097 4367" svg:d="M31 31c21-21 46-31 75-31h7886c29 0 54 10 74 31 21 21 31 46 31 75v4155c0 29-10 54-31 75-20 20-45 31-75 31h-7885c-29 0-54-11-75-31-21-21-31-46-31-75v-4155c0-29 10-54 31-75z">
          <text:p/>
        </draw:path>
        <draw:path draw:style-name="gr12" draw:text-style-name="P13" draw:layer="layout" svg:width="8.096cm" svg:height="4.366cm" svg:x="9.154cm" svg:y="7.011cm" svg:viewBox="0 0 8097 4367" svg:d="M0 4261v-4155c0-29 10-54 31-75s46-31 75-31h7885c30 0 55 10 75 31 21 21 31 46 31 75v4155c0 29-10 54-31 75-20 20-45 31-75 31h-7885c-29 0-54-11-75-31-21-21-31-46-31-75zM27 106v4155c0 10 2 20 6 30s9 18 17 26c7 7 16 13 26 17 9 4 19 6 30 6h7885c11 0 21-2 31-6s18-10 26-17c7-8 13-16 17-26s6-20 6-30v-4155c0-11-2-21-6-31-4-9-10-18-17-25-8-8-16-14-26-18s-20-6-31-6h-7885c-11 0-21 2-30 6-10 4-19 10-26 18-8 7-13 16-17 25-4 10-6 20-6 31z">
          <text:p/>
        </draw:path>
        <draw:frame draw:style-name="gr5" draw:text-style-name="P6" draw:layer="layout" svg:width="5.315cm" svg:height="0.496cm" svg:x="1.566cm" svg:y="9.546cm">
          <draw:text-box>
            <text:p text:style-name="P3"><text:span text:style-name="T15">Zero engineering discipline</text:span></text:p>
          </draw:text-box>
        </draw:frame>
        <draw:path draw:style-name="gr17" draw:text-style-name="P18" draw:layer="layout" svg:width="0.132cm" svg:height="0.132cm" svg:x="9.789cm" svg:y="8.519cm" svg:viewBox="0 0 133 133" svg:d="M133 66c0 9-1 17-5 26-3 8-8 15-14 21s-13 11-21 15c-9 4-17 5-26 5s-17-1-26-5c-8-4-15-9-22-15-6-6-11-13-14-21-3-9-5-17-5-26s2-17 5-25 8-15 14-22c7-6 14-11 22-14 9-3 17-5 26-5s17 2 26 5c8 3 15 8 21 14 6 7 11 14 14 22 4 8 5 16 5 25z">
          <text:p/>
        </draw:path>
        <draw:frame draw:style-name="gr11" draw:text-style-name="P12" draw:layer="layout" svg:width="4.81cm" svg:height="0.624cm" svg:x="9.785cm" svg:y="7.514cm">
          <draw:text-box>
            <text:p text:style-name="P3"><text:span text:style-name="T14">BLACK-BOX SDLC</text:span></text:p>
          </draw:text-box>
        </draw:frame>
        <draw:path draw:style-name="gr17" draw:text-style-name="P18" draw:layer="layout" svg:width="0.132cm" svg:height="0.132cm" svg:x="9.789cm" svg:y="9.128cm" svg:viewBox="0 0 133 133" svg:d="M133 67c0 9-1 17-5 25-3 8-8 15-14 22-6 6-13 11-21 14-9 3-17 5-26 5s-17-2-26-5c-8-3-15-8-22-14-6-7-11-14-14-22s-5-16-5-25 2-17 5-27c3-8 8-15 14-21 7-6 14-11 22-14 9-4 17-5 26-5s17 1 26 5c8 3 15 8 21 14s11 13 14 21c4 10 5 18 5 27z">
          <text:p/>
        </draw:path>
        <draw:frame draw:style-name="gr5" draw:text-style-name="P6" draw:layer="layout" svg:width="4.425cm" svg:height="0.496cm" svg:x="10.23cm" svg:y="8.303cm">
          <draw:text-box>
            <text:p text:style-name="P3"><text:span text:style-name="T15">Agent does everything</text:span></text:p>
          </draw:text-box>
        </draw:frame>
        <draw:path draw:style-name="gr17" draw:text-style-name="P18" draw:layer="layout" svg:width="0.132cm" svg:height="0.132cm" svg:x="9.789cm" svg:y="9.763cm" svg:viewBox="0 0 133 133" svg:d="M133 66c0 10-1 18-5 26-3 8-8 15-14 22-6 6-13 11-21 14-9 3-17 5-26 5s-17-2-26-5c-8-3-15-8-22-14-6-7-11-14-14-22s-5-16-5-26c0-9 2-17 5-26 3-8 8-15 14-21 7-6 14-11 22-14 9-4 17-5 26-5s17 1 26 5c8 3 15 8 21 14s11 13 14 21c4 9 5 17 5 26z">
          <text:p/>
        </draw:path>
        <draw:frame draw:style-name="gr5" draw:text-style-name="P6" draw:layer="layout" svg:width="6.748cm" svg:height="0.496cm" svg:x="10.23cm" svg:y="8.911cm">
          <draw:text-box>
            <text:p text:style-name="P3"><text:span text:style-name="T15">Requirements to Code in one shot</text:span></text:p>
          </draw:text-box>
        </draw:frame>
        <draw:path draw:style-name="gr8" draw:text-style-name="P9" draw:layer="layout" svg:width="8.07cm" svg:height="4.366cm" svg:x="17.832cm" svg:y="7.011cm" svg:viewBox="0 0 8071 4367" svg:d="M31 31c21-21 46-31 75-31h7859c30 0 55 10 75 31 21 21 31 46 31 75v4155c0 29-10 54-31 75-20 20-45 31-75 31h-7859c-29 0-54-11-75-31-20-21-31-46-31-75v-4155c0-29 11-54 31-75z">
          <text:p/>
        </draw:path>
        <draw:path draw:style-name="gr12" draw:text-style-name="P13" draw:layer="layout" svg:width="8.07cm" svg:height="4.366cm" svg:x="17.832cm" svg:y="7.011cm" svg:viewBox="0 0 8071 4367" svg:d="M0 4261v-4155c0-29 11-54 31-75 21-21 46-31 75-31h7859c30 0 55 10 75 31 21 21 31 46 31 75v4155c0 29-10 54-31 75-20 20-45 31-75 31h-7859c-29 0-54-11-75-31-20-21-31-46-31-75zM27 106v4155c0 10 2 20 6 30s10 18 17 26c8 7 16 13 26 17s20 6 30 6h7859c11 0 21-2 31-6 9-4 18-10 26-17 7-8 13-16 17-26s6-20 6-30v-4155c0-11-2-21-6-31-4-9-10-18-17-25-8-8-17-14-26-18-10-4-20-6-31-6h-7859c-10 0-20 2-30 6s-18 10-26 18c-7 7-13 16-17 25-4 10-6 20-6 31z">
          <text:p/>
        </draw:path>
        <draw:frame draw:style-name="gr5" draw:text-style-name="P6" draw:layer="layout" svg:width="3.77cm" svg:height="0.496cm" svg:x="10.23cm" svg:y="9.546cm">
          <draw:text-box>
            <text:p text:style-name="P3"><text:span text:style-name="T15">Human = spectator</text:span></text:p>
          </draw:text-box>
        </draw:frame>
        <draw:frame draw:style-name="gr11" draw:text-style-name="P12" draw:layer="layout" svg:width="4.347cm" svg:height="0.624cm" svg:x="18.45cm" svg:y="7.514cm">
          <draw:text-box>
            <text:p text:style-name="P3"><text:span text:style-name="T14">OPINIONATED &amp;</text:span></text:p>
          </draw:text-box>
        </draw:frame>
        <draw:path draw:style-name="gr17" draw:text-style-name="P18" draw:layer="layout" svg:width="0.132cm" svg:height="0.132cm" svg:x="18.441cm" svg:y="9.181cm" svg:viewBox="0 0 133 133" svg:d="M133 66c0 8-1 17-5 25-3 8-8 15-14 21-6 7-14 11-23 16-8 3-16 5-25 5s-17-2-25-5c-8-5-15-9-22-16-6-6-11-13-14-21s-5-17-5-25c0-9 2-18 5-26s8-15 14-21c7-6 14-11 22-14 8-4 16-5 25-5s17 1 25 5c9 3 17 8 23 14s11 13 14 21c4 8 5 17 5 26z">
          <text:p/>
        </draw:path>
        <draw:frame draw:style-name="gr11" draw:text-style-name="P12" draw:layer="layout" svg:width="2.375cm" svg:height="0.624cm" svg:x="18.45cm" svg:y="8.175cm">
          <draw:text-box>
            <text:p text:style-name="P3"><text:span text:style-name="T14">OPAQUE</text:span></text:p>
          </draw:text-box>
        </draw:frame>
        <draw:path draw:style-name="gr17" draw:text-style-name="P18" draw:layer="layout" svg:width="0.132cm" svg:height="0.132cm" svg:x="18.441cm" svg:y="9.789cm" svg:viewBox="0 0 133 133" svg:d="M133 67c0 9-1 17-5 26-3 8-8 15-14 21s-14 11-23 14c-8 4-16 5-25 5s-17-1-25-5c-8-3-15-8-22-14-6-6-11-13-14-21-3-9-5-17-5-26s2-17 5-26c3-8 8-15 14-22 7-6 14-11 22-14s16-5 25-5 17 2 25 5c9 3 17 8 23 14 6 7 11 14 14 22 4 9 5 17 5 26z">
          <text:p/>
        </draw:path>
        <draw:frame draw:style-name="gr5" draw:text-style-name="P6" draw:layer="layout" svg:width="4.673cm" svg:height="0.496cm" svg:x="18.894cm" svg:y="8.964cm">
          <draw:text-box>
            <text:p text:style-name="P3"><text:span text:style-name="T15">Cannot inspect the plan</text:span></text:p>
          </draw:text-box>
        </draw:frame>
        <draw:path draw:style-name="gr17" draw:text-style-name="P18" draw:layer="layout" svg:width="0.132cm" svg:height="0.132cm" svg:x="18.441cm" svg:y="10.424cm" svg:viewBox="0 0 133 133" svg:d="M133 66c0 10-1 18-5 27-3 8-8 15-14 21s-14 11-23 14c-8 4-16 5-25 5s-17-1-25-5c-8-3-15-8-22-14-6-6-11-13-14-21-3-9-5-17-5-27 0-9 2-17 5-25s8-15 14-22c7-6 14-11 22-14s16-5 25-5 17 2 25 5c9 3 17 8 23 14 6 7 11 14 14 22 4 8 5 16 5 25z">
          <text:p/>
        </draw:path>
        <draw:frame draw:style-name="gr5" draw:text-style-name="P6" draw:layer="layout" svg:width="5.438cm" svg:height="0.496cm" svg:x="18.894cm" svg:y="9.573cm">
          <draw:text-box>
            <text:p text:style-name="P3"><text:span text:style-name="T15">Cannot steer mid-execution</text:span></text:p>
          </draw:text-box>
        </draw:frame>
        <draw:path draw:style-name="gr17" draw:text-style-name="P18" draw:layer="layout" svg:width="0.159cm" svg:height="0.159cm" svg:x="0.978cm" svg:y="12.197cm" svg:viewBox="0 0 160 160" svg:d="M160 80c0 11-2 21-6 31-4 9-10 18-17 25-7 8-16 13-26 17-10 5-20 7-30 7-11 0-21-2-31-7-10-4-19-9-26-17-8-7-13-16-17-25-5-10-7-20-7-31 0-10 2-20 7-30 4-11 9-20 17-27 7-7 16-13 26-17s20-6 31-6c10 0 20 2 30 6s19 10 26 17 13 16 17 27c4 10 6 20 6 30z">
          <text:p/>
        </draw:path>
        <draw:frame draw:style-name="gr5" draw:text-style-name="P6" draw:layer="layout" svg:width="5.685cm" svg:height="0.496cm" svg:x="18.894cm" svg:y="10.208cm">
          <draw:text-box>
            <text:p text:style-name="P3"><text:span text:style-name="T15">Cannot say “no, not like that”</text:span></text:p>
          </draw:text-box>
        </draw:frame>
        <draw:path draw:style-name="gr17" draw:text-style-name="P18" draw:layer="layout" svg:width="0.159cm" svg:height="0.159cm" svg:x="0.978cm" svg:y="12.858cm" svg:viewBox="0 0 160 160" svg:d="M160 81c0 10-2 20-6 30s-10 18-17 26c-7 7-16 13-26 17s-20 6-30 6c-11 0-21-2-31-6s-19-10-26-17c-8-8-13-16-17-26-5-10-7-20-7-30 0-11 2-21 7-31 4-9 9-18 17-26 7-8 16-14 26-18s20-6 31-6c10 0 20 2 30 6s19 10 26 18 13 17 17 26c4 10 6 20 6 31z">
          <text:p/>
        </draw:path>
        <draw:frame draw:style-name="gr18" draw:text-style-name="P19" draw:layer="layout" svg:width="14.837cm" svg:height="0.539cm" svg:x="1.46cm" svg:y="11.973cm">
          <draw:text-box>
            <text:p text:style-name="P3"><text:span text:style-name="T16">Every week</text:span><text:span text:style-name="T17"> a new tool claims to build your app from a single prompt.</text:span></text:p>
          </draw:text-box>
        </draw:frame>
        <draw:polygon draw:style-name="gr6" draw:text-style-name="P7" draw:layer="layout" svg:width="0.476cm" svg:height="0.635cm" svg:x="25.717cm" svg:y="18.388cm" svg:viewBox="0 0 477 636" draw:points="0,0 477,0 477,636 0,636">
          <text:p/>
        </draw:polygon>
        <draw:frame draw:style-name="gr18" draw:text-style-name="P19" draw:layer="layout" svg:width="8.907cm" svg:height="0.539cm" svg:x="1.46cm" svg:y="12.635cm">
          <draw:text-box>
            <text:p text:style-name="P3"><text:span text:style-name="T17">But </text:span><text:span text:style-name="T18">who</text:span><text:span text:style-name="T17"> are these tools actually built </text:span><text:span text:style-name="T16">for?</text:span></text:p>
          </draw:text-box>
        </draw:frame>
        <draw:frame draw:style-name="gr7" draw:text-style-name="P8" draw:layer="layout" svg:width="0.369cm" svg:height="0.412cm" svg:x="25.839cm" svg:y="18.503cm">
          <draw:text-box>
            <text:p text:style-name="P3"><text:span text:style-name="T6">5</text:span></text:p>
          </draw:text-box>
        </draw:frame>
      </draw:page>
      <draw:page draw:name="page6"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33cm" svg:height="3.625cm" svg:x="0.502cm" svg:y="7.619cm" svg:viewBox="0 0 12331 3626" svg:d="M31 31c21-20 46-30 75-31h12119c29 1 54 11 75 31 20 21 31 46 31 75v3414c0 30-11 55-31 75-21 21-46 31-75 31h-12119c-29 0-54-10-75-31-20-20-31-45-31-75v-3414c0-29 11-54 31-75z">
          <text:p/>
        </draw:path>
        <draw:polygon draw:style-name="gr2" draw:text-style-name="P2" draw:layer="layout" svg:width="12.33cm" svg:height="0.067cm" svg:x="0.502cm" svg:y="7.619cm" svg:viewBox="0 0 12331 68" draw:points="12267,68 0,68 0,0 12331,0 12331,3">
          <text:p/>
        </draw:polygon>
        <draw:path draw:style-name="gr2" draw:text-style-name="P2" draw:layer="layout" svg:width="12.252cm" svg:height="0.051cm" svg:x="0.55cm" svg:y="11.193cm" svg:viewBox="0 0 12253 52" svg:d="M48 20c3 4 6 6 10 6h12119c22 0 41-8 56-23 1-2 1-2 1-3l19 20-1 1c-21 21-46 31-75 31h-12119c-22 0-41-5-58-17z">
          <text:p/>
        </draw:path>
        <draw:path draw:style-name="gr2" draw:text-style-name="P2" draw:layer="layout" svg:width="0.05cm" svg:height="3.563cm" svg:x="12.782cm" svg:y="7.65cm" svg:viewBox="0 0 51 3564" svg:d="M0 3546c16-16 23-35 23-57v-3414c0-22-7-40-23-56l19-19c21 21 32 46 32 75v3414c0 30-11 55-32 75z">
          <text:p/>
        </draw:path>
        <draw:polygon draw:style-name="gr19" draw:text-style-name="P20" draw:layer="layout" svg:width="12.33cm" svg:height="3.625cm" svg:x="0.502cm" svg:y="7.619cm" svg:viewBox="0 0 12331 3626" draw:points="0,0 12331,0 12331,3626 0,3626">
          <text:p/>
        </draw:polygon>
        <draw:frame draw:style-name="gr9" draw:text-style-name="P10" draw:layer="layout" svg:width="5.442cm" svg:height="1.119cm" svg:x="10.322cm" svg:y="5.868cm">
          <draw:text-box>
            <text:p text:style-name="P3"><text:span text:style-name="T7">THE IRONY</text:span></text:p>
          </draw:text-box>
        </draw:frame>
        <draw:path draw:style-name="gr17" draw:text-style-name="P18" draw:layer="layout" svg:width="0.159cm" svg:height="0.159cm" svg:x="1.058cm" svg:y="9.048cm" svg:viewBox="0 0 160 160" svg:d="M160 81c0 10-2 20-6 30s-10 18-18 26c-7 7-17 13-26 17-10 4-20 6-31 6-10 0-20-2-30-6s-18-10-26-17c-7-8-13-16-17-26s-6-20-6-30c0-11 2-21 6-31 4-9 10-19 17-27 8-7 16-13 26-17s20-6 30-6c11 0 21 2 31 6 9 4 19 10 26 17 8 8 14 18 18 27 4 10 6 20 6 31z">
          <text:p/>
        </draw:path>
        <draw:frame draw:style-name="gr20" draw:text-style-name="P21" draw:layer="layout" svg:width="6.062cm" svg:height="0.666cm" svg:x="1.101cm" svg:y="8.036cm">
          <draw:text-box>
            <text:p text:style-name="P3"><text:span text:style-name="T19">LLMS ARE GREAT AT</text:span></text:p>
          </draw:text-box>
        </draw:frame>
        <draw:path draw:style-name="gr17" draw:text-style-name="P18" draw:layer="layout" svg:width="0.159cm" svg:height="0.158cm" svg:x="1.058cm" svg:y="9.71cm" svg:viewBox="0 0 160 159" svg:d="M160 80c0 11-2 21-6 30-4 10-10 19-18 26-7 8-17 13-26 17-10 4-20 6-31 6-10 0-20-2-30-6s-18-9-26-17c-7-7-13-16-17-26-4-9-6-19-6-30 0-10 2-21 6-30 4-10 10-19 17-26 8-7 16-13 26-18 10-4 20-6 30-6 11 0 21 2 31 6 9 5 19 11 26 18 8 7 14 16 18 26 4 9 6 20 6 30z">
          <text:p/>
        </draw:path>
        <draw:frame draw:style-name="gr18" draw:text-style-name="P19" draw:layer="layout" svg:width="7.889cm" svg:height="0.539cm" svg:x="1.534cm" svg:y="8.825cm">
          <draw:text-box>
            <text:p text:style-name="P3"><text:span text:style-name="T17">Syntactically correct code generation</text:span></text:p>
          </draw:text-box>
        </draw:frame>
        <draw:path draw:style-name="gr17" draw:text-style-name="P18" draw:layer="layout" svg:width="0.159cm" svg:height="0.158cm" svg:x="1.058cm" svg:y="10.345cm" svg:viewBox="0 0 160 159" svg:d="M160 80c0 11-2 21-6 30-4 10-10 19-18 26-7 8-17 13-26 17-10 4-20 6-31 6-10 0-20-2-30-6s-18-9-26-17c-7-7-13-16-17-26-4-9-6-19-6-30 0-10 2-21 6-30 4-10 10-19 17-26 8-7 16-13 26-17 10-5 20-7 30-7 11 0 21 2 31 7 9 4 19 10 26 17 8 7 14 16 18 26 4 9 6 20 6 30z">
          <text:p/>
        </draw:path>
        <draw:frame draw:style-name="gr18" draw:text-style-name="P19" draw:layer="layout" svg:width="7.218cm" svg:height="0.539cm" svg:x="1.534cm" svg:y="9.486cm">
          <draw:text-box>
            <text:p text:style-name="P3"><text:span text:style-name="T17">API reasoning &amp; pattern matching</text:span></text:p>
          </draw:text-box>
        </draw:frame>
        <draw:path draw:style-name="gr8" draw:text-style-name="P9" draw:layer="layout" svg:width="12.329cm" svg:height="3.625cm" svg:x="13.573cm" svg:y="7.619cm" svg:viewBox="0 0 12330 3626" svg:d="M31 31c20-20 45-30 74-31h12119c30 1 55 11 75 31 21 21 31 46 31 75v3414c0 30-10 55-31 75-20 21-45 31-75 31h-12119c-29 0-54-10-74-31-21-20-31-45-31-75v-3414c0-29 10-54 31-75z">
          <text:p/>
        </draw:path>
        <draw:polygon draw:style-name="gr2" draw:text-style-name="P2" draw:layer="layout" svg:width="12.329cm" svg:height="0.067cm" svg:x="13.573cm" svg:y="7.619cm" svg:viewBox="0 0 12330 68" draw:points="12267,68 0,68 0,0 12330,0 12330,3">
          <text:p/>
        </draw:polygon>
        <draw:path draw:style-name="gr2" draw:text-style-name="P2" draw:layer="layout" svg:width="12.252cm" svg:height="0.051cm" svg:x="13.621cm" svg:y="11.193cm" svg:viewBox="0 0 12253 52" svg:d="M47 20c3 4 7 6 10 6h12119c22 0 41-8 57-23 0-2 0-2 1-3l19 20c-1 0-1 1-2 1-20 21-45 31-75 31h-12119c-21 0-40-5-57-17z">
          <text:p/>
        </draw:path>
        <draw:path draw:style-name="gr2" draw:text-style-name="P2" draw:layer="layout" svg:width="0.049cm" svg:height="3.563cm" svg:x="25.853cm" svg:y="7.65cm" svg:viewBox="0 0 50 3564" svg:d="M0 3546c15-16 23-35 23-57v-3414c0-22-8-40-23-56l18-19c21 21 32 46 32 75v3414c0 30-11 55-32 75z">
          <text:p/>
        </draw:path>
        <draw:polygon draw:style-name="gr21" draw:text-style-name="P22" draw:layer="layout" svg:width="12.329cm" svg:height="3.625cm" svg:x="13.573cm" svg:y="7.619cm" svg:viewBox="0 0 12330 3626" draw:points="0,0 12330,0 12330,3626 0,3626">
          <text:p/>
        </draw:polygon>
        <draw:frame draw:style-name="gr18" draw:text-style-name="P19" draw:layer="layout" svg:width="8.022cm" svg:height="0.539cm" svg:x="1.534cm" svg:y="10.121cm">
          <draw:text-box>
            <text:p text:style-name="P3"><text:span text:style-name="T17">Working across massive training data</text:span></text:p>
          </draw:text-box>
        </draw:frame>
        <draw:path draw:style-name="gr17" draw:text-style-name="P18" draw:layer="layout" svg:width="0.159cm" svg:height="0.159cm" svg:x="14.128cm" svg:y="9.048cm" svg:viewBox="0 0 160 160" svg:d="M160 81c0 10-2 20-6 30s-10 18-17 26c-8 7-16 13-26 17s-20 6-30 6c-11 0-21-2-31-6-9-4-18-10-26-17-7-8-14-16-18-26s-6-20-6-30c0-11 2-21 6-31 4-9 11-19 18-27 8-7 17-13 26-17 10-4 20-6 31-6 10 0 20 2 30 6s18 10 26 17c7 8 13 18 17 27 4 10 6 20 6 31z">
          <text:p/>
        </draw:path>
        <draw:frame draw:style-name="gr20" draw:text-style-name="P21" draw:layer="layout" svg:width="6.918cm" svg:height="0.666cm" svg:x="14.171cm" svg:y="8.036cm">
          <draw:text-box>
            <text:p text:style-name="P3"><text:span text:style-name="T20">LLMS ARE TERRIBLE AT</text:span></text:p>
          </draw:text-box>
        </draw:frame>
        <draw:path draw:style-name="gr17" draw:text-style-name="P18" draw:layer="layout" svg:width="0.159cm" svg:height="0.158cm" svg:x="14.128cm" svg:y="9.71cm" svg:viewBox="0 0 160 159" svg:d="M160 80c0 11-2 21-6 30-4 10-10 19-17 26-8 8-16 13-26 17s-20 6-30 6c-11 0-21-2-31-6-9-4-18-9-26-17-7-7-14-16-18-26-4-9-6-19-6-30 0-10 2-21 6-30 4-10 11-19 18-26 8-7 17-13 26-18 10-4 20-6 31-6 10 0 20 2 30 6 10 5 18 11 26 18 7 7 13 16 17 26 4 9 6 20 6 30z">
          <text:p/>
        </draw:path>
        <draw:frame draw:style-name="gr18" draw:text-style-name="P19" draw:layer="layout" svg:width="5.663cm" svg:height="0.539cm" svg:x="14.604cm" svg:y="8.825cm">
          <draw:text-box>
            <text:p text:style-name="P3"><text:span text:style-name="T17">Requirements engineering</text:span></text:p>
          </draw:text-box>
        </draw:frame>
        <draw:path draw:style-name="gr17" draw:text-style-name="P18" draw:layer="layout" svg:width="0.159cm" svg:height="0.158cm" svg:x="14.128cm" svg:y="10.345cm" svg:viewBox="0 0 160 159" svg:d="M160 80c0 11-2 21-6 30-4 10-10 19-17 26-8 8-16 13-26 17s-20 6-30 6c-11 0-21-2-31-6-9-4-18-9-26-17-7-7-14-16-18-26-4-9-6-19-6-30 0-10 2-21 6-30 4-10 11-19 18-26 8-7 17-13 26-17 10-5 20-7 31-7 10 0 20 2 30 7 10 4 18 10 26 17 7 7 13 16 17 26 4 9 6 20 6 30z">
          <text:p/>
        </draw:path>
        <draw:frame draw:style-name="gr18" draw:text-style-name="P19" draw:layer="layout" svg:width="4.803cm" svg:height="0.539cm" svg:x="14.604cm" svg:y="9.486cm">
          <draw:text-box>
            <text:p text:style-name="P3"><text:span text:style-name="T17">Architectural judgment</text:span></text:p>
          </draw:text-box>
        </draw:frame>
        <draw:path draw:style-name="gr22" draw:text-style-name="P23" draw:layer="layout" svg:width="17.932cm" svg:height="1.101cm" svg:x="4.233cm" svg:y="11.912cm" svg:viewBox="0 0 17933 1102" svg:d="M79 73v954h17675c30 0 55-11 75-31 21-21 31-46 31-75v-742c0-29-10-54-31-75-20-21-45-31-75-31zM0 0h17933v1102h-17933z">
          <text:p/>
        </draw:path>
        <draw:path draw:style-name="gr23" draw:text-style-name="P24" draw:layer="layout" svg:width="17.74cm" svg:height="0.953cm" svg:x="4.352cm" svg:y="11.985cm" svg:viewBox="0 0 17741 954" svg:d="M0 954v-954h17635c14 0 28 3 41 8 13 6 24 13 34 23s18 21 23 34c6 13 8 27 8 41v741c0 14-2 28-8 41-5 13-13 25-23 35s-21 17-34 23c-13 5-27 8-41 8z">
          <text:p/>
        </draw:path>
        <draw:polygon draw:style-name="gr2" draw:text-style-name="P2" draw:layer="layout" svg:width="0.08cm" svg:height="0.953cm" svg:x="4.312cm" svg:y="11.985cm" svg:viewBox="0 0 81 954" draw:points="0,0 81,0 81,954 0,954">
          <text:p/>
        </draw:polygon>
        <draw:frame draw:style-name="gr18" draw:text-style-name="P19" draw:layer="layout" svg:width="6.548cm" svg:height="0.539cm" svg:x="14.604cm" svg:y="10.121cm">
          <draw:text-box>
            <text:p text:style-name="P3"><text:span text:style-name="T17">Knowing when to stop and ask</text:span></text:p>
          </draw:text-box>
        </draw:frame>
        <draw:polygon draw:style-name="gr6" draw:text-style-name="P7" draw:layer="layout" svg:width="0.476cm" svg:height="0.635cm" svg:x="25.717cm" svg:y="18.388cm" svg:viewBox="0 0 477 636" draw:points="0,0 477,0 477,636 0,636">
          <text:p/>
        </draw:polygon>
        <draw:frame draw:style-name="gr24" draw:text-style-name="P25" draw:layer="layout" svg:width="18.41cm" svg:height="0.581cm" svg:x="4.524cm" svg:y="12.151cm">
          <draw:text-box>
            <text:p text:style-name="P3"><text:span text:style-name="T21">“They’re brilliant at generating code, but they can’t tell you </text:span><text:span text:style-name="T22">what</text:span><text:span text:style-name="T21"> to build or </text:span><text:span text:style-name="T22">why.</text:span><text:span text:style-name="T21">”</text:span></text:p>
          </draw:text-box>
        </draw:frame>
        <draw:frame draw:style-name="gr7" draw:text-style-name="P8" draw:layer="layout" svg:width="0.369cm" svg:height="0.412cm" svg:x="25.839cm" svg:y="18.503cm">
          <draw:text-box>
            <text:p text:style-name="P3"><text:span text:style-name="T6">6</text:span></text:p>
          </draw:text-box>
        </draw:frame>
      </draw:page>
      <draw:page draw:name="page7"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25.347cm" svg:height="3.413cm" svg:x="0.529cm" svg:y="6.429cm" svg:viewBox="0 0 25348 3414" svg:d="M0 3229v-3044c0-12 1-24 3-36 3-12 6-24 11-35 4-11 10-22 17-32s14-19 23-28c9-8 18-16 28-23s21-12 32-17 23-8 35-11c12-2 24-3 36-3h24978c12 0 24 1 36 3 12 3 23 6 34 11 12 5 22 10 32 17 11 7 20 15 29 23 8 9 16 18 23 28 6 10 12 21 17 32 4 11 8 23 10 35 3 12 4 24 4 36v3044c0 12-1 24-4 36-2 12-6 23-10 35-5 11-11 22-17 32-7 10-15 19-23 28-9 8-18 16-29 23-10 7-20 12-32 17-11 5-22 8-34 10-12 3-24 4-36 4h-24978c-12 0-24-1-36-4-12-2-24-5-35-10s-22-10-32-17-19-15-28-23c-9-9-16-18-23-28s-13-21-17-32c-5-12-8-23-11-35-2-12-3-24-3-36z">
          <text:p/>
        </draw:path>
        <draw:path draw:style-name="gr25" draw:text-style-name="P26" draw:layer="layout" svg:width="25.347cm" svg:height="3.413cm" svg:x="0.529cm" svg:y="6.429cm" svg:viewBox="0 0 25348 3414" svg:d="M0 3229v-3044c0-12 1-24 3-36 3-12 6-24 11-35 4-11 10-22 17-32s14-19 23-28c9-8 18-16 28-23s21-12 32-17 23-8 35-11c12-2 24-3 36-3h24978c12 0 24 1 36 3 12 3 23 6 34 11 12 5 22 10 32 17 11 7 20 15 29 23 8 9 16 18 23 28 6 10 12 21 17 32 4 11 8 23 10 35 3 12 4 24 4 36v3044c0 12-1 24-4 36-2 12-6 23-10 35-5 11-11 22-17 32-7 10-15 19-23 28-9 8-18 16-29 23-10 7-20 12-32 17-11 5-22 8-34 10-12 3-24 4-36 4h-24978c-12 0-24-1-36-4-12-2-24-5-35-10s-22-10-32-17-19-15-28-23c-9-9-16-18-23-28s-13-21-17-32c-5-12-8-23-11-35-2-12-3-24-3-36z">
          <text:p/>
        </draw:path>
        <draw:frame draw:style-name="gr9" draw:text-style-name="P10" draw:layer="layout" svg:width="6.33cm" svg:height="1.119cm" svg:x="9.863cm" svg:y="4.836cm">
          <draw:text-box>
            <text:p text:style-name="P3"><text:span text:style-name="T7">THE INSIGHT</text:span></text:p>
          </draw:text-box>
        </draw:frame>
        <draw:frame draw:style-name="gr26" draw:text-style-name="P27" draw:layer="layout" svg:width="13.2cm" svg:height="0.784cm" svg:x="7.24cm" svg:y="7.195cm">
          <draw:text-box>
            <text:p text:style-name="P3"><text:span text:style-name="T23">“The bottleneck is not code generation.</text:span></text:p>
          </draw:text-box>
        </draw:frame>
        <draw:frame draw:style-name="gr26" draw:text-style-name="P27" draw:layer="layout" svg:width="11.445cm" svg:height="0.784cm" svg:x="8.058cm" svg:y="8.2cm">
          <draw:text-box>
            <text:p text:style-name="P3"><text:span text:style-name="T23">It’s </text:span><text:span text:style-name="T24">specification</text:span><text:span text:style-name="T23"> and </text:span><text:span text:style-name="T24">verification</text:span><text:span text:style-name="T23">.”</text:span></text:p>
          </draw:text-box>
        </draw:frame>
        <draw:path draw:style-name="gr22" draw:text-style-name="P23" draw:layer="layout" svg:width="17.932cm" svg:height="2.591cm" svg:x="4.233cm" svg:y="11.429cm" svg:viewBox="0 0 17933 2592" svg:d="M79 80v2435h17675c30 0 55-10 75-31 21-21 31-46 31-75v-2223c0-30-10-54-31-75-20-21-45-31-75-31zM0 0h17933v2592h-17933z">
          <text:p/>
        </draw:path>
        <draw:path draw:style-name="gr23" draw:text-style-name="P24" draw:layer="layout" svg:width="17.74cm" svg:height="2.434cm" svg:x="4.352cm" svg:y="11.509cm" svg:viewBox="0 0 17741 2435" svg:d="M0 2435v-2435h17635c14 0 28 3 41 8s24 13 34 23 18 21 23 34c6 13 8 27 8 41v2223c0 14-2 28-8 41-5 13-13 24-23 34s-21 18-34 23-27 8-41 8z">
          <text:p/>
        </draw:path>
        <draw:polygon draw:style-name="gr2" draw:text-style-name="P2" draw:layer="layout" svg:width="0.08cm" svg:height="2.434cm" svg:x="4.312cm" svg:y="11.509cm" svg:viewBox="0 0 81 2435" draw:points="0,0 81,0 81,2435 0,2435">
          <text:p/>
        </draw:polygon>
        <draw:frame draw:style-name="gr5" draw:text-style-name="P6" draw:layer="layout" svg:width="3.979cm" svg:height="0.496cm" svg:x="0.503cm" svg:y="10.393cm">
          <draw:text-box>
            <text:p text:style-name="P3"><text:span text:style-name="T15">Which led us to ask:</text:span></text:p>
          </draw:text-box>
        </draw:frame>
        <draw:frame draw:style-name="gr11" draw:text-style-name="P12" draw:layer="layout" svg:width="15.91cm" svg:height="0.624cm" svg:x="4.524cm" svg:y="11.668cm">
          <draw:text-box>
            <text:p text:style-name="P3"><text:span text:style-name="T25">What if we stopped treating the LLM as an autonomous engineer</text:span></text:p>
          </draw:text-box>
        </draw:frame>
        <draw:frame draw:style-name="gr11" draw:text-style-name="P12" draw:layer="layout" svg:width="17.081cm" svg:height="0.624cm" svg:x="4.524cm" svg:y="12.409cm">
          <draw:text-box>
            <text:p text:style-name="P3"><text:span text:style-name="T25">and started treating it as a </text:span><text:span text:style-name="T26">disciplined tool</text:span><text:span text:style-name="T25"> in a human-led engineering</text:span></text:p>
          </draw:text-box>
        </draw:frame>
        <draw:polygon draw:style-name="gr6" draw:text-style-name="P7" draw:layer="layout" svg:width="0.476cm" svg:height="0.635cm" svg:x="25.717cm" svg:y="18.388cm" svg:viewBox="0 0 477 636" draw:points="0,0 477,0 477,636 0,636">
          <text:p/>
        </draw:polygon>
        <draw:frame draw:style-name="gr11" draw:text-style-name="P12" draw:layer="layout" svg:width="2.467cm" svg:height="0.624cm" svg:x="4.524cm" svg:y="13.123cm">
          <draw:text-box>
            <text:p text:style-name="P3"><text:span text:style-name="T25">workflow?</text:span></text:p>
          </draw:text-box>
        </draw:frame>
        <draw:frame draw:style-name="gr7" draw:text-style-name="P8" draw:layer="layout" svg:width="0.369cm" svg:height="0.412cm" svg:x="25.839cm" svg:y="18.503cm">
          <draw:text-box>
            <text:p text:style-name="P3"><text:span text:style-name="T6">7</text:span></text:p>
          </draw:text-box>
        </draw:frame>
      </draw:page>
      <draw:page draw:name="page8"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10.881cm" svg:height="1.119cm" svg:x="7.5cm" svg:y="9.519cm">
          <draw:text-box>
            <text:p text:style-name="P3"><text:span text:style-name="T11">THE ANSWER: CORGE</text:span></text:p>
          </draw:text-box>
        </draw:frame>
        <draw:frame draw:style-name="gr15" draw:text-style-name="P16" draw:layer="layout" svg:width="4.122cm" svg:height="4.137cm" svg:x="10.98cm" svg:y="6.517cm">
          <draw:text-box>
            <text:p text:style-name="P3"><text:span text:style-name="T12">02</text:span></text:p>
          </draw:text-box>
        </draw:frame>
        <draw:polygon draw:style-name="gr6" draw:text-style-name="P7" draw:layer="layout" svg:width="0.476cm" svg:height="0.635cm" svg:x="25.717cm" svg:y="18.388cm" svg:viewBox="0 0 477 636" draw:points="0,0 477,0 477,636 0,636">
          <text:p/>
        </draw:polygon>
        <draw:frame draw:style-name="gr16" draw:text-style-name="P17" draw:layer="layout" svg:width="11.654cm" svg:height="0.827cm" svg:x="7.737cm" svg:y="11.077cm">
          <draw:text-box>
            <text:p text:style-name="P3"><text:span text:style-name="T13">Specification-Driven, Engineer-First</text:span></text:p>
          </draw:text-box>
        </draw:frame>
        <draw:frame draw:style-name="gr7" draw:text-style-name="P8" draw:layer="layout" svg:width="0.369cm" svg:height="0.412cm" svg:x="25.839cm" svg:y="18.503cm">
          <draw:text-box>
            <text:p text:style-name="P3"><text:span text:style-name="T6">8</text:span></text:p>
          </draw:text-box>
        </draw:frame>
      </draw:page>
      <draw:page draw:name="page9"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8.661cm" svg:height="1.119cm" svg:x="8.636cm" svg:y="6.212cm">
          <draw:text-box>
            <text:p text:style-name="P3"><text:span text:style-name="T7">WHAT IS CORGE?</text:span></text:p>
          </draw:text-box>
        </draw:frame>
        <draw:frame draw:style-name="gr5" draw:text-style-name="P6" draw:layer="layout" svg:width="25.818cm" svg:height="0.496cm" svg:x="0.503cm" svg:y="7.879cm">
          <draw:text-box>
            <text:p text:style-name="P3"><text:span text:style-name="T15">A </text:span><text:span text:style-name="T27">specification-driven, software-engineer-first</text:span><text:span text:style-name="T15"> agentic development system. It enforces a controlled engineering workflow where</text:span></text:p>
          </draw:text-box>
        </draw:frame>
        <draw:path draw:style-name="gr2" draw:text-style-name="P2" draw:layer="layout" svg:width="3.439cm" svg:height="1.323cm" svg:x="0.767cm" svg:y="10.424cm" svg:viewBox="0 0 3440 1324" svg:d="M106 0h3229c14 0 27 3 40 8 13 6 24 13 34 23s18 21 23 34c6 13 8 27 8 41v1112c0 14-2 28-8 41-5 13-13 24-23 34s-21 18-34 23-26 8-40 8h-3229c-14 0-28-3-41-8s-24-13-34-23-18-21-23-34c-6-13-8-27-8-41v-1112c0-14 2-28 8-41 5-13 13-24 23-34s21-17 34-23c13-5 27-8 41-8z">
          <text:p/>
        </draw:path>
        <draw:frame draw:style-name="gr5" draw:text-style-name="P6" draw:layer="layout" svg:width="7.118cm" svg:height="0.496cm" svg:x="0.503cm" svg:y="8.462cm">
          <draw:text-box>
            <text:p text:style-name="P3"><text:span text:style-name="T15">ambiguity decreases at every stage.</text:span></text:p>
          </draw:text-box>
        </draw:frame>
        <draw:frame draw:style-name="gr27" draw:text-style-name="P28" draw:layer="layout" svg:width="1.973cm" svg:height="0.501cm" svg:x="1.603cm" svg:y="10.705cm">
          <draw:text-box>
            <text:p text:style-name="P3"><text:span text:style-name="T28">Freestyle</text:span></text:p>
          </draw:text-box>
        </draw:frame>
        <draw:line draw:style-name="gr25" draw:text-style-name="P26" draw:layer="layout" svg:x1="4.206cm" svg:y1="11.086cm" svg:x2="5.132cm" svg:y2="11.086cm">
          <text:p/>
        </draw:line>
        <draw:polygon draw:style-name="gr2" draw:text-style-name="P2" draw:layer="layout" svg:width="0.317cm" svg:height="0.317cm" svg:x="4.847cm" svg:y="10.927cm" svg:viewBox="0 0 318 318" draw:points="0,0 318,160 0,318">
          <text:p/>
        </draw:polygon>
        <draw:path draw:style-name="gr2" draw:text-style-name="P2" draw:layer="layout" svg:width="3.439cm" svg:height="1.323cm" svg:x="5.265cm" svg:y="10.424cm" svg:viewBox="0 0 3440 1324" svg:d="M106 0h3228c14 0 28 3 41 8 13 6 24 13 34 23s18 21 23 34c6 13 8 27 8 41v1112c0 14-2 28-8 41-5 13-13 24-23 34s-21 18-34 23-27 8-41 8h-3228c-14 0-28-3-41-8s-24-13-34-23-18-21-23-34c-6-13-8-27-8-41v-1112c0-14 2-28 8-41 5-13 13-24 23-34s21-17 34-23c13-5 27-8 41-8z">
          <text:p/>
        </draw:path>
        <draw:frame draw:style-name="gr27" draw:text-style-name="P28" draw:layer="layout" svg:width="1.598cm" svg:height="0.501cm" svg:x="1.793cm" svg:y="11.076cm">
          <draw:text-box>
            <text:p text:style-name="P3"><text:span text:style-name="T28">Canvas</text:span></text:p>
          </draw:text-box>
        </draw:frame>
        <draw:frame draw:style-name="gr27" draw:text-style-name="P28" draw:layer="layout" svg:width="2.271cm" svg:height="0.501cm" svg:x="5.941cm" svg:y="10.705cm">
          <draw:text-box>
            <text:p text:style-name="P3"><text:span text:style-name="T28">Structured</text:span></text:p>
          </draw:text-box>
        </draw:frame>
        <draw:line draw:style-name="gr25" draw:text-style-name="P26" draw:layer="layout" svg:x1="8.704cm" svg:y1="11.086cm" svg:x2="9.63cm" svg:y2="11.086cm">
          <text:p/>
        </draw:line>
        <draw:polygon draw:style-name="gr2" draw:text-style-name="P2" draw:layer="layout" svg:width="0.317cm" svg:height="0.317cm" svg:x="9.345cm" svg:y="10.927cm" svg:viewBox="0 0 318 318" draw:points="0,0 318,160 0,318">
          <text:p/>
        </draw:polygon>
        <draw:path draw:style-name="gr2" draw:text-style-name="P2" draw:layer="layout" svg:width="3.439cm" svg:height="1.323cm" svg:x="9.763cm" svg:y="10.424cm" svg:viewBox="0 0 3440 1324" svg:d="M105 0h3229c14 0 28 3 41 8 13 6 24 13 34 23s18 21 23 34c6 13 8 27 8 41v1112c0 14-2 28-8 41-5 13-13 24-23 34s-21 18-34 23-27 8-41 8h-3229c-14 0-27-3-40-8s-24-13-34-23-18-21-23-34c-6-13-8-27-8-41v-1112c0-14 2-28 8-41 5-13 13-24 23-34s21-17 34-23c13-5 26-8 40-8z">
          <text:p/>
        </draw:path>
        <draw:frame draw:style-name="gr27" draw:text-style-name="P28" draw:layer="layout" svg:width="2.795cm" svg:height="0.501cm" svg:x="5.72cm" svg:y="11.076cm">
          <draw:text-box>
            <text:p text:style-name="P3"><text:span text:style-name="T28">Specification</text:span></text:p>
          </draw:text-box>
        </draw:frame>
        <draw:frame draw:style-name="gr27" draw:text-style-name="P28" draw:layer="layout" svg:width="2.146cm" svg:height="0.501cm" svg:x="10.526cm" svg:y="10.705cm">
          <draw:text-box>
            <text:p text:style-name="P3"><text:span text:style-name="T28">Execution</text:span></text:p>
          </draw:text-box>
        </draw:frame>
        <draw:line draw:style-name="gr25" draw:text-style-name="P26" draw:layer="layout" svg:x1="13.202cm" svg:y1="11.086cm" svg:x2="14.128cm" svg:y2="11.086cm">
          <text:p/>
        </draw:line>
        <draw:polygon draw:style-name="gr2" draw:text-style-name="P2" draw:layer="layout" svg:width="0.318cm" svg:height="0.317cm" svg:x="13.842cm" svg:y="10.927cm" svg:viewBox="0 0 319 318" draw:points="0,0 319,160 0,318">
          <text:p/>
        </draw:polygon>
        <draw:path draw:style-name="gr2" draw:text-style-name="P2" draw:layer="layout" svg:width="3.439cm" svg:height="1.323cm" svg:x="14.261cm" svg:y="10.424cm" svg:viewBox="0 0 3440 1324" svg:d="M105 0h3229c14 0 28 3 41 8 13 6 24 13 34 23s18 21 23 34 8 27 8 41v1112c0 14-3 28-8 41s-13 24-23 34-21 18-34 23-27 8-41 8h-3229c-14 0-27-3-40-8s-25-13-34-23c-10-10-18-21-23-34-6-13-8-27-8-41v-1112c0-14 2-28 8-41 5-13 13-24 23-34 9-10 21-17 34-23 13-5 26-8 40-8z">
          <text:p/>
        </draw:path>
        <draw:frame draw:style-name="gr27" draw:text-style-name="P28" draw:layer="layout" svg:width="0.95cm" svg:height="0.501cm" svg:x="11.045cm" svg:y="11.076cm">
          <draw:text-box>
            <text:p text:style-name="P3"><text:span text:style-name="T28">Plan</text:span></text:p>
          </draw:text-box>
        </draw:frame>
        <draw:frame draw:style-name="gr27" draw:text-style-name="P28" draw:layer="layout" svg:width="1.547cm" svg:height="0.501cm" svg:x="15.3cm" svg:y="10.705cm">
          <draw:text-box>
            <text:p text:style-name="P3"><text:span text:style-name="T28">Coding</text:span></text:p>
          </draw:text-box>
        </draw:frame>
        <draw:line draw:style-name="gr25" draw:text-style-name="P26" draw:layer="layout" svg:x1="17.7cm" svg:y1="11.086cm" svg:x2="18.626cm" svg:y2="11.086cm">
          <text:p/>
        </draw:line>
        <draw:polygon draw:style-name="gr2" draw:text-style-name="P2" draw:layer="layout" svg:width="0.318cm" svg:height="0.317cm" svg:x="18.34cm" svg:y="10.927cm" svg:viewBox="0 0 319 318" draw:points="0,0 319,160 0,318">
          <text:p/>
        </draw:polygon>
        <draw:path draw:style-name="gr28" draw:text-style-name="P29" draw:layer="layout" svg:width="3.44cm" svg:height="1.323cm" svg:x="18.758cm" svg:y="10.424cm" svg:viewBox="0 0 3441 1324" svg:d="M106 0h3229c14 0 28 3 41 8 13 6 24 13 34 23s18 21 23 34 8 27 8 41v1112c0 14-3 28-8 41s-13 24-23 34-21 18-34 23-27 8-41 8h-3229c-14 0-27-3-40-8s-25-13-35-23c-9-10-17-21-22-34-6-13-9-27-9-41v-1112c0-14 3-28 9-41 5-13 13-24 22-34 10-10 22-17 35-23 13-5 26-8 40-8z">
          <text:p/>
        </draw:path>
        <draw:frame draw:style-name="gr27" draw:text-style-name="P28" draw:layer="layout" svg:width="2.893cm" svg:height="0.501cm" svg:x="14.675cm" svg:y="11.076cm">
          <draw:text-box>
            <text:p text:style-name="P3"><text:span text:style-name="T28">(9-Step Loop)</text:span></text:p>
          </draw:text-box>
        </draw:frame>
        <draw:frame draw:style-name="gr27" draw:text-style-name="P28" draw:layer="layout" svg:width="2.446cm" svg:height="0.501cm" svg:x="19.367cm" svg:y="10.705cm">
          <draw:text-box>
            <text:p text:style-name="P3"><text:span text:style-name="T28">Verification</text:span></text:p>
          </draw:text-box>
        </draw:frame>
        <draw:line draw:style-name="gr25" draw:text-style-name="P26" draw:layer="layout" svg:x1="22.198cm" svg:y1="11.086cm" svg:x2="23.124cm" svg:y2="11.086cm">
          <text:p/>
        </draw:line>
        <draw:polygon draw:style-name="gr2" draw:text-style-name="P2" draw:layer="layout" svg:width="0.318cm" svg:height="0.317cm" svg:x="22.838cm" svg:y="10.927cm" svg:viewBox="0 0 319 318" draw:points="0,0 319,160 0,318">
          <text:p/>
        </draw:polygon>
        <draw:path draw:style-name="gr28" draw:text-style-name="P29" draw:layer="layout" svg:width="2.646cm" svg:height="1.323cm" svg:x="23.256cm" svg:y="10.424cm" svg:viewBox="0 0 2647 1324" svg:d="M106 0h2435c14 0 28 3 41 8 13 6 24 13 34 23s18 21 23 34c6 13 8 27 8 41v1112c0 14-2 28-8 41-5 13-13 24-23 34s-21 18-34 23-27 8-41 8h-2435c-14 0-27-3-40-8s-25-13-35-23-17-21-23-34c-5-13-8-27-8-41v-1112c0-14 3-28 8-41 6-13 13-24 23-34s22-17 35-23c13-5 26-8 40-8z">
          <text:p/>
        </draw:path>
        <draw:frame draw:style-name="gr27" draw:text-style-name="P28" draw:layer="layout" svg:width="2.046cm" svg:height="0.501cm" svg:x="19.589cm" svg:y="11.076cm">
          <draw:text-box>
            <text:p text:style-name="P3"><text:span text:style-name="T28">&amp; Testing</text:span></text:p>
          </draw:text-box>
        </draw:frame>
        <draw:frame draw:style-name="gr27" draw:text-style-name="P28" draw:layer="layout" svg:width="1.748cm" svg:height="0.501cm" svg:x="23.784cm" svg:y="10.705cm">
          <draw:text-box>
            <text:p text:style-name="P3"><text:span text:style-name="T28">Delivery</text:span></text:p>
          </draw:text-box>
        </draw:frame>
        <draw:frame draw:style-name="gr27" draw:text-style-name="P28" draw:layer="layout" svg:width="1.597cm" svg:height="0.501cm" svg:x="23.874cm" svg:y="11.076cm">
          <draw:text-box>
            <text:p text:style-name="P3"><text:span text:style-name="T28">&amp; Audit</text:span></text:p>
          </draw:text-box>
        </draw:frame>
        <draw:polygon draw:style-name="gr6" draw:text-style-name="P7" draw:layer="layout" svg:width="0.476cm" svg:height="0.635cm" svg:x="25.717cm" svg:y="18.388cm" svg:viewBox="0 0 477 636" draw:points="0,0 477,0 477,636 0,636">
          <text:p/>
        </draw:polygon>
        <draw:frame draw:style-name="gr29" draw:text-style-name="P30" draw:layer="layout" svg:width="6.894cm" svg:height="0.268cm" svg:x="10.022cm" svg:y="12.273cm">
          <draw:text-box>
            <text:p text:style-name="P3"><text:span text:style-name="T29">Each stage reduces ambiguity → increases machine executability</text:span></text:p>
          </draw:text-box>
        </draw:frame>
        <draw:frame draw:style-name="gr7" draw:text-style-name="P8" draw:layer="layout" svg:width="0.369cm" svg:height="0.412cm" svg:x="25.839cm" svg:y="18.503cm">
          <draw:text-box>
            <text:p text:style-name="P3"><text:span text:style-name="T6">9</text:span></text:p>
          </draw:text-box>
        </draw:frame>
      </draw:page>
      <draw:page draw:name="page10" draw:style-name="dp1" draw:master-page-name="master-page3">
        <draw:polygon draw:style-name="gr1" draw:text-style-name="P1" draw:layer="layout" svg:width="26.405cm" svg:height="19.235cm" svg:x="0cm" svg:y="0cm" svg:viewBox="0 0 26406 19236" draw:points="0,0 26406,0 26406,19236 0,19236">
          <text:p/>
        </draw:polygon>
        <draw:polygon draw:style-name="gr2" draw:text-style-name="P2" draw:layer="layout" svg:width="3.916cm" svg:height="0.82cm" svg:x="0.502cm" svg:y="7.487cm" svg:viewBox="0 0 3917 821" draw:points="0,0 3917,0 3917,821 0,821">
          <text:p/>
        </draw:polygon>
        <draw:polygon draw:style-name="gr2" draw:text-style-name="P2" draw:layer="layout" svg:width="1.535cm" svg:height="0.82cm" svg:x="4.418cm" svg:y="7.487cm" svg:viewBox="0 0 1536 821" draw:points="0,0 1536,0 1536,821 0,821">
          <text:p/>
        </draw:polygon>
        <draw:polygon draw:style-name="gr2" draw:text-style-name="P2" draw:layer="layout" svg:width="19.949cm" svg:height="0.82cm" svg:x="5.953cm" svg:y="7.487cm" svg:viewBox="0 0 19950 821" draw:points="0,0 19950,0 19950,821 0,821">
          <text:p/>
        </draw:polygon>
        <draw:polygon draw:style-name="gr30" draw:text-style-name="P31" draw:layer="layout" svg:width="3.916cm" svg:height="0.794cm" svg:x="0.502cm" svg:y="9.657cm" svg:viewBox="0 0 3917 795" draw:points="0,0 3917,0 3917,795 0,795">
          <text:p/>
        </draw:polygon>
        <draw:polygon draw:style-name="gr30" draw:text-style-name="P31" draw:layer="layout" svg:width="1.535cm" svg:height="0.794cm" svg:x="4.418cm" svg:y="9.657cm" svg:viewBox="0 0 1536 795" draw:points="0,0 1536,0 1536,795 0,795">
          <text:p/>
        </draw:polygon>
        <draw:polygon draw:style-name="gr30" draw:text-style-name="P31" draw:layer="layout" svg:width="19.949cm" svg:height="0.794cm" svg:x="5.953cm" svg:y="9.657cm" svg:viewBox="0 0 19950 795" draw:points="0,0 19950,0 19950,795 0,795">
          <text:p/>
        </draw:polygon>
        <draw:polygon draw:style-name="gr1" draw:text-style-name="P1" draw:layer="layout" svg:width="3.916cm" svg:height="0.026cm" svg:x="0.502cm" svg:y="8.281cm" svg:viewBox="0 0 3917 27" draw:points="0,0 3917,0 3917,27 0,27">
          <text:p/>
        </draw:polygon>
        <draw:polygon draw:style-name="gr1" draw:text-style-name="P1" draw:layer="layout" svg:width="1.535cm" svg:height="0.026cm" svg:x="4.418cm" svg:y="8.281cm" svg:viewBox="0 0 1536 27" draw:points="0,0 1536,0 1536,27 0,27">
          <text:p/>
        </draw:polygon>
        <draw:polygon draw:style-name="gr1" draw:text-style-name="P1" draw:layer="layout" svg:width="19.949cm" svg:height="0.026cm" svg:x="5.953cm" svg:y="8.281cm" svg:viewBox="0 0 19950 27" draw:points="0,0 19950,0 19950,27 0,27">
          <text:p/>
        </draw:polygon>
        <draw:polygon draw:style-name="gr31" draw:text-style-name="P32" draw:layer="layout" svg:width="3.916cm" svg:height="0.026cm" svg:x="0.502cm" svg:y="9.657cm" svg:viewBox="0 0 3917 27" draw:points="0,0 3917,0 3917,27 0,27">
          <text:p/>
        </draw:polygon>
        <draw:polygon draw:style-name="gr31" draw:text-style-name="P32" draw:layer="layout" svg:width="1.535cm" svg:height="0.026cm" svg:x="4.418cm" svg:y="9.657cm" svg:viewBox="0 0 1536 27" draw:points="0,0 1536,0 1536,27 0,27">
          <text:p/>
        </draw:polygon>
        <draw:polygon draw:style-name="gr31" draw:text-style-name="P32" draw:layer="layout" svg:width="19.949cm" svg:height="0.026cm" svg:x="5.953cm" svg:y="9.657cm" svg:viewBox="0 0 19950 27" draw:points="0,0 19950,0 19950,27 0,27">
          <text:p/>
        </draw:polygon>
        <draw:polygon draw:style-name="gr31" draw:text-style-name="P32" draw:layer="layout" svg:width="3.916cm" svg:height="0.027cm" svg:x="0.502cm" svg:y="10.424cm" svg:viewBox="0 0 3917 28" draw:points="0,0 3917,0 3917,28 0,28">
          <text:p/>
        </draw:polygon>
        <draw:polygon draw:style-name="gr31" draw:text-style-name="P32" draw:layer="layout" svg:width="1.535cm" svg:height="0.027cm" svg:x="4.418cm" svg:y="10.424cm" svg:viewBox="0 0 1536 28" draw:points="0,0 1536,0 1536,28 0,28">
          <text:p/>
        </draw:polygon>
        <draw:polygon draw:style-name="gr31" draw:text-style-name="P32" draw:layer="layout" svg:width="19.949cm" svg:height="0.027cm" svg:x="5.953cm" svg:y="10.424cm" svg:viewBox="0 0 19950 28" draw:points="0,0 19950,0 19950,28 0,28">
          <text:p/>
        </draw:polygon>
        <draw:frame draw:style-name="gr9" draw:text-style-name="P10" draw:layer="layout" svg:width="10.049cm" svg:height="1.119cm" svg:x="7.991cm" svg:y="5.948cm">
          <draw:text-box>
            <text:p text:style-name="P3"><text:span text:style-name="T7">THE THREE AGENTS</text:span></text:p>
          </draw:text-box>
        </draw:frame>
        <draw:frame draw:style-name="gr5" draw:text-style-name="P6" draw:layer="layout" svg:width="1.261cm" svg:height="0.496cm" svg:x="0.68cm" svg:y="7.588cm">
          <draw:text-box>
            <text:p text:style-name="P3"><text:span text:style-name="T30">Agent</text:span></text:p>
          </draw:text-box>
        </draw:frame>
        <draw:frame draw:style-name="gr5" draw:text-style-name="P6" draw:layer="layout" svg:width="1.312cm" svg:height="0.496cm" svg:x="4.609cm" svg:y="7.588cm">
          <draw:text-box>
            <text:p text:style-name="P3"><text:span text:style-name="T30">Phase</text:span></text:p>
          </draw:text-box>
        </draw:frame>
        <draw:frame draw:style-name="gr5" draw:text-style-name="P6" draw:layer="layout" svg:width="0.965cm" svg:height="0.496cm" svg:x="6.123cm" svg:y="7.588cm">
          <draw:text-box>
            <text:p text:style-name="P3"><text:span text:style-name="T30">Role</text:span></text:p>
          </draw:text-box>
        </draw:frame>
        <draw:frame draw:style-name="gr5" draw:text-style-name="P6" draw:layer="layout" svg:width="2.768cm" svg:height="0.496cm" svg:x="0.68cm" svg:y="8.409cm">
          <draw:text-box>
            <text:p text:style-name="P3"><text:span text:style-name="T3">Specification</text:span></text:p>
          </draw:text-box>
        </draw:frame>
        <draw:path draw:style-name="gr2" draw:text-style-name="P2" draw:layer="layout" svg:width="0.662cm" svg:height="0.291cm" svg:x="4.603cm" svg:y="8.837cm" svg:viewBox="0 0 663 292" svg:d="M0 212v-132c0-11 2-21 6-30 4-10 10-20 17-27 8-8 17-13 26-17 10-4 20-6 31-6h503c11 0 21 2 31 6 9 4 18 9 25 17 8 7 14 17 18 27 4 9 6 19 6 30v132c0 11-2 21-6 31-4 9-10 18-18 25-7 8-16 14-25 18-10 4-20 6-31 6h-503c-11 0-21-2-31-6-9-4-18-10-26-18-7-7-13-16-17-25-4-10-6-20-6-31z">
          <text:p/>
        </draw:path>
        <draw:frame draw:style-name="gr5" draw:text-style-name="P6" draw:layer="layout" svg:width="1.261cm" svg:height="0.496cm" svg:x="0.68cm" svg:y="8.964cm">
          <draw:text-box>
            <text:p text:style-name="P3"><text:span text:style-name="T3">Agent</text:span></text:p>
          </draw:text-box>
        </draw:frame>
        <draw:frame draw:style-name="gr32" draw:text-style-name="P33" draw:layer="layout" svg:width="0.544cm" svg:height="0.225cm" svg:x="4.698cm" svg:y="8.815cm">
          <draw:text-box>
            <text:p text:style-name="P3"><text:span text:style-name="T31">SPEC</text:span></text:p>
          </draw:text-box>
        </draw:frame>
        <draw:path draw:style-name="gr33" draw:text-style-name="P34" draw:layer="layout" svg:width="3.122cm" svg:height="0.529cm" svg:x="17.383cm" svg:y="8.678cm" svg:viewBox="0 0 3123 530" svg:d="M0 451v-371c0-10 2-20 6-31 4-10 9-18 17-26 7-7 16-13 26-17 9-4 19-6 30-6h2964c11 0 21 2 31 6 9 4 18 10 25 17 8 8 14 16 18 26 4 11 6 21 6 31v371c0 10-2 20-6 30s-10 18-18 26c-7 7-16 13-25 17-10 4-20 6-31 6h-2964c-11 0-21-2-30-6-10-4-19-10-26-17-8-8-13-16-17-26s-6-20-6-30z">
          <text:p/>
        </draw:path>
        <draw:frame draw:style-name="gr5" draw:text-style-name="P6" draw:layer="layout" svg:width="12.082cm" svg:height="0.496cm" svg:x="6.123cm" svg:y="8.673cm">
          <draw:text-box>
            <text:p text:style-name="P3"><text:span text:style-name="T15">Elicits requirements, runs Socratic Q&amp;A, produces structured </text:span></text:p>
          </draw:text-box>
        </draw:frame>
        <draw:frame draw:style-name="gr34" draw:text-style-name="P35" draw:layer="layout" svg:width="2.138cm" svg:height="0.424cm" svg:x="17.473cm" svg:y="8.752cm">
          <draw:text-box>
            <text:p text:style-name="P3"><text:span text:style-name="T32">Specification</text:span></text:p>
          </draw:text-box>
        </draw:frame>
        <draw:frame draw:style-name="gr5" draw:text-style-name="P6" draw:layer="layout" svg:width="4.77cm" svg:height="0.496cm" svg:x="20.512cm" svg:y="8.673cm">
          <draw:text-box>
            <text:p text:style-name="P3"><text:span text:style-name="T15"><text:s/>with acceptance criteria</text:span></text:p>
          </draw:text-box>
        </draw:frame>
        <draw:path draw:style-name="gr2" draw:text-style-name="P2" draw:layer="layout" svg:width="0.662cm" svg:height="0.291cm" svg:x="4.603cm" svg:y="9.895cm" svg:viewBox="0 0 663 292" svg:d="M0 213v-134c0-10 2-20 6-30s10-18 17-26c8-7 17-13 26-17 10-4 20-6 31-6h503c11 0 21 2 31 6 9 4 18 10 25 17 8 8 14 16 18 26s6 20 6 30v134c0 10-2 20-6 30s-10 18-18 26c-7 7-16 13-25 17-10 4-20 6-31 6h-503c-11 0-21-2-31-6-9-4-18-10-26-17-7-8-13-16-17-26s-6-20-6-30z">
          <text:p/>
        </draw:path>
        <draw:frame draw:style-name="gr5" draw:text-style-name="P6" draw:layer="layout" svg:width="3.262cm" svg:height="0.496cm" svg:x="0.68cm" svg:y="9.758cm">
          <draw:text-box>
            <text:p text:style-name="P3"><text:span text:style-name="T3">Planning Agent</text:span></text:p>
          </draw:text-box>
        </draw:frame>
        <draw:frame draw:style-name="gr32" draw:text-style-name="P33" draw:layer="layout" svg:width="0.544cm" svg:height="0.225cm" svg:x="4.698cm" svg:y="9.9cm">
          <draw:text-box>
            <text:p text:style-name="P3"><text:span text:style-name="T31">PLAN</text:span></text:p>
          </draw:text-box>
        </draw:frame>
        <draw:path draw:style-name="gr33" draw:text-style-name="P34" draw:layer="layout" svg:width="3.122cm" svg:height="0.556cm" svg:x="8.096cm" svg:y="9.736cm" svg:viewBox="0 0 3123 557" svg:d="M0 476v-396c0-11 2-21 6-31s10-18 17-26c7-7 16-13 26-17 9-4 20-6 30-6h2964c11 0 21 2 31 6s18 10 26 17c7 8 13 16 17 26s6 20 6 31v396c0 11-2 21-6 31-4 9-10 18-17 27-8 7-16 13-26 17s-20 6-31 6h-2964c-10 0-21-2-30-6-10-4-19-10-26-17-7-9-13-18-17-27-4-10-6-20-6-31z">
          <text:p/>
        </draw:path>
        <draw:frame draw:style-name="gr5" draw:text-style-name="P6" draw:layer="layout" svg:width="2.201cm" svg:height="0.496cm" svg:x="6.123cm" svg:y="9.758cm">
          <draw:text-box>
            <text:p text:style-name="P3"><text:span text:style-name="T15">Generates </text:span></text:p>
          </draw:text-box>
        </draw:frame>
        <draw:frame draw:style-name="gr34" draw:text-style-name="P35" draw:layer="layout" svg:width="2.369cm" svg:height="0.424cm" svg:x="8.186cm" svg:y="9.81cm">
          <draw:text-box>
            <text:p text:style-name="P3"><text:span text:style-name="T32">TechnicalPlan</text:span></text:p>
          </draw:text-box>
        </draw:frame>
        <draw:path draw:style-name="gr33" draw:text-style-name="P34" draw:layer="layout" svg:width="3.36cm" svg:height="0.556cm" svg:x="14.737cm" svg:y="9.736cm" svg:viewBox="0 0 3361 557" svg:d="M0 476v-396c0-11 2-21 6-31s10-18 17-26c7-7 16-13 26-17s20-6 30-6h3203c10 0 20 2 30 6s18 10 26 17c7 8 13 16 17 26s6 20 6 31v396c0 11-2 21-6 31-4 9-10 18-17 27-8 7-16 13-26 17s-20 6-30 6h-3203c-10 0-20-2-30-6s-19-10-26-17c-7-9-13-18-17-27-4-10-6-20-6-31z">
          <text:p/>
        </draw:path>
        <draw:frame draw:style-name="gr5" draw:text-style-name="P6" draw:layer="layout" svg:width="3.733cm" svg:height="0.496cm" svg:x="11.224cm" svg:y="9.758cm">
          <draw:text-box>
            <text:p text:style-name="P3"><text:span text:style-name="T15"><text:s/>(architecture) and </text:span></text:p>
          </draw:text-box>
        </draw:frame>
        <draw:frame draw:style-name="gr34" draw:text-style-name="P35" draw:layer="layout" svg:width="2.599cm" svg:height="0.424cm" svg:x="14.829cm" svg:y="9.81cm">
          <draw:text-box>
            <text:p text:style-name="P3"><text:span text:style-name="T32">ProceduralStep</text:span></text:p>
          </draw:text-box>
        </draw:frame>
        <draw:frame draw:style-name="gr5" draw:text-style-name="P6" draw:layer="layout" svg:width="4.622cm" svg:height="0.496cm" svg:x="18.094cm" svg:y="9.758cm">
          <draw:text-box>
            <text:p text:style-name="P3"><text:span text:style-name="T15">s (executable checklist)</text:span></text:p>
          </draw:text-box>
        </draw:frame>
        <draw:path draw:style-name="gr2" draw:text-style-name="P2" draw:layer="layout" svg:width="0.688cm" svg:height="0.291cm" svg:x="4.603cm" svg:y="10.98cm" svg:viewBox="0 0 689 292" svg:d="M0 211v-132c0-10 2-21 6-30 4-10 10-19 17-26 8-8 17-13 26-17 10-4 20-6 31-6h530c10 0 20 2 30 6s18 9 26 17c7 7 13 16 17 26 4 9 6 20 6 30v132c0 11-2 22-6 32-4 9-10 18-17 25-8 8-16 14-26 18s-20 6-30 6h-530c-11 0-21-2-31-6-9-4-18-10-26-18-7-7-13-16-17-25-4-10-6-21-6-32z">
          <text:p/>
        </draw:path>
        <draw:frame draw:style-name="gr5" draw:text-style-name="P6" draw:layer="layout" svg:width="2.915cm" svg:height="0.496cm" svg:x="0.68cm" svg:y="10.816cm">
          <draw:text-box>
            <text:p text:style-name="P3"><text:span text:style-name="T3">Coding Agent</text:span></text:p>
          </draw:text-box>
        </draw:frame>
        <draw:frame draw:style-name="gr32" draw:text-style-name="P33" draw:layer="layout" svg:width="0.577cm" svg:height="0.225cm" svg:x="4.698cm" svg:y="10.958cm">
          <draw:text-box>
            <text:p text:style-name="P3"><text:span text:style-name="T31">CODE</text:span></text:p>
          </draw:text-box>
        </draw:frame>
        <draw:frame draw:style-name="gr5" draw:text-style-name="P6" draw:layer="layout" svg:width="19.446cm" svg:height="0.496cm" svg:x="6.123cm" svg:y="10.525cm">
          <draw:text-box>
            <text:p text:style-name="P3"><text:span text:style-name="T15">Executes the plan step-by-step — reads context, calls the LLM, requests human approval for every</text:span></text:p>
          </draw:text-box>
        </draw:frame>
        <draw:frame draw:style-name="gr5" draw:text-style-name="P6" draw:layer="layout" svg:width="3.461cm" svg:height="0.496cm" svg:x="6.123cm" svg:y="11.107cm">
          <draw:text-box>
            <text:p text:style-name="P3"><text:span text:style-name="T15">destructive action</text:span></text:p>
          </draw:text-box>
        </draw:frame>
        <draw:polygon draw:style-name="gr6" draw:text-style-name="P7" draw:layer="layout" svg:width="0.714cm" svg:height="0.635cm" svg:x="25.479cm" svg:y="18.388cm" svg:viewBox="0 0 715 636" draw:points="0,0 715,0 715,636 0,636">
          <text:p/>
        </draw:polygon>
        <draw:frame draw:style-name="gr13" draw:text-style-name="P14" draw:layer="layout" svg:width="12.267cm" svg:height="0.454cm" svg:x="7.491cm" svg:y="12.331cm">
          <draw:text-box>
            <text:p text:style-name="P3"><text:span text:style-name="T33">Each agent has a strict responsibility. No overlap. No mission creep.</text:span></text:p>
          </draw:text-box>
        </draw:frame>
        <draw:frame draw:style-name="gr7" draw:text-style-name="P8" draw:layer="layout" svg:width="0.412cm" svg:height="0.412cm" svg:x="25.617cm" svg:y="18.503cm">
          <draw:text-box>
            <text:p text:style-name="P3"><text:span text:style-name="T6">10</text:span></text:p>
          </draw:text-box>
        </draw:frame>
      </draw:page>
      <draw:page draw:name="page11"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5.847cm" svg:height="2.672cm" svg:x="1.243cm" svg:y="7.699cm" svg:viewBox="0 0 5848 2673" svg:d="M31 31c21-21 46-31 75-31h5637c29 0 54 10 74 31 21 21 31 45 31 75v2461c0 30-10 55-31 75-20 21-45 31-75 31h-5636c-29 0-54-10-75-31-21-20-31-45-31-75v-2461c0-30 10-54 31-75z">
          <text:p/>
        </draw:path>
        <draw:polygon draw:style-name="gr2" draw:text-style-name="P2" draw:layer="layout" svg:width="5.847cm" svg:height="0.066cm" svg:x="1.243cm" svg:y="7.699cm" svg:viewBox="0 0 5848 67" draw:points="5785,67 0,67 0,0 5848,0 5848,3">
          <text:p/>
        </draw:polygon>
        <draw:path draw:style-name="gr2" draw:text-style-name="P2" draw:layer="layout" svg:width="5.77cm" svg:height="0.051cm" svg:x="1.291cm" svg:y="10.32cm" svg:viewBox="0 0 5771 52" svg:d="M47 20c4 4 7 6 11 6h5636c22 0 41-8 57-25 0 0 1 0 1-1l19 20c-1 0-1 1-2 1-20 21-45 31-75 31h-5636c-22 0-41-5-58-17z">
          <text:p/>
        </draw:path>
        <draw:path draw:style-name="gr2" draw:text-style-name="P2" draw:layer="layout" svg:width="0.049cm" svg:height="2.61cm" svg:x="7.041cm" svg:y="7.73cm" svg:viewBox="0 0 50 2611" svg:d="M0 2592c15-15 23-34 23-56v-2461c0-22-8-41-23-56l18-19c21 21 32 45 32 75v2461c0 30-11 55-32 75z">
          <text:p/>
        </draw:path>
        <draw:polygon draw:style-name="gr2" draw:text-style-name="P2" draw:layer="layout" svg:width="5.847cm" svg:height="2.672cm" svg:x="1.243cm" svg:y="7.699cm" svg:viewBox="0 0 5848 2673" draw:points="0,0 5848,0 5848,2673 0,2673">
          <text:p/>
        </draw:polygon>
        <draw:path draw:style-name="gr2" draw:text-style-name="P2" draw:layer="layout" svg:width="0.317cm" svg:height="0.318cm" svg:x="1.693cm" svg:y="8.122cm" svg:viewBox="0 0 318 319" svg:d="M0 161v-4c0-10 1-21 3-31s5-20 9-29c4-10 9-19 14-27 6-9 12-17 20-24s16-14 24-19c9-6 18-11 28-15 9-4 19-7 29-9s20-3 31-3h4c10 0 20 1 30 3s20 5 30 9c9 4 18 9 27 15 8 5 16 12 23 19 8 7 14 15 20 24 6 8 10 17 14 27 4 9 7 19 9 29s3 21 3 31v4c0 10-1 20-3 31-2 10-5 19-9 29-4 9-8 18-14 27s-12 17-20 24c-7 8-15 15-23 20-9 6-18 11-27 15-10 4-20 7-30 9s-20 3-30 3h-4c-11 0-21-1-31-3s-20-5-29-9c-10-4-19-9-28-15-8-5-16-12-24-20-8-7-14-15-20-24-5-9-10-18-14-27-4-10-7-19-9-29-2-11-3-21-3-31z">
          <text:p/>
        </draw:path>
        <draw:frame draw:style-name="gr9" draw:text-style-name="P10" draw:layer="layout" svg:width="7.829cm" svg:height="1.119cm" svg:x="9.117cm" svg:y="5.948cm">
          <draw:text-box>
            <text:p text:style-name="P3"><text:span text:style-name="T7">USER JOURNEY</text:span></text:p>
          </draw:text-box>
        </draw:frame>
        <draw:frame draw:style-name="gr35" draw:text-style-name="P36" draw:layer="layout" svg:width="0.223cm" svg:height="0.251cm" svg:x="1.79cm" svg:y="8.158cm">
          <draw:text-box>
            <text:p text:style-name="P3"><text:span text:style-name="T34">1</text:span></text:p>
          </draw:text-box>
        </draw:frame>
        <draw:path draw:style-name="gr17" draw:text-style-name="P18" draw:layer="layout" svg:width="0.105cm" svg:height="0.106cm" svg:x="1.561cm" svg:y="8.704cm" svg:viewBox="0 0 106 107" svg:d="M106 53c0 7-1 15-4 21-2 7-6 13-11 18s-11 8-17 11c-8 3-15 4-22 4s-13-1-20-4c-6-3-12-6-17-11s-9-11-11-18c-3-6-4-14-4-21s1-14 4-20c2-7 6-12 11-17s11-9 17-12c7-2 13-4 20-4s14 2 22 4c6 3 12 7 17 12s9 10 11 17c3 6 4 13 4 20z">
          <text:p/>
        </draw:path>
        <draw:frame draw:style-name="gr13" draw:text-style-name="P14" draw:layer="layout" svg:width="3.095cm" svg:height="0.454cm" svg:x="2.082cm" svg:y="7.992cm">
          <draw:text-box>
            <text:p text:style-name="P3"><text:span text:style-name="T10"><text:s/></text:span><text:span text:style-name="T35">Launch &amp; Repo</text:span></text:p>
          </draw:text-box>
        </draw:frame>
        <draw:frame draw:style-name="gr7" draw:text-style-name="P8" draw:layer="layout" svg:width="4.772cm" svg:height="0.412cm" svg:x="1.95cm" svg:y="8.528cm">
          <draw:text-box>
            <text:p text:style-name="P3"><text:span text:style-name="T36">Point Corge at any repository</text:span></text:p>
          </draw:text-box>
        </draw:frame>
        <draw:path draw:style-name="gr8" draw:text-style-name="P9" draw:layer="layout" svg:width="5.847cm" svg:height="2.672cm" svg:x="7.276cm" svg:y="7.699cm" svg:viewBox="0 0 5848 2673" svg:d="M31 31c20-21 45-31 74-31h5637c29 0 54 10 75 31s31 45 31 75v2461c0 30-10 55-31 75-21 21-46 31-75 31h-5637c-29 0-54-10-74-31-21-20-31-45-31-75v-2461c0-30 10-54 31-75z">
          <text:p/>
        </draw:path>
        <draw:polygon draw:style-name="gr2" draw:text-style-name="P2" draw:layer="layout" svg:width="5.847cm" svg:height="0.066cm" svg:x="7.276cm" svg:y="7.699cm" svg:viewBox="0 0 5848 67" draw:points="5784,67 0,67 0,0 5848,0 5848,3">
          <text:p/>
        </draw:polygon>
        <draw:path draw:style-name="gr2" draw:text-style-name="P2" draw:layer="layout" svg:width="5.769cm" svg:height="0.051cm" svg:x="7.324cm" svg:y="10.32cm" svg:viewBox="0 0 5770 52" svg:d="M47 20c3 4 7 6 10 6h5637c22 0 41-8 56-25 1 0 1 0 1-1l19 20-1 1c-21 21-46 31-75 31h-5637c-21 0-40-5-57-17z">
          <text:p/>
        </draw:path>
        <draw:path draw:style-name="gr2" draw:text-style-name="P2" draw:layer="layout" svg:width="0.05cm" svg:height="2.61cm" svg:x="13.073cm" svg:y="7.73cm" svg:viewBox="0 0 51 2611" svg:d="M0 2592c16-15 23-34 23-56v-2461c0-22-7-41-23-56l19-19c22 21 32 45 32 75v2461c0 30-10 55-32 75z">
          <text:p/>
        </draw:path>
        <draw:polygon draw:style-name="gr2" draw:text-style-name="P2" draw:layer="layout" svg:width="5.847cm" svg:height="2.672cm" svg:x="7.276cm" svg:y="7.699cm" svg:viewBox="0 0 5848 2673" draw:points="0,0 5848,0 5848,2673 0,2673">
          <text:p/>
        </draw:polygon>
        <draw:path draw:style-name="gr2" draw:text-style-name="P2" draw:layer="layout" svg:width="0.318cm" svg:height="0.318cm" svg:x="7.725cm" svg:y="8.122cm" svg:viewBox="0 0 319 319" svg:d="M0 161v-4c0-10 1-21 3-31s5-20 9-29c4-10 9-19 15-27 5-9 12-17 20-24 7-7 15-14 24-19 9-6 18-11 27-15 10-4 19-7 29-9 11-2 21-3 31-3h4c10 0 21 1 31 3s20 5 29 9c10 4 19 9 27 15 9 5 17 12 24 19s14 15 19 24c6 8 11 17 15 27 4 9 7 19 9 29s3 21 3 31v4c0 10-1 20-3 31-2 10-5 19-9 29-4 9-9 18-15 27-5 9-12 17-19 24-7 8-15 15-24 20-8 6-17 11-27 15-9 4-19 7-29 9s-21 3-31 3h-4c-10 0-20-1-31-3-10-2-19-5-29-9-9-4-18-9-27-15-9-5-17-12-24-20-8-7-15-15-20-24-6-9-11-18-15-27-4-10-7-19-9-29-2-11-3-21-3-31z">
          <text:p/>
        </draw:path>
        <draw:frame draw:style-name="gr7" draw:text-style-name="P8" draw:layer="layout" svg:width="2.949cm" svg:height="0.412cm" svg:x="1.95cm" svg:y="9.031cm">
          <draw:text-box>
            <text:p text:style-name="P3"><text:span text:style-name="T36">or empty directory</text:span></text:p>
          </draw:text-box>
        </draw:frame>
        <draw:frame draw:style-name="gr35" draw:text-style-name="P36" draw:layer="layout" svg:width="0.223cm" svg:height="0.251cm" svg:x="7.817cm" svg:y="8.158cm">
          <draw:text-box>
            <text:p text:style-name="P3"><text:span text:style-name="T34">2</text:span></text:p>
          </draw:text-box>
        </draw:frame>
        <draw:path draw:style-name="gr17" draw:text-style-name="P18" draw:layer="layout" svg:width="0.106cm" svg:height="0.106cm" svg:x="7.593cm" svg:y="8.704cm" svg:viewBox="0 0 107 107" svg:d="M107 53c0 7-1 15-4 21-3 7-7 13-12 18s-10 8-17 11c-6 3-13 4-20 4s-14-1-20-4c-7-3-12-6-18-11-5-5-9-11-12-18-3-6-4-14-4-21s1-14 4-20c3-7 7-12 12-17 6-5 11-9 18-12 6-2 13-4 20-4s14 2 20 4c7 3 12 7 17 12s9 10 12 17c3 6 4 13 4 20z">
          <text:p/>
        </draw:path>
        <draw:frame draw:style-name="gr13" draw:text-style-name="P14" draw:layer="layout" svg:width="3.458cm" svg:height="0.454cm" svg:x="8.109cm" svg:y="7.992cm">
          <draw:text-box>
            <text:p text:style-name="P3"><text:span text:style-name="T10"><text:s/></text:span><text:span text:style-name="T35">Freestyle Canvas</text:span></text:p>
          </draw:text-box>
        </draw:frame>
        <draw:path draw:style-name="gr33" draw:text-style-name="P34" draw:layer="layout" svg:width="1.27cm" svg:height="0.449cm" svg:x="10.715cm" svg:y="8.546cm" svg:viewBox="0 0 1271 450" svg:d="M0 371v-292c0-11 2-21 6-30 4-10 10-19 17-26 8-8 16-13 26-17s20-6 31-6h1112c10 0 20 2 30 6s18 9 26 17c7 7 13 16 17 26 4 9 6 19 6 30v292c0 10-2 21-6 30-4 10-10 19-17 26-8 8-16 13-26 17s-20 6-30 6h-1112c-11 0-21-2-31-6s-18-9-26-17c-7-7-13-16-17-26-4-9-6-20-6-30z">
          <text:p/>
        </draw:path>
        <draw:frame draw:style-name="gr7" draw:text-style-name="P8" draw:layer="layout" svg:width="2.93cm" svg:height="0.412cm" svg:x="7.977cm" svg:y="8.528cm">
          <draw:text-box>
            <text:p text:style-name="P3"><text:span text:style-name="T36">Rough ideas with </text:span></text:p>
          </draw:text-box>
        </draw:frame>
        <draw:frame draw:style-name="gr36" draw:text-style-name="P37" draw:layer="layout" svg:width="1.104cm" svg:height="0.353cm" svg:x="10.785cm" svg:y="8.594cm">
          <draw:text-box>
            <text:p text:style-name="P3"><text:span text:style-name="T37">@node:</text:span></text:p>
          </draw:text-box>
        </draw:frame>
        <draw:frame draw:style-name="gr7" draw:text-style-name="P8" draw:layer="layout" svg:width="4.424cm" svg:height="0.412cm" svg:x="7.977cm" svg:y="9.031cm">
          <draw:text-box>
            <text:p text:style-name="P3"><text:span text:style-name="T36">references validated in real</text:span></text:p>
          </draw:text-box>
        </draw:frame>
        <draw:path draw:style-name="gr8" draw:text-style-name="P9" draw:layer="layout" svg:width="5.821cm" svg:height="2.672cm" svg:x="13.308cm" svg:y="7.699cm" svg:viewBox="0 0 5822 2673" svg:d="M31 31c21-21 46-31 75-31h5610c29 0 54 10 75 31s31 45 31 75v2461c0 30-10 55-31 75-21 21-46 31-75 31h-5610c-29 0-54-10-75-31-21-20-31-45-31-75v-2461c0-30 10-54 31-75z">
          <text:p/>
        </draw:path>
        <draw:polygon draw:style-name="gr2" draw:text-style-name="P2" draw:layer="layout" svg:width="5.821cm" svg:height="0.066cm" svg:x="13.308cm" svg:y="7.699cm" svg:viewBox="0 0 5822 67" draw:points="5758,67 0,67 0,0 5822,0 5822,3">
          <text:p/>
        </draw:polygon>
        <draw:path draw:style-name="gr2" draw:text-style-name="P2" draw:layer="layout" svg:width="5.743cm" svg:height="0.051cm" svg:x="13.356cm" svg:y="10.32cm" svg:viewBox="0 0 5744 52" svg:d="M47 20c4 4 7 6 11 6h5610c22 0 41-8 56-25 1 0 1 0 1-1l19 20-1 1c-21 21-46 31-75 31h-5610c-22 0-41-5-58-17z">
          <text:p/>
        </draw:path>
        <draw:path draw:style-name="gr2" draw:text-style-name="P2" draw:layer="layout" svg:width="0.05cm" svg:height="2.61cm" svg:x="19.079cm" svg:y="7.73cm" svg:viewBox="0 0 51 2611" svg:d="M0 2592c17-15 24-34 24-56v-2461c0-22-7-41-24-56l20-19c21 21 31 45 31 75v2461c0 30-10 55-31 75z">
          <text:p/>
        </draw:path>
        <draw:polygon draw:style-name="gr2" draw:text-style-name="P2" draw:layer="layout" svg:width="5.821cm" svg:height="2.672cm" svg:x="13.308cm" svg:y="7.699cm" svg:viewBox="0 0 5822 2673" draw:points="0,0 5822,0 5822,2673 0,2673">
          <text:p/>
        </draw:polygon>
        <draw:path draw:style-name="gr2" draw:text-style-name="P2" draw:layer="layout" svg:width="0.291cm" svg:height="0.318cm" svg:x="13.758cm" svg:y="8.122cm" svg:viewBox="0 0 292 319" svg:d="M0 172v-26c0-10 1-19 3-29 1-9 4-18 8-27s8-17 13-25c6-8 12-15 18-22 7-7 15-13 24-18 7-6 16-10 25-14 8-3 18-6 27-8s19-3 28-3c10 0 19 1 29 3 9 2 18 5 27 8 9 4 17 8 25 14 8 5 15 11 22 18s13 14 18 22c6 8 10 16 14 25 3 9 6 18 8 27 2 10 3 19 3 29v26c0 10-1 19-3 29-2 9-5 18-8 27-4 9-8 17-14 25-5 8-11 15-18 22-7 8-14 14-22 19s-16 10-25 14c-9 3-18 6-27 8-10 2-19 3-29 3-9 0-19-1-28-3s-19-5-27-8c-9-4-18-9-25-14-9-5-17-11-24-19-6-7-12-14-18-22-5-8-9-16-13-25s-7-18-8-27c-2-10-3-19-3-29z">
          <text:p/>
        </draw:path>
        <draw:frame draw:style-name="gr7" draw:text-style-name="P8" draw:layer="layout" svg:width="0.698cm" svg:height="0.412cm" svg:x="7.977cm" svg:y="9.507cm">
          <draw:text-box>
            <text:p text:style-name="P3"><text:span text:style-name="T36">time</text:span></text:p>
          </draw:text-box>
        </draw:frame>
        <draw:frame draw:style-name="gr35" draw:text-style-name="P36" draw:layer="layout" svg:width="0.223cm" svg:height="0.251cm" svg:x="13.844cm" svg:y="8.158cm">
          <draw:text-box>
            <text:p text:style-name="P3"><text:span text:style-name="T34">3</text:span></text:p>
          </draw:text-box>
        </draw:frame>
        <draw:path draw:style-name="gr17" draw:text-style-name="P18" draw:layer="layout" svg:width="0.106cm" svg:height="0.106cm" svg:x="13.599cm" svg:y="8.704cm" svg:viewBox="0 0 107 107" svg:d="M107 53c0 7-1 15-5 21-3 7-7 13-12 18s-10 8-17 11c-6 3-13 4-20 4s-14-1-20-4c-7-3-12-6-17-11s-9-11-12-18c-3-6-4-14-4-21s1-14 4-20c3-7 7-12 12-17s10-9 17-12c6-2 13-4 20-4s14 2 20 4c7 3 12 7 17 12s9 10 12 17c4 6 5 13 5 20z">
          <text:p/>
        </draw:path>
        <draw:frame draw:style-name="gr13" draw:text-style-name="P14" draw:layer="layout" svg:width="3.164cm" svg:height="0.454cm" svg:x="14.137cm" svg:y="7.992cm">
          <draw:text-box>
            <text:p text:style-name="P3"><text:span text:style-name="T10"><text:s/></text:span><text:span text:style-name="T35">Socratic Wizard</text:span></text:p>
          </draw:text-box>
        </draw:frame>
        <draw:frame draw:style-name="gr7" draw:text-style-name="P8" draw:layer="layout" svg:width="4.239cm" svg:height="0.412cm" svg:x="14.004cm" svg:y="8.528cm">
          <draw:text-box>
            <text:p text:style-name="P3"><text:span text:style-name="T36">Opt-in clarifying questions</text:span></text:p>
          </draw:text-box>
        </draw:frame>
        <draw:path draw:style-name="gr8" draw:text-style-name="P9" draw:layer="layout" svg:width="5.847cm" svg:height="2.672cm" svg:x="19.314cm" svg:y="7.699cm" svg:viewBox="0 0 5848 2673" svg:d="M31 31c21-21 46-31 75-31h5637c29 0 54 10 74 31 21 21 31 45 31 75v2461c0 30-10 55-31 75-20 21-45 31-74 31h-5637c-29 0-54-10-75-31-21-20-31-45-31-75v-2461c0-30 10-54 31-75z">
          <text:p/>
        </draw:path>
        <draw:polygon draw:style-name="gr2" draw:text-style-name="P2" draw:layer="layout" svg:width="5.847cm" svg:height="0.066cm" svg:x="19.314cm" svg:y="7.699cm" svg:viewBox="0 0 5848 67" draw:points="5785,67 0,67 0,0 5848,0 5848,3">
          <text:p/>
        </draw:polygon>
        <draw:path draw:style-name="gr2" draw:text-style-name="P2" draw:layer="layout" svg:width="5.77cm" svg:height="0.051cm" svg:x="19.362cm" svg:y="10.32cm" svg:viewBox="0 0 5771 52" svg:d="M47 20c4 4 7 6 11 6h5637c21 0 40-8 56-25 0 0 1 0 1-1l19 20c-1 0-1 1-2 1-20 21-45 31-74 31h-5637c-22 0-41-5-58-17z">
          <text:p/>
        </draw:path>
        <draw:path draw:style-name="gr2" draw:text-style-name="P2" draw:layer="layout" svg:width="0.049cm" svg:height="2.61cm" svg:x="25.112cm" svg:y="7.73cm" svg:viewBox="0 0 50 2611" svg:d="M0 2592c16-15 24-34 24-56v-2461c0-22-8-41-24-56l19-19c21 21 31 45 31 75v2461c0 30-10 55-31 75z">
          <text:p/>
        </draw:path>
        <draw:path draw:style-name="gr2" draw:text-style-name="P2" draw:layer="layout" svg:width="0.096cm" svg:height="2.64cm" svg:x="19.314cm" svg:y="7.715cm" svg:viewBox="0 0 97 2641" svg:d="M97 16c-3 4-6 10-9 18-5 15-8 34-8 56v2461c0 22 3 41 8 56 3 8 6 14 9 18l-47 16c-6-4-12-9-18-15-22-20-32-45-32-75v-2461c0-30 10-54 32-75 6-6 12-11 18-15z">
          <text:p/>
        </draw:path>
        <draw:path draw:style-name="gr2" draw:text-style-name="P2" draw:layer="layout" svg:width="0.317cm" svg:height="0.318cm" svg:x="19.764cm" svg:y="8.122cm" svg:viewBox="0 0 318 319" svg:d="M0 161v-4c0-10 1-21 3-31s5-20 9-29c4-10 9-19 14-27 6-9 12-17 20-24s16-14 25-19c8-6 17-11 27-15 9-4 19-7 29-9s20-3 31-3h4c10 0 20 1 30 3s20 5 30 9c9 4 18 9 27 15 8 5 16 12 23 19 8 7 14 15 20 24 6 8 11 17 14 27 4 9 7 19 9 29s3 21 3 31v4c0 10-1 20-3 31-2 10-5 19-9 29-3 9-8 18-14 27s-12 17-20 24c-7 8-15 15-23 20-9 6-18 11-27 15-10 4-20 7-30 9s-20 3-30 3h-4c-11 0-21-1-31-3s-20-5-29-9c-10-4-19-9-27-15-9-5-17-12-25-20-8-7-14-15-20-24-5-9-10-18-14-27-4-10-7-19-9-29-2-11-3-21-3-31z">
          <text:p/>
        </draw:path>
        <draw:frame draw:style-name="gr7" draw:text-style-name="P8" draw:layer="layout" svg:width="2.172cm" svg:height="0.412cm" svg:x="14.004cm" svg:y="9.031cm">
          <draw:text-box>
            <text:p text:style-name="P3"><text:span text:style-name="T36">(capped at 3)</text:span></text:p>
          </draw:text-box>
        </draw:frame>
        <draw:frame draw:style-name="gr35" draw:text-style-name="P36" draw:layer="layout" svg:width="0.223cm" svg:height="0.251cm" svg:x="19.871cm" svg:y="8.158cm">
          <draw:text-box>
            <text:p text:style-name="P3"><text:span text:style-name="T34">4</text:span></text:p>
          </draw:text-box>
        </draw:frame>
        <draw:path draw:style-name="gr17" draw:text-style-name="P18" draw:layer="layout" svg:width="0.105cm" svg:height="0.106cm" svg:x="19.632cm" svg:y="8.704cm" svg:viewBox="0 0 106 107" svg:d="M106 53c0 7-1 15-4 21-2 7-6 13-11 18s-11 8-17 11c-7 3-13 4-22 4-7 0-13-1-20-4-6-3-12-6-17-11s-9-11-11-18c-3-6-4-14-4-21s1-14 4-20c2-7 6-12 11-17s11-9 17-12c7-2 13-4 20-4 9 0 15 2 22 4 6 3 12 7 17 12s9 10 11 17c3 6 4 13 4 20z">
          <text:p/>
        </draw:path>
        <draw:frame draw:style-name="gr13" draw:text-style-name="P14" draw:layer="layout" svg:width="3.389cm" svg:height="0.454cm" svg:x="20.164cm" svg:y="7.992cm">
          <draw:text-box>
            <text:p text:style-name="P3"><text:span text:style-name="T10"><text:s/></text:span><text:span text:style-name="T35">Split-Pane Editor</text:span></text:p>
          </draw:text-box>
        </draw:frame>
        <draw:path draw:style-name="gr33" draw:text-style-name="P34" draw:layer="layout" svg:width="2.434cm" svg:height="0.449cm" svg:x="20.558cm" svg:y="8.546cm" svg:viewBox="0 0 2435 450" svg:d="M0 371v-292c0-11 2-21 6-30 4-10 9-19 17-26 7-8 16-13 26-17 9-4 19-6 30-6h2276c11 0 21 2 31 6s18 9 26 17c7 7 13 16 17 26 4 9 6 19 6 30v292c0 10-2 21-6 30-4 10-10 19-17 26-8 8-16 13-26 17s-20 6-31 6h-2276c-11 0-21-2-30-6-10-4-19-9-26-17-8-7-13-16-17-26-4-9-6-20-6-30z">
          <text:p/>
        </draw:path>
        <draw:frame draw:style-name="gr7" draw:text-style-name="P8" draw:layer="layout" svg:width="0.575cm" svg:height="0.412cm" svg:x="20.031cm" svg:y="8.528cm">
          <draw:text-box>
            <text:p text:style-name="P3"><text:span text:style-name="T36">Fill </text:span></text:p>
          </draw:text-box>
        </draw:frame>
        <draw:frame draw:style-name="gr36" draw:text-style-name="P37" draw:layer="layout" svg:width="1.778cm" svg:height="0.353cm" svg:x="20.647cm" svg:y="8.594cm">
          <draw:text-box>
            <text:p text:style-name="P3"><text:span text:style-name="T37">[GAP: Topic]</text:span></text:p>
          </draw:text-box>
        </draw:frame>
        <draw:frame draw:style-name="gr7" draw:text-style-name="P8" draw:layer="layout" svg:width="1.803cm" svg:height="0.412cm" svg:x="22.991cm" svg:y="8.528cm">
          <draw:text-box>
            <text:p text:style-name="P3"><text:span text:style-name="T36"><text:s/>templates,</text:span></text:p>
          </draw:text-box>
        </draw:frame>
        <draw:path draw:style-name="gr8" draw:text-style-name="P9" draw:layer="layout" svg:width="5.847cm" svg:height="2.672cm" svg:x="1.243cm" svg:y="10.98cm" svg:viewBox="0 0 5848 2673" svg:d="M31 31c21-21 46-31 75-31h5637c29 0 54 10 74 31 21 20 31 45 31 75v2461c0 29-10 54-31 75-20 21-45 31-75 31h-5636c-29 0-54-10-75-31s-31-46-31-75v-2461c0-30 10-55 31-75z">
          <text:p/>
        </draw:path>
        <draw:polygon draw:style-name="gr2" draw:text-style-name="P2" draw:layer="layout" svg:width="5.847cm" svg:height="0.066cm" svg:x="1.243cm" svg:y="10.98cm" svg:viewBox="0 0 5848 67" draw:points="5785,67 0,67 0,0 5848,0 5848,2">
          <text:p/>
        </draw:polygon>
        <draw:path draw:style-name="gr2" draw:text-style-name="P2" draw:layer="layout" svg:width="5.77cm" svg:height="0.051cm" svg:x="1.291cm" svg:y="13.601cm" svg:viewBox="0 0 5771 52" svg:d="M47 18c4 4 7 7 11 7h5636c22 0 41-8 57-24l1-1 19 19c-1 0-1 1-2 1-20 21-45 32-75 32h-5636c-22 0-41-6-58-18z">
          <text:p/>
        </draw:path>
        <draw:path draw:style-name="gr2" draw:text-style-name="P2" draw:layer="layout" svg:width="0.049cm" svg:height="2.61cm" svg:x="7.041cm" svg:y="11.011cm" svg:viewBox="0 0 50 2611" svg:d="M0 2592c15-15 23-34 23-56v-2461c0-22-8-41-23-57l18-18c21 20 32 45 32 75v2461c0 29-11 54-32 75z">
          <text:p/>
        </draw:path>
        <draw:polygon draw:style-name="gr2" draw:text-style-name="P2" draw:layer="layout" svg:width="5.847cm" svg:height="2.672cm" svg:x="1.243cm" svg:y="10.98cm" svg:viewBox="0 0 5848 2673" draw:points="0,0 5848,0 5848,2673 0,2673">
          <text:p/>
        </draw:polygon>
        <draw:path draw:style-name="gr2" draw:text-style-name="P2" draw:layer="layout" svg:width="0.317cm" svg:height="0.318cm" svg:x="1.693cm" svg:y="11.403cm" svg:viewBox="0 0 318 319" svg:d="M0 161v-4c0-11 1-21 3-31s5-20 9-29c4-10 9-19 14-27 6-9 12-17 20-24s16-14 24-20c9-5 18-10 28-14 9-4 19-7 29-9s20-3 31-3h4c10 0 20 1 30 3s20 5 30 9c9 4 18 9 27 14 8 6 16 13 23 20 8 7 14 15 20 24 6 8 10 17 14 27 4 9 7 19 9 29s3 20 3 31v4c0 11-1 21-3 31-2 11-5 20-9 30-4 9-8 18-14 27-6 8-12 16-20 24-7 7-15 13-23 19-9 6-18 11-27 15-10 4-20 7-30 9s-20 3-30 3h-4c-11 0-21-1-31-3s-20-5-29-9c-10-4-19-9-28-15-8-6-16-12-24-19-8-8-14-16-20-24-5-9-10-18-14-27-4-10-7-19-9-30-2-10-3-20-3-31z">
          <text:p/>
        </draw:path>
        <draw:frame draw:style-name="gr7" draw:text-style-name="P8" draw:layer="layout" svg:width="2.152cm" svg:height="0.412cm" svg:x="20.031cm" svg:y="9.031cm">
          <draw:text-box>
            <text:p text:style-name="P3"><text:span text:style-name="T36">then approve</text:span></text:p>
          </draw:text-box>
        </draw:frame>
        <draw:frame draw:style-name="gr35" draw:text-style-name="P36" draw:layer="layout" svg:width="0.223cm" svg:height="0.251cm" svg:x="1.79cm" svg:y="11.439cm">
          <draw:text-box>
            <text:p text:style-name="P3"><text:span text:style-name="T34">5</text:span></text:p>
          </draw:text-box>
        </draw:frame>
        <draw:path draw:style-name="gr17" draw:text-style-name="P18" draw:layer="layout" svg:width="0.105cm" svg:height="0.106cm" svg:x="1.561cm" svg:y="11.985cm" svg:viewBox="0 0 106 107" svg:d="M106 54c0 7-1 14-4 20-2 7-6 12-11 17s-11 9-17 12c-8 3-15 4-22 4s-13-1-20-4c-6-3-12-7-17-12s-9-10-11-17c-3-6-4-13-4-20s1-14 4-21c2-7 6-12 11-17s11-9 17-12c7-3 13-4 20-4s14 1 22 4c6 3 12 7 17 12s9 10 11 17c3 7 4 14 4 21z">
          <text:p/>
        </draw:path>
        <draw:frame draw:style-name="gr13" draw:text-style-name="P14" draw:layer="layout" svg:width="2.961cm" svg:height="0.454cm" svg:x="2.082cm" svg:y="11.273cm">
          <draw:text-box>
            <text:p text:style-name="P3"><text:span text:style-name="T10"><text:s/></text:span><text:span text:style-name="T35">Technical Plan</text:span></text:p>
          </draw:text-box>
        </draw:frame>
        <draw:frame draw:style-name="gr7" draw:text-style-name="P8" draw:layer="layout" svg:width="4.403cm" svg:height="0.412cm" svg:x="1.95cm" svg:y="11.809cm">
          <draw:text-box>
            <text:p text:style-name="P3"><text:span text:style-name="T36">Architecture review — edit,</text:span></text:p>
          </draw:text-box>
        </draw:frame>
        <draw:frame draw:style-name="gr7" draw:text-style-name="P8" draw:layer="layout" svg:width="4.669cm" svg:height="0.412cm" svg:x="1.95cm" svg:y="12.312cm">
          <draw:text-box>
            <text:p text:style-name="P3"><text:span text:style-name="T36">approve, or reject (backward</text:span></text:p>
          </draw:text-box>
        </draw:frame>
        <draw:path draw:style-name="gr8" draw:text-style-name="P9" draw:layer="layout" svg:width="5.847cm" svg:height="2.672cm" svg:x="7.276cm" svg:y="10.98cm" svg:viewBox="0 0 5848 2673" svg:d="M31 31c20-21 45-31 74-31h5637c29 0 54 10 75 31 21 20 31 45 31 75v2461c0 29-10 54-31 75s-46 31-75 31h-5637c-29 0-54-10-74-31-21-21-31-46-31-75v-2461c0-30 10-55 31-75z">
          <text:p/>
        </draw:path>
        <draw:polygon draw:style-name="gr2" draw:text-style-name="P2" draw:layer="layout" svg:width="5.847cm" svg:height="0.066cm" svg:x="7.276cm" svg:y="10.98cm" svg:viewBox="0 0 5848 67" draw:points="5784,67 0,67 0,0 5848,0 5848,2">
          <text:p/>
        </draw:polygon>
        <draw:path draw:style-name="gr2" draw:text-style-name="P2" draw:layer="layout" svg:width="5.769cm" svg:height="0.051cm" svg:x="7.324cm" svg:y="13.601cm" svg:viewBox="0 0 5770 52" svg:d="M47 18c3 4 7 7 10 7h5637c22 0 41-8 56-24 1 0 1-1 1-1l19 19-1 1c-21 21-46 32-75 32h-5637c-21 0-40-6-57-18z">
          <text:p/>
        </draw:path>
        <draw:path draw:style-name="gr2" draw:text-style-name="P2" draw:layer="layout" svg:width="0.05cm" svg:height="2.61cm" svg:x="13.073cm" svg:y="11.011cm" svg:viewBox="0 0 51 2611" svg:d="M0 2592c16-15 23-34 23-56v-2461c0-22-7-41-23-57l19-18c22 20 32 45 32 75v2461c0 29-10 54-32 75z">
          <text:p/>
        </draw:path>
        <draw:polygon draw:style-name="gr2" draw:text-style-name="P2" draw:layer="layout" svg:width="5.847cm" svg:height="2.672cm" svg:x="7.276cm" svg:y="10.98cm" svg:viewBox="0 0 5848 2673" draw:points="0,0 5848,0 5848,2673 0,2673">
          <text:p/>
        </draw:polygon>
        <draw:path draw:style-name="gr2" draw:text-style-name="P2" draw:layer="layout" svg:width="0.318cm" svg:height="0.318cm" svg:x="7.725cm" svg:y="11.403cm" svg:viewBox="0 0 319 319" svg:d="M0 161v-4c0-11 1-21 3-31s5-20 9-29c4-10 9-19 15-27 5-9 12-17 20-24 7-7 15-14 24-20 9-5 18-10 27-14 10-4 19-7 29-9 11-2 21-3 31-3h4c10 0 21 1 31 3s20 5 29 9c10 4 19 9 27 14 9 6 17 13 24 20s14 15 19 24c6 8 11 17 15 27 4 9 7 19 9 29s3 20 3 31v4c0 11-1 21-3 31-2 11-5 20-9 30-4 9-9 18-15 27-5 8-12 16-19 24-7 7-15 13-24 19-8 6-17 11-27 15-9 4-19 7-29 9s-21 3-31 3h-4c-10 0-20-1-31-3-10-2-19-5-29-9-9-4-18-9-27-15s-17-12-24-19c-8-8-15-16-20-24-6-9-11-18-15-27-4-10-7-19-9-30-2-10-3-20-3-31z">
          <text:p/>
        </draw:path>
        <draw:frame draw:style-name="gr7" draw:text-style-name="P8" draw:layer="layout" svg:width="0.718cm" svg:height="0.412cm" svg:x="1.95cm" svg:y="12.788cm">
          <draw:text-box>
            <text:p text:style-name="P3"><text:span text:style-name="T36">nav)</text:span></text:p>
          </draw:text-box>
        </draw:frame>
        <draw:frame draw:style-name="gr35" draw:text-style-name="P36" draw:layer="layout" svg:width="0.223cm" svg:height="0.251cm" svg:x="7.817cm" svg:y="11.439cm">
          <draw:text-box>
            <text:p text:style-name="P3"><text:span text:style-name="T34">6</text:span></text:p>
          </draw:text-box>
        </draw:frame>
        <draw:path draw:style-name="gr17" draw:text-style-name="P18" draw:layer="layout" svg:width="0.106cm" svg:height="0.106cm" svg:x="7.593cm" svg:y="11.985cm" svg:viewBox="0 0 107 107" svg:d="M107 54c0 7-1 14-4 20-3 7-7 12-12 17s-10 9-17 12c-6 3-13 4-20 4s-14-1-20-4c-7-3-12-7-18-12-5-5-9-10-12-17-3-6-4-13-4-20s1-14 4-21 7-12 12-17c6-5 11-9 18-12 6-3 13-4 20-4s14 1 20 4c7 3 12 7 17 12s9 10 12 17 4 14 4 21z">
          <text:p/>
        </draw:path>
        <draw:frame draw:style-name="gr13" draw:text-style-name="P14" draw:layer="layout" svg:width="3.458cm" svg:height="0.454cm" svg:x="8.109cm" svg:y="11.273cm">
          <draw:text-box>
            <text:p text:style-name="P3"><text:span text:style-name="T10"><text:s/></text:span><text:span text:style-name="T35">Procedural Steps</text:span></text:p>
          </draw:text-box>
        </draw:frame>
        <draw:frame draw:style-name="gr7" draw:text-style-name="P8" draw:layer="layout" svg:width="3.707cm" svg:height="0.412cm" svg:x="7.977cm" svg:y="11.809cm">
          <draw:text-box>
            <text:p text:style-name="P3"><text:span text:style-name="T36">Granular checklist with</text:span></text:p>
          </draw:text-box>
        </draw:frame>
        <draw:path draw:style-name="gr8" draw:text-style-name="P9" draw:layer="layout" svg:width="5.821cm" svg:height="2.672cm" svg:x="13.308cm" svg:y="10.98cm" svg:viewBox="0 0 5822 2673" svg:d="M31 31c21-21 46-31 75-31h5610c29 0 54 10 75 31 21 20 31 45 31 75v2461c0 29-10 54-31 75s-46 31-75 31h-5610c-29 0-54-10-75-31s-31-46-31-75v-2461c0-30 10-55 31-75z">
          <text:p/>
        </draw:path>
        <draw:polygon draw:style-name="gr2" draw:text-style-name="P2" draw:layer="layout" svg:width="5.821cm" svg:height="0.066cm" svg:x="13.308cm" svg:y="10.98cm" svg:viewBox="0 0 5822 67" draw:points="5758,67 0,67 0,0 5822,0 5822,2">
          <text:p/>
        </draw:polygon>
        <draw:path draw:style-name="gr2" draw:text-style-name="P2" draw:layer="layout" svg:width="5.743cm" svg:height="0.051cm" svg:x="13.356cm" svg:y="13.601cm" svg:viewBox="0 0 5744 52" svg:d="M47 18c4 4 7 7 11 7h5610c22 0 41-8 56-24 1 0 1-1 1-1l19 19-1 1c-21 21-46 32-75 32h-5610c-22 0-41-6-58-18z">
          <text:p/>
        </draw:path>
        <draw:path draw:style-name="gr2" draw:text-style-name="P2" draw:layer="layout" svg:width="0.05cm" svg:height="2.61cm" svg:x="19.079cm" svg:y="11.011cm" svg:viewBox="0 0 51 2611" svg:d="M0 2592c17-15 24-34 24-56v-2461c0-22-7-41-24-57l20-18c21 20 31 45 31 75v2461c0 29-10 54-31 75z">
          <text:p/>
        </draw:path>
        <draw:polygon draw:style-name="gr2" draw:text-style-name="P2" draw:layer="layout" svg:width="5.821cm" svg:height="2.672cm" svg:x="13.308cm" svg:y="10.98cm" svg:viewBox="0 0 5822 2673" draw:points="0,0 5822,0 5822,2673 0,2673">
          <text:p/>
        </draw:polygon>
        <draw:path draw:style-name="gr2" draw:text-style-name="P2" draw:layer="layout" svg:width="0.291cm" svg:height="0.318cm" svg:x="13.758cm" svg:y="11.403cm" svg:viewBox="0 0 292 319" svg:d="M0 173v-27c0-10 1-19 3-29 1-9 4-18 8-27s8-17 13-25c6-8 12-16 18-22 7-7 15-13 24-18 7-6 16-10 25-14 8-4 18-6 27-8s19-3 28-3c10 0 19 1 29 3 9 2 18 4 27 8s17 8 25 14c8 5 15 11 22 18 7 6 13 14 18 22 6 8 10 16 14 25 3 9 6 18 8 27 2 10 3 19 3 29v27c0 10-1 19-3 28-2 10-5 19-8 28-4 8-8 17-14 25-5 8-11 15-18 22s-14 13-22 18-16 10-25 13c-9 4-18 7-27 9-10 2-19 3-29 3-9 0-19-1-28-3s-19-5-27-9c-9-3-18-8-25-13-9-5-17-11-24-18-6-7-12-14-18-22-5-8-9-17-13-25-4-9-7-18-8-28-2-9-3-18-3-28z">
          <text:p/>
        </draw:path>
        <draw:frame draw:style-name="gr7" draw:text-style-name="P8" draw:layer="layout" svg:width="2.274cm" svg:height="0.412cm" svg:x="7.977cm" svg:y="12.312cm">
          <draw:text-box>
            <text:p text:style-name="P3"><text:span text:style-name="T36">bracketed IDs</text:span></text:p>
          </draw:text-box>
        </draw:frame>
        <draw:frame draw:style-name="gr35" draw:text-style-name="P36" draw:layer="layout" svg:width="0.223cm" svg:height="0.251cm" svg:x="13.844cm" svg:y="11.439cm">
          <draw:text-box>
            <text:p text:style-name="P3"><text:span text:style-name="T34">7</text:span></text:p>
          </draw:text-box>
        </draw:frame>
        <draw:path draw:style-name="gr17" draw:text-style-name="P18" draw:layer="layout" svg:width="0.106cm" svg:height="0.106cm" svg:x="13.599cm" svg:y="11.985cm" svg:viewBox="0 0 107 107" svg:d="M107 54c0 7-1 14-5 20-3 7-7 12-12 17s-10 9-17 12c-6 3-13 4-20 4s-14-1-20-4c-7-3-12-7-17-12s-9-10-12-17c-3-6-4-13-4-20s1-14 4-21 7-12 12-17 10-9 17-12c6-3 13-4 20-4s14 1 20 4c7 3 12 7 17 12s9 10 12 17c4 7 5 14 5 21z">
          <text:p/>
        </draw:path>
        <draw:frame draw:style-name="gr13" draw:text-style-name="P14" draw:layer="layout" svg:width="3.683cm" svg:height="0.454cm" svg:x="14.137cm" svg:y="11.273cm">
          <draw:text-box>
            <text:p text:style-name="P3"><text:span text:style-name="T10"><text:s/></text:span><text:span text:style-name="T35">Step-by-Step Exec</text:span></text:p>
          </draw:text-box>
        </draw:frame>
        <draw:frame draw:style-name="gr7" draw:text-style-name="P8" draw:layer="layout" svg:width="4.649cm" svg:height="0.412cm" svg:x="14.004cm" svg:y="11.809cm">
          <draw:text-box>
            <text:p text:style-name="P3"><text:span text:style-name="T36">Context hydration → LLM →</text:span></text:p>
          </draw:text-box>
        </draw:frame>
        <draw:path draw:style-name="gr33" draw:text-style-name="P34" draw:layer="layout" svg:width="1.296cm" svg:height="0.449cm" svg:x="16.827cm" svg:y="12.303cm" svg:viewBox="0 0 1297 450" svg:d="M0 371v-291c0-11 2-21 6-30 4-11 10-20 17-27 8-8 16-13 26-17s20-6 30-6h1139c11 0 21 2 30 6 10 4 19 9 26 17 8 7 13 16 17 27 4 9 6 19 6 30v291c0 11-2 21-6 30-4 10-9 19-17 26-7 8-16 13-26 17-9 4-19 6-30 6h-1139c-10 0-20-2-30-6s-18-9-26-17c-7-7-13-16-17-26-4-9-6-19-6-30z">
          <text:p/>
        </draw:path>
        <draw:frame draw:style-name="gr7" draw:text-style-name="P8" draw:layer="layout" svg:width="2.97cm" svg:height="0.412cm" svg:x="14.004cm" svg:y="12.312cm">
          <draw:text-box>
            <text:p text:style-name="P3"><text:span text:style-name="T36">Approval with live </text:span></text:p>
          </draw:text-box>
        </draw:frame>
        <draw:frame draw:style-name="gr36" draw:text-style-name="P37" draw:layer="layout" svg:width="0.898cm" svg:height="0.353cm" svg:x="16.917cm" svg:y="12.351cm">
          <draw:text-box>
            <text:p text:style-name="P3"><text:span text:style-name="T37">Ctrl+D</text:span></text:p>
          </draw:text-box>
        </draw:frame>
        <draw:path draw:style-name="gr8" draw:text-style-name="P9" draw:layer="layout" svg:width="5.847cm" svg:height="2.672cm" svg:x="19.314cm" svg:y="10.98cm" svg:viewBox="0 0 5848 2673" svg:d="M31 31c21-21 46-31 75-31h5637c29 0 54 10 74 31 21 20 31 45 31 75v2461c0 29-10 54-31 75-20 21-45 31-74 31h-5637c-29 0-54-10-75-31s-31-46-31-75v-2461c0-30 10-55 31-75z">
          <text:p/>
        </draw:path>
        <draw:polygon draw:style-name="gr2" draw:text-style-name="P2" draw:layer="layout" svg:width="5.847cm" svg:height="0.066cm" svg:x="19.314cm" svg:y="10.98cm" svg:viewBox="0 0 5848 67" draw:points="5785,67 0,67 0,0 5848,0 5848,2">
          <text:p/>
        </draw:polygon>
        <draw:path draw:style-name="gr2" draw:text-style-name="P2" draw:layer="layout" svg:width="5.77cm" svg:height="0.051cm" svg:x="19.362cm" svg:y="13.601cm" svg:viewBox="0 0 5771 52" svg:d="M47 18c4 4 7 7 11 7h5637c21 0 40-8 56-24l1-1 19 19c-1 0-1 1-2 1-20 21-45 32-74 32h-5637c-22 0-41-6-58-18z">
          <text:p/>
        </draw:path>
        <draw:path draw:style-name="gr2" draw:text-style-name="P2" draw:layer="layout" svg:width="0.049cm" svg:height="2.61cm" svg:x="25.112cm" svg:y="11.011cm" svg:viewBox="0 0 50 2611" svg:d="M0 2592c16-15 24-34 24-56v-2461c0-22-8-41-24-57l19-18c21 20 31 45 31 75v2461c0 29-10 54-31 75z">
          <text:p/>
        </draw:path>
        <draw:path draw:style-name="gr2" draw:text-style-name="P2" draw:layer="layout" svg:width="0.096cm" svg:height="2.64cm" svg:x="19.314cm" svg:y="10.996cm" svg:viewBox="0 0 97 2641" svg:d="M97 16c-3 4-6 9-9 17-5 16-8 35-8 57v2461c0 22 3 41 8 56 3 8 6 14 9 18l-47 16c-6-4-12-9-18-15-22-21-32-46-32-75v-2461c0-30 10-55 32-75 6-6 12-11 18-15z">
          <text:p/>
        </draw:path>
        <draw:path draw:style-name="gr2" draw:text-style-name="P2" draw:layer="layout" svg:width="0.317cm" svg:height="0.318cm" svg:x="19.764cm" svg:y="11.403cm" svg:viewBox="0 0 318 319" svg:d="M0 161v-4c0-11 1-21 3-31s5-20 9-29c4-10 9-19 14-27 6-9 12-17 20-24s16-14 25-20c8-5 17-10 27-14 9-4 19-7 29-9s20-3 31-3h4c10 0 20 1 30 3s20 5 30 9c9 4 18 9 27 14 8 6 16 13 23 20 8 7 14 15 20 24 6 8 11 17 14 27 4 9 7 19 9 29s3 20 3 31v4c0 11-1 21-3 31-2 11-5 20-9 30-3 9-8 18-14 27-6 8-12 16-20 24-7 7-15 13-23 19-9 6-18 11-27 15-10 4-20 7-30 9s-20 3-30 3h-4c-11 0-21-1-31-3s-20-5-29-9c-10-4-19-9-27-15-9-6-17-12-25-19-8-8-14-16-20-24-5-9-10-18-14-27-4-10-7-19-9-30-2-10-3-20-3-31z">
          <text:p/>
        </draw:path>
        <draw:frame draw:style-name="gr7" draw:text-style-name="P8" draw:layer="layout" svg:width="0.693cm" svg:height="0.412cm" svg:x="14.004cm" svg:y="12.788cm">
          <draw:text-box>
            <text:p text:style-name="P3"><text:span text:style-name="T36">diﬀs</text:span></text:p>
          </draw:text-box>
        </draw:frame>
        <draw:frame draw:style-name="gr35" draw:text-style-name="P36" draw:layer="layout" svg:width="0.223cm" svg:height="0.251cm" svg:x="19.871cm" svg:y="11.439cm">
          <draw:text-box>
            <text:p text:style-name="P3"><text:span text:style-name="T34">8</text:span></text:p>
          </draw:text-box>
        </draw:frame>
        <draw:path draw:style-name="gr17" draw:text-style-name="P18" draw:layer="layout" svg:width="0.105cm" svg:height="0.106cm" svg:x="19.632cm" svg:y="11.985cm" svg:viewBox="0 0 106 107" svg:d="M106 54c0 7-1 14-4 20-2 7-6 12-11 17s-11 9-17 12c-7 3-13 4-22 4-7 0-13-1-20-4-6-3-12-7-17-12s-9-10-11-17c-3-6-4-13-4-20s1-14 4-21c2-7 6-12 11-17s11-9 17-12c7-3 13-4 20-4 9 0 15 1 22 4 6 3 12 7 17 12s9 10 11 17c3 7 4 14 4 21z">
          <text:p/>
        </draw:path>
        <draw:frame draw:style-name="gr13" draw:text-style-name="P14" draw:layer="layout" svg:width="3.863cm" svg:height="0.454cm" svg:x="20.164cm" svg:y="11.273cm">
          <draw:text-box>
            <text:p text:style-name="P3"><text:span text:style-name="T10"><text:s/></text:span><text:span text:style-name="T35">Verification &amp; Done</text:span></text:p>
          </draw:text-box>
        </draw:frame>
        <draw:frame draw:style-name="gr7" draw:text-style-name="P8" draw:layer="layout" svg:width="5.058cm" svg:height="0.412cm" svg:x="20.031cm" svg:y="11.809cm">
          <draw:text-box>
            <text:p text:style-name="P3"><text:span text:style-name="T36">All criteria checked, tests pass,</text:span></text:p>
          </draw:text-box>
        </draw:frame>
        <draw:polygon draw:style-name="gr6" draw:text-style-name="P7" draw:layer="layout" svg:width="0.714cm" svg:height="0.635cm" svg:x="25.479cm" svg:y="18.388cm" svg:viewBox="0 0 715 636" draw:points="0,0 715,0 715,636 0,636">
          <text:p/>
        </draw:polygon>
        <draw:frame draw:style-name="gr7" draw:text-style-name="P8" draw:layer="layout" svg:width="2.991cm" svg:height="0.412cm" svg:x="20.031cm" svg:y="12.312cm">
          <draw:text-box>
            <text:p text:style-name="P3"><text:span text:style-name="T36">audit log delivered</text:span></text:p>
          </draw:text-box>
        </draw:frame>
        <draw:frame draw:style-name="gr7" draw:text-style-name="P8" draw:layer="layout" svg:width="0.412cm" svg:height="0.412cm" svg:x="25.617cm" svg:y="18.503cm">
          <draw:text-box>
            <text:p text:style-name="P3"><text:span text:style-name="T6">11</text:span></text:p>
          </draw:text-box>
        </draw:frame>
      </draw:page>
      <draw:page draw:name="page12"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33cm" svg:height="2.726cm" svg:x="0.502cm" svg:y="4.788cm" svg:viewBox="0 0 12331 2727" svg:d="M31 31c21-20 46-31 75-31h12119c29 0 54 11 75 31 20 21 31 46 31 75v2515c0 29-11 54-31 75-21 20-46 31-75 31h-12119c-29 0-54-11-75-31-20-21-31-46-31-75v-2515c0-29 11-54 31-75z">
          <text:p/>
        </draw:path>
        <draw:polygon draw:style-name="gr2" draw:text-style-name="P2" draw:layer="layout" svg:width="12.33cm" svg:height="0.067cm" svg:x="0.502cm" svg:y="4.788cm" svg:viewBox="0 0 12331 68" draw:points="12267,68 0,68 0,0 12331,0 12331,3">
          <text:p/>
        </draw:polygon>
        <draw:path draw:style-name="gr2" draw:text-style-name="P2" draw:layer="layout" svg:width="12.252cm" svg:height="0.051cm" svg:x="0.55cm" svg:y="7.463cm" svg:viewBox="0 0 12253 52" svg:d="M48 19c3 4 6 6 10 6h12119c22 0 41-8 56-24 1 0 1-1 1-1l19 19c0 1-1 1-1 2-21 20-46 31-75 31h-12119c-22 0-41-6-58-17z">
          <text:p/>
        </draw:path>
        <draw:path draw:style-name="gr2" draw:text-style-name="P2" draw:layer="layout" svg:width="0.05cm" svg:height="2.664cm" svg:x="12.782cm" svg:y="4.819cm" svg:viewBox="0 0 51 2665" svg:d="M0 2646c16-16 23-34 23-56v-2515c0-22-7-40-23-56l19-19c21 21 32 46 32 75v2515c0 29-11 54-32 75z">
          <text:p/>
        </draw:path>
        <draw:polygon draw:style-name="gr2" draw:text-style-name="P2" draw:layer="layout" svg:width="12.33cm" svg:height="2.726cm" svg:x="0.502cm" svg:y="4.788cm" svg:viewBox="0 0 12331 2727" draw:points="0,0 12331,0 12331,2727 0,2727">
          <text:p/>
        </draw:polygon>
        <draw:path draw:style-name="gr8" draw:text-style-name="P9" draw:layer="layout" svg:width="12.33cm" svg:height="2.302cm" svg:x="0.502cm" svg:y="7.725cm" svg:viewBox="0 0 12331 2303" svg:d="M31 31c21-20 46-31 75-31h12119c29 0 54 11 75 31 20 21 31 46 31 75v2091c0 30-11 55-31 75-21 21-46 31-75 31h-12119c-29 0-54-10-75-31-20-20-31-45-31-75v-2091c0-29 11-54 31-75z">
          <text:p/>
        </draw:path>
        <draw:path draw:style-name="gr2" draw:text-style-name="P2" draw:layer="layout" svg:width="12.252cm" svg:height="0.051cm" svg:x="0.55cm" svg:y="7.725cm" svg:viewBox="0 0 12253 52" svg:d="M12234 52c0 0 0-1-1-1-15-15-34-23-56-23h-12119c-4 0-7 2-10 6l-48-16c17-11 36-18 58-18h12119c29 0 54 12 75 32 0 1 1 1 1 2z">
          <text:p/>
        </draw:path>
        <draw:path draw:style-name="gr2" draw:text-style-name="P2" draw:layer="layout" svg:width="12.252cm" svg:height="0.051cm" svg:x="0.55cm" svg:y="9.976cm" svg:viewBox="0 0 12253 52" svg:d="M48 19c3 4 6 6 10 6h12119c22 0 41-8 56-23 1-1 1-1 1-2l19 19-1 1c-21 21-46 32-75 32h-12119c-22 0-41-5-58-18z">
          <text:p/>
        </draw:path>
        <draw:path draw:style-name="gr2" draw:text-style-name="P2" draw:layer="layout" svg:width="0.05cm" svg:height="2.24cm" svg:x="12.782cm" svg:y="7.756cm" svg:viewBox="0 0 51 2241" svg:d="M0 2223c16-16 23-35 23-57v-2091c0-22-7-40-23-56l19-19c21 21 32 46 32 75v2091c0 30-11 55-32 75z">
          <text:p/>
        </draw:path>
        <draw:polygon draw:style-name="gr2" draw:text-style-name="P2" draw:layer="layout" svg:width="12.33cm" svg:height="2.302cm" svg:x="0.502cm" svg:y="7.725cm" svg:viewBox="0 0 12331 2303" draw:points="0,0 12331,0 12331,2303 0,2303">
          <text:p/>
        </draw:polygon>
        <draw:path draw:style-name="gr8" draw:text-style-name="P9" draw:layer="layout" svg:width="12.33cm" svg:height="2.725cm" svg:x="0.502cm" svg:y="10.239cm" svg:viewBox="0 0 12331 2726" svg:d="M31 31c21-21 46-31 75-31h12119c29 0 54 10 75 31 20 21 31 45 31 75v2514c0 29-11 54-31 75-21 21-46 31-75 31h-12119c-29 0-54-10-75-31-20-21-31-46-31-75v-2514c0-30 11-54 31-75z">
          <text:p/>
        </draw:path>
        <draw:polygon draw:style-name="gr2" draw:text-style-name="P2" draw:layer="layout" svg:width="12.33cm" svg:height="0.066cm" svg:x="0.502cm" svg:y="10.239cm" svg:viewBox="0 0 12331 67" draw:points="12267,67 0,67 0,0 12331,0 12331,3">
          <text:p/>
        </draw:polygon>
        <draw:path draw:style-name="gr2" draw:text-style-name="P2" draw:layer="layout" svg:width="12.252cm" svg:height="0.051cm" svg:x="0.55cm" svg:y="12.913cm" svg:viewBox="0 0 12253 52" svg:d="M48 19c3 5 6 7 10 7h12119c22 0 41-8 56-25 1 0 1-1 1-1l19 20-1 1c-21 21-46 31-75 31h-12119c-22 0-41-6-58-17z">
          <text:p/>
        </draw:path>
        <draw:path draw:style-name="gr2" draw:text-style-name="P2" draw:layer="layout" svg:width="0.05cm" svg:height="2.663cm" svg:x="12.782cm" svg:y="10.27cm" svg:viewBox="0 0 51 2664" svg:d="M0 2645c16-15 23-34 23-56v-2514c0-22-7-41-23-56l19-19c21 21 32 45 32 75v2514c0 29-11 54-32 75z">
          <text:p/>
        </draw:path>
        <draw:polygon draw:style-name="gr2" draw:text-style-name="P2" draw:layer="layout" svg:width="12.33cm" svg:height="2.725cm" svg:x="0.502cm" svg:y="10.239cm" svg:viewBox="0 0 12331 2726" draw:points="0,0 12331,0 12331,2726 0,2726">
          <text:p/>
        </draw:polygon>
        <draw:frame draw:style-name="gr9" draw:text-style-name="P10" draw:layer="layout" svg:width="8.608cm" svg:height="1.119cm" svg:x="8.66cm" svg:y="3.011cm">
          <draw:text-box>
            <text:p text:style-name="P3"><text:span text:style-name="T7">BUSINESS VALUE</text:span></text:p>
          </draw:text-box>
        </draw:frame>
        <draw:path draw:style-name="gr17" draw:text-style-name="P18" draw:layer="layout" svg:width="0.159cm" svg:height="0.159cm" svg:x="0.978cm" svg:y="6.111cm" svg:viewBox="0 0 160 160" svg:d="M160 80c0 10-2 20-6 30s-10 18-17 27c-7 7-16 13-26 17s-20 6-30 6c-11 0-21-2-31-6s-19-10-26-17c-8-9-13-17-17-27-5-10-7-20-7-30 0-11 2-21 7-31 4-9 9-18 17-25 7-8 16-14 26-18s20-6 31-6c10 0 20 2 30 6s19 10 26 18c7 7 13 16 17 25 4 10 6 20 6 31z">
          <text:p/>
        </draw:path>
        <draw:frame draw:style-name="gr20" draw:text-style-name="P21" draw:layer="layout" svg:width="4.218cm" svg:height="0.666cm" svg:x="1.027cm" svg:y="5.099cm">
          <draw:text-box>
            <text:p text:style-name="P3"><text:span text:style-name="T38">TRACEABILITY</text:span></text:p>
          </draw:text-box>
        </draw:frame>
        <draw:frame draw:style-name="gr18" draw:text-style-name="P19" draw:layer="layout" svg:width="11.136cm" svg:height="0.539cm" svg:x="1.46cm" svg:y="5.888cm">
          <draw:text-box>
            <text:p text:style-name="P3"><text:span text:style-name="T17">Every line of code traced to approved spec and plan</text:span></text:p>
          </draw:text-box>
        </draw:frame>
        <draw:frame draw:style-name="gr18" draw:text-style-name="P19" draw:layer="layout" svg:width="0.914cm" svg:height="0.539cm" svg:x="1.46cm" svg:y="6.496cm">
          <draw:text-box>
            <text:p text:style-name="P3"><text:span text:style-name="T17">step</text:span></text:p>
          </draw:text-box>
        </draw:frame>
        <draw:path draw:style-name="gr17" draw:text-style-name="P18" draw:layer="layout" svg:width="0.159cm" svg:height="0.159cm" svg:x="0.978cm" svg:y="9.26cm" svg:viewBox="0 0 160 160" svg:d="M160 79c0 11-2 21-6 31-4 9-10 18-17 25-7 9-16 15-26 19s-20 6-30 6c-11 0-21-2-31-6s-19-10-26-19c-8-7-13-16-17-25-5-10-7-20-7-31 0-10 2-20 7-30 4-10 9-18 17-26 7-7 16-13 26-17s20-6 31-6c10 0 20 2 30 6s19 10 26 17c7 8 13 16 17 26s6 20 6 30z">
          <text:p/>
        </draw:path>
        <draw:frame draw:style-name="gr20" draw:text-style-name="P21" draw:layer="layout" svg:width="2.307cm" svg:height="0.666cm" svg:x="1.027cm" svg:y="8.036cm">
          <draw:text-box>
            <text:p text:style-name="P3"><text:span text:style-name="T38">SAFETY</text:span></text:p>
          </draw:text-box>
        </draw:frame>
        <draw:frame draw:style-name="gr18" draw:text-style-name="P19" draw:layer="layout" svg:width="11.028cm" svg:height="0.539cm" svg:x="1.46cm" svg:y="9.036cm">
          <draw:text-box>
            <text:p text:style-name="P3"><text:span text:style-name="T17">No write/edit/bash executes without human consent</text:span></text:p>
          </draw:text-box>
        </draw:frame>
        <draw:path draw:style-name="gr17" draw:text-style-name="P18" draw:layer="layout" svg:width="0.159cm" svg:height="0.159cm" svg:x="0.978cm" svg:y="11.562cm" svg:viewBox="0 0 160 160" svg:d="M160 80c0 11-2 21-6 31-4 9-10 18-17 25-7 8-16 13-26 17-10 5-20 7-30 7-11 0-21-2-31-7-10-4-19-9-26-17-8-7-13-16-17-25-5-10-7-20-7-31 0-10 2-21 7-31 4-10 9-19 17-26 7-7 16-13 26-17s20-6 31-6c10 0 20 2 30 6s19 10 26 17 13 16 17 26 6 21 6 31z">
          <text:p/>
        </draw:path>
        <draw:frame draw:style-name="gr20" draw:text-style-name="P21" draw:layer="layout" svg:width="2.604cm" svg:height="0.666cm" svg:x="1.027cm" svg:y="10.55cm">
          <draw:text-box>
            <text:p text:style-name="P3"><text:span text:style-name="T38">PRIVACY</text:span></text:p>
          </draw:text-box>
        </draw:frame>
        <draw:frame draw:style-name="gr18" draw:text-style-name="P19" draw:layer="layout" svg:width="11.591cm" svg:height="0.539cm" svg:x="1.46cm" svg:y="11.338cm">
          <draw:text-box>
            <text:p text:style-name="P3"><text:span text:style-name="T17">No source code or context leaves the machine without</text:span></text:p>
          </draw:text-box>
        </draw:frame>
        <draw:path draw:style-name="gr8" draw:text-style-name="P9" draw:layer="layout" svg:width="12.329cm" svg:height="2.726cm" svg:x="13.573cm" svg:y="4.788cm" svg:viewBox="0 0 12330 2727" svg:d="M31 31c20-20 45-31 74-31h12119c30 0 55 11 75 31 21 21 31 46 31 75v2515c0 29-10 54-31 75-20 20-45 31-75 31h-12119c-29 0-54-11-74-31-21-21-31-46-31-75v-2515c0-29 10-54 31-75z">
          <text:p/>
        </draw:path>
        <draw:polygon draw:style-name="gr2" draw:text-style-name="P2" draw:layer="layout" svg:width="12.329cm" svg:height="0.067cm" svg:x="13.573cm" svg:y="4.788cm" svg:viewBox="0 0 12330 68" draw:points="12267,68 0,68 0,0 12330,0 12330,3">
          <text:p/>
        </draw:polygon>
        <draw:path draw:style-name="gr2" draw:text-style-name="P2" draw:layer="layout" svg:width="12.252cm" svg:height="0.051cm" svg:x="13.621cm" svg:y="7.463cm" svg:viewBox="0 0 12253 52" svg:d="M47 19c3 4 7 6 10 6h12119c22 0 41-8 57-24 0 0 0-1 1-1l19 19c-1 1-1 1-2 2-20 20-45 31-75 31h-12119c-21 0-40-6-57-17z">
          <text:p/>
        </draw:path>
        <draw:path draw:style-name="gr2" draw:text-style-name="P2" draw:layer="layout" svg:width="0.049cm" svg:height="2.664cm" svg:x="25.853cm" svg:y="4.819cm" svg:viewBox="0 0 50 2665" svg:d="M0 2646c15-16 23-34 23-56v-2515c0-22-8-40-23-56l18-19c21 21 32 46 32 75v2515c0 29-11 54-32 75z">
          <text:p/>
        </draw:path>
        <draw:polygon draw:style-name="gr2" draw:text-style-name="P2" draw:layer="layout" svg:width="12.329cm" svg:height="2.726cm" svg:x="13.573cm" svg:y="4.788cm" svg:viewBox="0 0 12330 2727" draw:points="0,0 12330,0 12330,2727 0,2727">
          <text:p/>
        </draw:polygon>
        <draw:path draw:style-name="gr8" draw:text-style-name="P9" draw:layer="layout" svg:width="12.329cm" svg:height="2.726cm" svg:x="13.573cm" svg:y="7.725cm" svg:viewBox="0 0 12330 2727" svg:d="M31 31c20-20 45-31 74-31h12119c30 0 55 11 75 31 21 21 31 46 31 75v2515c0 29-10 54-31 75-20 20-45 31-75 31h-12119c-29 0-54-11-74-31-21-21-31-46-31-75v-2515c0-29 10-54 31-75z">
          <text:p/>
        </draw:path>
        <draw:path draw:style-name="gr2" draw:text-style-name="P2" draw:layer="layout" svg:width="12.252cm" svg:height="0.051cm" svg:x="13.621cm" svg:y="7.725cm" svg:viewBox="0 0 12253 52" svg:d="M12234 52c-1 0-1-1-1-1-16-15-35-23-57-23h-12119c-3 0-7 2-10 6l-47-16c17-11 36-18 57-18h12119c30 0 55 12 75 32 1 1 1 1 2 2z">
          <text:p/>
        </draw:path>
        <draw:path draw:style-name="gr2" draw:text-style-name="P2" draw:layer="layout" svg:width="12.252cm" svg:height="0.052cm" svg:x="13.621cm" svg:y="10.399cm" svg:viewBox="0 0 12253 53" svg:d="M47 19c3 4 7 6 10 6h12119c22 0 41-8 57-23 0-1 0-1 1-2l19 19c-1 1-1 1-2 2-20 21-45 32-75 32h-12119c-21 0-40-6-57-17z">
          <text:p/>
        </draw:path>
        <draw:path draw:style-name="gr2" draw:text-style-name="P2" draw:layer="layout" svg:width="0.049cm" svg:height="2.664cm" svg:x="25.853cm" svg:y="7.756cm" svg:viewBox="0 0 50 2665" svg:d="M0 2646c15-16 23-34 23-56v-2515c0-22-8-40-23-56l18-19c21 21 32 46 32 75v2515c0 29-11 54-32 75z">
          <text:p/>
        </draw:path>
        <draw:polygon draw:style-name="gr2" draw:text-style-name="P2" draw:layer="layout" svg:width="12.329cm" svg:height="2.726cm" svg:x="13.573cm" svg:y="7.725cm" svg:viewBox="0 0 12330 2727" draw:points="0,0 12330,0 12330,2727 0,2727">
          <text:p/>
        </draw:polygon>
        <draw:path draw:style-name="gr8" draw:text-style-name="P9" draw:layer="layout" svg:width="12.329cm" svg:height="2.302cm" svg:x="13.573cm" svg:y="10.662cm" svg:viewBox="0 0 12330 2303" svg:d="M31 31c20-20 45-31 74-31h12119c30 0 55 11 75 31 21 21 31 46 31 75v2091c0 29-10 54-31 75-20 21-45 31-75 31h-12119c-29 0-54-10-74-31-21-21-31-46-31-75v-2091c0-29 10-54 31-75z">
          <text:p/>
        </draw:path>
        <draw:path draw:style-name="gr2" draw:text-style-name="P2" draw:layer="layout" svg:width="12.252cm" svg:height="0.051cm" svg:x="13.621cm" svg:y="10.662cm" svg:viewBox="0 0 12253 52" svg:d="M12234 52c-1 0-1-1-1-1-16-16-35-23-57-23h-12119c-3 0-7 2-10 6l-47-17c17-11 36-17 57-17h12119c30 0 55 11 75 32 1 1 1 1 2 2z">
          <text:p/>
        </draw:path>
        <draw:path draw:style-name="gr2" draw:text-style-name="P2" draw:layer="layout" svg:width="12.252cm" svg:height="0.051cm" svg:x="13.621cm" svg:y="12.913cm" svg:viewBox="0 0 12253 52" svg:d="M47 19c3 5 7 7 10 7h12119c22 0 41-8 57-25 0 0 0-1 1-1l19 20c-1 0-1 1-2 1-20 21-45 31-75 31h-12119c-21 0-40-6-57-17z">
          <text:p/>
        </draw:path>
        <draw:path draw:style-name="gr2" draw:text-style-name="P2" draw:layer="layout" svg:width="0.049cm" svg:height="2.24cm" svg:x="25.853cm" svg:y="10.693cm" svg:viewBox="0 0 50 2241" svg:d="M0 2222c15-15 23-34 23-56v-2091c0-22-8-41-23-56l18-19c21 21 32 46 32 75v2091c0 29-11 54-32 75z">
          <text:p/>
        </draw:path>
        <draw:polygon draw:style-name="gr2" draw:text-style-name="P2" draw:layer="layout" svg:width="12.329cm" svg:height="2.302cm" svg:x="13.573cm" svg:y="10.662cm" svg:viewBox="0 0 12330 2303" draw:points="0,0 12330,0 12330,2303 0,2303">
          <text:p/>
        </draw:polygon>
        <draw:frame draw:style-name="gr18" draw:text-style-name="P19" draw:layer="layout" svg:width="2.765cm" svg:height="0.539cm" svg:x="1.46cm" svg:y="11.973cm">
          <draw:text-box>
            <text:p text:style-name="P3"><text:span text:style-name="T17">user consent</text:span></text:p>
          </draw:text-box>
        </draw:frame>
        <draw:path draw:style-name="gr17" draw:text-style-name="P18" draw:layer="layout" svg:width="0.159cm" svg:height="0.159cm" svg:x="14.049cm" svg:y="6.111cm" svg:viewBox="0 0 160 160" svg:d="M160 80c0 10-2 20-6 30s-10 18-18 27c-7 7-16 13-25 17-10 4-21 6-32 6-10 0-20-2-30-6s-18-10-26-17c-7-9-13-17-17-27s-6-20-6-30c0-11 2-21 6-31 4-9 10-18 17-25 8-8 16-14 26-18s20-6 30-6c11 0 22 2 32 6 9 4 18 10 25 18 8 7 14 16 18 25 4 10 6 20 6 31z">
          <text:p/>
        </draw:path>
        <draw:frame draw:style-name="gr20" draw:text-style-name="P21" draw:layer="layout" svg:width="2.538cm" svg:height="0.666cm" svg:x="14.097cm" svg:y="5.099cm">
          <draw:text-box>
            <text:p text:style-name="P3"><text:span text:style-name="T38">QUALITY</text:span></text:p>
          </draw:text-box>
        </draw:frame>
        <draw:frame draw:style-name="gr18" draw:text-style-name="P19" draw:layer="layout" svg:width="11.162cm" svg:height="0.539cm" svg:x="14.53cm" svg:y="5.888cm">
          <draw:text-box>
            <text:p text:style-name="P3"><text:span text:style-name="T17">Spec-driven development prevents scope creep and</text:span></text:p>
          </draw:text-box>
        </draw:frame>
        <draw:frame draw:style-name="gr18" draw:text-style-name="P19" draw:layer="layout" svg:width="2.067cm" svg:height="0.539cm" svg:x="14.53cm" svg:y="6.496cm">
          <draw:text-box>
            <text:p text:style-name="P3"><text:span text:style-name="T17">ambiguity</text:span></text:p>
          </draw:text-box>
        </draw:frame>
        <draw:path draw:style-name="gr17" draw:text-style-name="P18" draw:layer="layout" svg:width="0.159cm" svg:height="0.159cm" svg:x="14.049cm" svg:y="9.048cm" svg:viewBox="0 0 160 160" svg:d="M160 81c0 10-2 20-6 30s-10 18-18 26c-7 7-16 13-25 17-10 4-21 6-32 6-10 0-20-2-30-6s-18-10-26-17c-7-8-13-16-17-26s-6-20-6-30c0-11 2-21 6-31s10-19 17-27c8-7 16-13 26-17s20-6 30-6c11 0 22 2 32 6 9 4 18 10 25 17 8 8 14 17 18 27s6 20 6 31z">
          <text:p/>
        </draw:path>
        <draw:frame draw:style-name="gr20" draw:text-style-name="P21" draw:layer="layout" svg:width="1.78cm" svg:height="0.666cm" svg:x="14.097cm" svg:y="8.036cm">
          <draw:text-box>
            <text:p text:style-name="P3"><text:span text:style-name="T38">AUDIT</text:span></text:p>
          </draw:text-box>
        </draw:frame>
        <draw:frame draw:style-name="gr18" draw:text-style-name="P19" draw:layer="layout" svg:width="10.906cm" svg:height="0.539cm" svg:x="14.53cm" svg:y="8.825cm">
          <draw:text-box>
            <text:p text:style-name="P3"><text:span text:style-name="T17">Full argumentation log + audit trail of every tool call</text:span></text:p>
          </draw:text-box>
        </draw:frame>
        <draw:frame draw:style-name="gr18" draw:text-style-name="P19" draw:layer="layout" svg:width="2.793cm" svg:height="0.539cm" svg:x="14.53cm" svg:y="9.433cm">
          <draw:text-box>
            <text:p text:style-name="P3"><text:span text:style-name="T17">and approval</text:span></text:p>
          </draw:text-box>
        </draw:frame>
        <draw:path draw:style-name="gr17" draw:text-style-name="P18" draw:layer="layout" svg:width="0.159cm" svg:height="0.159cm" svg:x="14.049cm" svg:y="12.197cm" svg:viewBox="0 0 160 160" svg:d="M160 80c0 11-2 21-6 31-4 9-10 18-18 25-7 8-16 13-25 17-10 5-21 7-32 7-10 0-20-2-30-7-10-4-18-9-26-17-7-7-13-16-17-25-4-10-6-20-6-31 0-10 2-21 6-30 4-11 10-20 17-27 8-7 16-13 26-17s20-6 30-6c11 0 22 2 32 6 9 4 18 10 25 17 8 7 14 16 18 27 4 9 6 20 6 30z">
          <text:p/>
        </draw:path>
        <draw:frame draw:style-name="gr20" draw:text-style-name="P21" draw:layer="layout" svg:width="5.139cm" svg:height="0.666cm" svg:x="14.097cm" svg:y="10.973cm">
          <draw:text-box>
            <text:p text:style-name="P3"><text:span text:style-name="T38">ACCOUNTABILITY</text:span></text:p>
          </draw:text-box>
        </draw:frame>
        <draw:path draw:style-name="gr37" draw:text-style-name="P38" draw:layer="layout" svg:width="25.4cm" svg:height="2.54cm" svg:x="0.502cm" svg:y="13.546cm" svg:viewBox="0 0 25401 2541" svg:d="M31 31c21-20 46-31 75-31h25189c30 0 55 11 75 31 21 21 31 46 31 75v2329c0 30-10 55-31 75-20 21-45 31-75 31h-25189c-29 0-54-10-75-31-20-20-31-45-31-75v-2329c0-29 11-54 31-75z">
          <text:p/>
        </draw:path>
        <draw:path draw:style-name="gr2" draw:text-style-name="P2" draw:layer="layout" svg:width="25.323cm" svg:height="0.051cm" svg:x="0.55cm" svg:y="13.546cm" svg:viewBox="0 0 25324 52" svg:d="M25305 52c-1 0-1-1-1-1-16-17-35-24-57-24h-25189c-4 0-7 2-10 6l-48-16c17-11 36-17 58-17h25189c30 0 55 11 75 31 1 1 1 1 2 1z">
          <text:p/>
        </draw:path>
        <draw:path draw:style-name="gr2" draw:text-style-name="P2" draw:layer="layout" svg:width="25.323cm" svg:height="0.051cm" svg:x="0.55cm" svg:y="16.035cm" svg:viewBox="0 0 25324 52" svg:d="M48 20c3 4 6 6 10 6h25189c22 0 41-8 57-25l1-1 19 20c-1 0-1 1-2 1-20 21-45 31-75 31h-25189c-22 0-41-5-58-17z">
          <text:p/>
        </draw:path>
        <draw:path draw:style-name="gr2" draw:text-style-name="P2" draw:layer="layout" svg:width="0.049cm" svg:height="2.478cm" svg:x="25.853cm" svg:y="13.577cm" svg:viewBox="0 0 50 2479" svg:d="M0 2460c15-15 23-34 23-56v-2328c0-22-8-42-23-57l18-19c21 21 32 46 32 76v2328c0 30-11 55-32 75z">
          <text:p/>
        </draw:path>
        <draw:polygon draw:style-name="gr14" draw:text-style-name="P15" draw:layer="layout" svg:width="25.4cm" svg:height="2.54cm" svg:x="0.502cm" svg:y="13.546cm" svg:viewBox="0 0 25401 2541" draw:points="0,0 25401,0 25401,2541 0,2541">
          <text:p/>
        </draw:polygon>
        <draw:frame draw:style-name="gr18" draw:text-style-name="P19" draw:layer="layout" svg:width="9.955cm" svg:height="0.539cm" svg:x="14.53cm" svg:y="11.973cm">
          <draw:text-box>
            <text:p text:style-name="P3"><text:span text:style-name="T17">The human is the engineer; the LLM is the tool</text:span></text:p>
          </draw:text-box>
        </draw:frame>
        <draw:path draw:style-name="gr17" draw:text-style-name="P18" draw:layer="layout" svg:width="0.159cm" svg:height="0.159cm" svg:x="1.058cm" svg:y="15.213cm" svg:viewBox="0 0 160 160" svg:d="M160 80c0 11-2 21-6 31-4 9-10 18-18 26-7 7-17 13-26 17-10 4-20 6-31 6-10 0-20-2-30-6s-18-10-26-17c-7-8-13-17-17-26-4-10-6-20-6-31 0-10 2-20 6-30s10-19 17-27c8-7 16-13 26-17s20-6 30-6c11 0 21 2 31 6 9 4 19 10 26 17 8 8 14 17 18 27s6 20 6 30z">
          <text:p/>
        </draw:path>
        <draw:frame draw:style-name="gr20" draw:text-style-name="P21" draw:layer="layout" svg:width="6.489cm" svg:height="0.666cm" svg:x="1.101cm" svg:y="13.963cm">
          <draw:text-box>
            <text:p text:style-name="P3"><text:span text:style-name="T39">KEY DIFFERENTIATOR</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13.79cm" svg:height="0.539cm" svg:x="1.534cm" svg:y="14.989cm">
          <draw:text-box>
            <text:p text:style-name="P3"><text:span text:style-name="T17">Not autonomous — collaborative. Human-led, machine-assisted.</text:span></text:p>
          </draw:text-box>
        </draw:frame>
        <draw:frame draw:style-name="gr7" draw:text-style-name="P8" draw:layer="layout" svg:width="0.412cm" svg:height="0.412cm" svg:x="25.617cm" svg:y="18.503cm">
          <draw:text-box>
            <text:p text:style-name="P3"><text:span text:style-name="T6">12</text:span></text:p>
          </draw:text-box>
        </draw:frame>
      </draw:page>
      <draw:page draw:name="page13" draw:style-name="dp1" draw:master-page-name="master-page3">
        <draw:polygon draw:style-name="gr1" draw:text-style-name="P1" draw:layer="layout" svg:width="26.405cm" svg:height="19.235cm" svg:x="0cm" svg:y="0cm" svg:viewBox="0 0 26406 19236" draw:points="0,0 26406,0 26406,19236 0,19236">
          <text:p/>
        </draw:polygon>
        <draw:path draw:style-name="gr38" draw:text-style-name="P39" draw:layer="layout" svg:width="21.772cm" svg:height="2.177cm" svg:x="2.316cm" svg:y="2.823cm" svg:viewBox="0 0 21773 2178" svg:d="M146 0h21482c9 0 19 1 28 3s19 4 27 8c9 4 17 8 25 13 8 6 16 12 22 18 7 7 13 15 18 22 6 8 10 17 14 26 4 8 6 17 8 27 2 9 3 19 3 28v1888c0 10-1 19-3 28-2 10-4 19-8 28-4 8-8 17-14 25-5 8-11 15-18 22-6 6-14 12-22 18-8 5-16 9-25 13-8 4-18 6-27 8s-19 3-28 3h-21482c-10 0-19-1-29-3-9-2-18-4-27-8s-17-8-25-13c-8-6-15-12-22-18-7-7-13-14-18-22s-10-17-13-25c-4-9-7-18-9-28-2-9-3-18-3-28v-1888c0-9 1-19 3-28 2-10 5-19 9-27 3-9 8-18 13-26 5-7 11-15 18-22 7-6 14-12 22-18 8-5 16-9 25-13s18-6 27-8c10-2 19-3 29-3z">
          <text:p/>
        </draw:path>
        <draw:path draw:style-name="gr39" draw:text-style-name="P26" draw:layer="layout" svg:width="21.772cm" svg:height="2.177cm" svg:x="2.316cm" svg:y="2.823cm" svg:viewBox="0 0 21773 2178" svg:d="M146 0h21482c9 0 19 1 28 3s19 4 27 8c9 4 17 8 25 13 8 6 16 12 22 18 7 7 13 15 18 22 6 8 10 17 14 26 4 8 6 17 8 27 2 9 3 19 3 28v1888c0 10-1 19-3 28-2 10-4 19-8 28-4 8-8 17-14 25-5 8-11 15-18 22-6 6-14 12-22 18-8 5-16 9-25 13-8 4-18 6-27 8s-19 3-28 3h-21482c-10 0-19-1-29-3-9-2-18-4-27-8s-17-8-25-13c-8-6-15-12-22-18-7-7-13-14-18-22s-10-17-13-25c-4-9-7-18-9-28-2-9-3-18-3-28v-1888c0-9 1-19 3-28 2-10 5-19 9-27 3-9 8-18 13-26 5-7 11-15 18-22 7-6 14-12 22-18 8-5 16-9 25-13s18-6 27-8c10-2 19-3 29-3z">
          <text:p/>
        </draw:path>
        <draw:frame draw:style-name="gr9" draw:text-style-name="P10" draw:layer="layout" svg:width="13.49cm" svg:height="1.119cm" svg:x="6.061cm" svg:y="0.921cm">
          <draw:text-box>
            <text:p text:style-name="P3"><text:span text:style-name="T7">ARCHITECTURE OVERVIEW</text:span></text:p>
          </draw:text-box>
        </draw:frame>
        <draw:frame draw:style-name="gr40" draw:text-style-name="P40" draw:layer="layout" svg:width="3.926cm" svg:height="0.568cm" svg:x="11.487cm" svg:y="3.525cm">
          <draw:text-box>
            <text:p text:style-name="P3"><text:span text:style-name="T40">1. UI &amp; UX Layer</text:span></text:p>
          </draw:text-box>
        </draw:frame>
        <draw:line draw:style-name="gr41" draw:text-style-name="P26" draw:layer="layout" svg:x1="13.202cm" svg:y1="5cm" svg:x2="13.202cm" svg:y2="5.653cm">
          <text:p/>
        </draw:line>
        <draw:polygon draw:style-name="gr2" draw:text-style-name="P2" draw:layer="layout" svg:width="0.326cm" svg:height="0.327cm" svg:x="13.039cm" svg:y="5.359cm" svg:viewBox="0 0 327 328" draw:points="327,0 163,328 0,0">
          <text:p/>
        </draw:polygon>
        <draw:path draw:style-name="gr10" draw:text-style-name="P11" draw:layer="layout" svg:width="21.772cm" svg:height="2.177cm" svg:x="2.316cm" svg:y="5.508cm" svg:viewBox="0 0 21773 2178" svg:d="M146 0h21482c9 0 19 1 28 3s19 5 27 8c9 4 17 8 25 14 8 5 16 11 22 18 7 6 13 14 18 22 6 8 10 16 14 25s6 18 8 27 3 19 3 28v1887c0 10-1 19-3 28-2 10-4 19-8 28-4 8-8 17-14 26-5 8-11 15-18 22-6 6-14 13-22 18s-16 10-25 13c-8 4-18 7-27 8-9 2-19 3-28 3h-21482c-10 0-19-1-29-3-9-1-18-4-27-8-9-3-17-8-25-13s-15-12-22-18c-7-7-13-14-18-22-5-9-10-18-13-26-4-9-7-18-9-28-2-9-3-18-3-28v-1887c0-9 1-19 3-28s5-18 9-27c3-9 8-17 13-25s11-16 18-22c7-7 14-13 22-18 8-6 16-10 25-14 9-3 18-6 27-8 10-2 19-3 29-3z">
          <text:p/>
        </draw:path>
        <draw:path draw:style-name="gr39" draw:text-style-name="P26" draw:layer="layout" svg:width="21.772cm" svg:height="2.177cm" svg:x="2.316cm" svg:y="5.508cm" svg:viewBox="0 0 21773 2178" svg:d="M146 0h21482c9 0 19 1 28 3s19 5 27 8c9 4 17 8 25 14 8 5 16 11 22 18 7 6 13 14 18 22 6 8 10 16 14 25s6 18 8 27 3 19 3 28v1887c0 10-1 19-3 28-2 10-4 19-8 28-4 8-8 17-14 26-5 8-11 15-18 22-6 6-14 13-22 18s-16 10-25 13c-8 4-18 7-27 8-9 2-19 3-28 3h-21482c-10 0-19-1-29-3-9-1-18-4-27-8-9-3-17-8-25-13s-15-12-22-18c-7-7-13-14-18-22-5-9-10-18-13-26-4-9-7-18-9-28-2-9-3-18-3-28v-1887c0-9 1-19 3-28s5-18 9-27c3-9 8-17 13-25s11-16 18-22c7-7 14-13 22-18 8-6 16-10 25-14 9-3 18-6 27-8 10-2 19-3 29-3z">
          <text:p/>
        </draw:path>
        <draw:frame draw:style-name="gr42" draw:text-style-name="P41" draw:layer="layout" svg:width="5.748cm" svg:height="0.407cm" svg:x="10.649cm" svg:y="4.237cm">
          <draw:text-box>
            <text:p text:style-name="P3"><text:span text:style-name="T41">Textual TUI — Zero Business Logic</text:span></text:p>
          </draw:text-box>
        </draw:frame>
        <draw:frame draw:style-name="gr40" draw:text-style-name="P40" draw:layer="layout" svg:width="4.83cm" svg:height="0.568cm" svg:x="11.011cm" svg:y="6.21cm">
          <draw:text-box>
            <text:p text:style-name="P3"><text:span text:style-name="T42">2. Middleware Layer</text:span></text:p>
          </draw:text-box>
        </draw:frame>
        <draw:line draw:style-name="gr41" draw:text-style-name="P26" draw:layer="layout" svg:x1="13.202cm" svg:y1="7.685cm" svg:x2="13.202cm" svg:y2="8.338cm">
          <text:p/>
        </draw:line>
        <draw:polygon draw:style-name="gr2" draw:text-style-name="P2" draw:layer="layout" svg:width="0.326cm" svg:height="0.327cm" svg:x="13.039cm" svg:y="8.044cm" svg:viewBox="0 0 327 328" draw:points="327,0 163,328 0,0">
          <text:p/>
        </draw:polygon>
        <draw:path draw:style-name="gr2" draw:text-style-name="P2" draw:layer="layout" svg:width="21.772cm" svg:height="2.177cm" svg:x="2.316cm" svg:y="8.193cm" svg:viewBox="0 0 21773 2178" svg:d="M146 0h21482c9 0 19 1 28 3s19 5 27 8c9 4 17 8 25 14 8 5 16 11 22 18 7 7 13 14 18 22 6 8 10 16 14 25s6 18 8 27 3 19 3 28v1888c0 10-1 19-3 29-2 9-4 18-8 27s-8 17-14 25c-5 8-11 15-18 22-6 7-14 13-22 18s-16 10-25 13c-8 4-18 7-27 9-9 1-19 2-28 2h-21482c-10 0-19-1-29-2-9-2-18-5-27-9-9-3-17-8-25-13s-15-11-22-18-13-14-18-22-10-16-13-25c-4-9-7-18-9-27-2-10-3-19-3-29v-1888c0-9 1-19 3-28s5-18 9-27c3-9 8-17 13-25s11-15 18-22 14-13 22-18c8-6 16-10 25-14 9-3 18-6 27-8 10-2 19-3 29-3z">
          <text:p/>
        </draw:path>
        <draw:path draw:style-name="gr43" draw:text-style-name="P26" draw:layer="layout" svg:width="21.772cm" svg:height="2.177cm" svg:x="2.316cm" svg:y="8.193cm" svg:viewBox="0 0 21773 2178" svg:d="M146 0h21482c9 0 19 1 28 3s19 5 27 8c9 4 17 8 25 14 8 5 16 11 22 18 7 7 13 14 18 22 6 8 10 16 14 25s6 18 8 27 3 19 3 28v1888c0 10-1 19-3 29-2 9-4 18-8 27s-8 17-14 25c-5 8-11 15-18 22-6 7-14 13-22 18s-16 10-25 13c-8 4-18 7-27 9-9 1-19 2-28 2h-21482c-10 0-19-1-29-2-9-2-18-5-27-9-9-3-17-8-25-13s-15-11-22-18-13-14-18-22-10-16-13-25c-4-9-7-18-9-27-2-10-3-19-3-29v-1888c0-9 1-19 3-28s5-18 9-27c3-9 8-17 13-25s11-15 18-22 14-13 22-18c8-6 16-10 25-14 9-3 18-6 27-8 10-2 19-3 29-3z">
          <text:p/>
        </draw:path>
        <draw:frame draw:style-name="gr42" draw:text-style-name="P41" draw:layer="layout" svg:width="7.692cm" svg:height="0.407cm" svg:x="9.679cm" svg:y="6.922cm">
          <draw:text-box>
            <text:p text:style-name="P3"><text:span text:style-name="T43">SessionController · ApprovalGateway · Logging</text:span></text:p>
          </draw:text-box>
        </draw:frame>
        <draw:frame draw:style-name="gr40" draw:text-style-name="P40" draw:layer="layout" svg:width="3.418cm" svg:height="0.568cm" svg:x="11.712cm" svg:y="8.895cm">
          <draw:text-box>
            <text:p text:style-name="P3"><text:span text:style-name="T42">3. Logic Layer</text:span></text:p>
          </draw:text-box>
        </draw:frame>
        <draw:line draw:style-name="gr41" draw:text-style-name="P26" draw:layer="layout" svg:x1="13.202cm" svg:y1="10.37cm" svg:x2="13.202cm" svg:y2="11.024cm">
          <text:p/>
        </draw:line>
        <draw:polygon draw:style-name="gr2" draw:text-style-name="P2" draw:layer="layout" svg:width="0.326cm" svg:height="0.326cm" svg:x="13.039cm" svg:y="10.73cm" svg:viewBox="0 0 327 327" draw:points="327,0 163,327 0,0">
          <text:p/>
        </draw:polygon>
        <draw:path draw:style-name="gr28" draw:text-style-name="P29" draw:layer="layout" svg:width="21.772cm" svg:height="2.178cm" svg:x="2.316cm" svg:y="10.878cm" svg:viewBox="0 0 21773 2179" svg:d="M146 0h21482c9 0 19 1 28 3s19 5 27 8c9 4 17 9 25 14s16 11 22 18c7 7 13 14 18 22 6 8 10 16 14 25s6 18 8 27c2 10 3 19 3 29v1887c0 10-1 19-3 29-2 9-4 18-8 27s-8 17-14 25c-5 8-11 15-18 22-6 7-14 13-22 18s-16 10-25 14c-8 3-18 6-27 8s-19 3-28 3h-21482c-10 0-19-1-29-3-9-2-18-5-27-8-9-4-17-9-25-14s-15-11-22-18-13-14-18-22-10-16-13-25c-4-9-7-18-9-27-2-10-3-19-3-29v-1887c0-10 1-19 3-29 2-9 5-18 9-27 3-9 8-17 13-25s11-15 18-22 14-13 22-18 16-10 25-14c9-3 18-6 27-8 10-2 19-3 29-3z">
          <text:p/>
        </draw:path>
        <draw:path draw:style-name="gr44" draw:text-style-name="P26" draw:layer="layout" svg:width="21.772cm" svg:height="2.178cm" svg:x="2.316cm" svg:y="10.878cm" svg:viewBox="0 0 21773 2179" svg:d="M146 0h21482c9 0 19 1 28 3s19 5 27 8c9 4 17 9 25 14s16 11 22 18c7 7 13 14 18 22 6 8 10 16 14 25s6 18 8 27c2 10 3 19 3 29v1887c0 10-1 19-3 29-2 9-4 18-8 27s-8 17-14 25c-5 8-11 15-18 22-6 7-14 13-22 18s-16 10-25 14c-8 3-18 6-27 8s-19 3-28 3h-21482c-10 0-19-1-29-3-9-2-18-5-27-8-9-4-17-9-25-14s-15-11-22-18-13-14-18-22-10-16-13-25c-4-9-7-18-9-27-2-10-3-19-3-29v-1887c0-10 1-19 3-29 2-9 5-18 9-27 3-9 8-17 13-25s11-15 18-22 14-13 22-18 16-10 25-14c9-3 18-6 27-8 10-2 19-3 29-3z">
          <text:p/>
        </draw:path>
        <draw:frame draw:style-name="gr42" draw:text-style-name="P41" draw:layer="layout" svg:width="8.785cm" svg:height="0.407cm" svg:x="9.251cm" svg:y="9.607cm">
          <draw:text-box>
            <text:p text:style-name="P3"><text:span text:style-name="T43">SpecAgent · PlanAgent · CodingAgent · SchemaTailor</text:span></text:p>
          </draw:text-box>
        </draw:frame>
        <draw:frame draw:style-name="gr40" draw:text-style-name="P40" draw:layer="layout" svg:width="3.165cm" svg:height="0.568cm" svg:x="11.779cm" svg:y="11.58cm">
          <draw:text-box>
            <text:p text:style-name="P3"><text:span text:style-name="T42">4. Data Layer</text:span></text:p>
          </draw:text-box>
        </draw:frame>
        <draw:line draw:style-name="gr41" draw:text-style-name="P26" draw:layer="layout" svg:x1="13.202cm" svg:y1="13.056cm" svg:x2="13.202cm" svg:y2="13.709cm">
          <text:p/>
        </draw:line>
        <draw:polygon draw:style-name="gr2" draw:text-style-name="P2" draw:layer="layout" svg:width="0.326cm" svg:height="0.326cm" svg:x="13.039cm" svg:y="13.415cm" svg:viewBox="0 0 327 327" draw:points="327,0 163,327 0,0">
          <text:p/>
        </draw:polygon>
        <draw:path draw:style-name="gr14" draw:text-style-name="P15" draw:layer="layout" svg:width="21.772cm" svg:height="2.177cm" svg:x="2.316cm" svg:y="13.564cm" svg:viewBox="0 0 21773 2178" svg:d="M146 0h21482c9 0 19 0 28 2s19 5 27 9c9 3 17 8 25 13s16 11 22 18c7 7 13 14 18 22 6 8 10 16 14 25s6 18 8 27c2 10 3 19 3 29v1888c0 9-1 19-3 28s-4 18-8 27-8 17-14 25c-5 8-11 15-18 22-6 7-14 13-22 18-8 6-16 10-25 14-8 3-18 6-27 8s-19 3-28 3h-21482c-10 0-19-1-29-3-9-2-18-5-27-8-9-4-17-8-25-14-8-5-15-11-22-18s-13-14-18-22-10-16-13-25c-4-9-7-18-9-27s-3-19-3-28v-1888c0-10 1-19 3-29 2-9 5-18 9-27 3-9 8-17 13-25s11-15 18-22 14-13 22-18 16-10 25-13c9-4 18-7 27-9 10-2 19-2 29-2z">
          <text:p/>
        </draw:path>
        <draw:path draw:style-name="gr45" draw:text-style-name="P26" draw:layer="layout" svg:width="21.772cm" svg:height="2.177cm" svg:x="2.316cm" svg:y="13.564cm" svg:viewBox="0 0 21773 2178" svg:d="M146 0h21482c9 0 19 0 28 2s19 5 27 9c9 3 17 8 25 13s16 11 22 18c7 7 13 14 18 22 6 8 10 16 14 25s6 18 8 27c2 10 3 19 3 29v1888c0 9-1 19-3 28s-4 18-8 27-8 17-14 25c-5 8-11 15-18 22-6 7-14 13-22 18-8 6-16 10-25 14-8 3-18 6-27 8s-19 3-28 3h-21482c-10 0-19-1-29-3-9-2-18-5-27-8-9-4-17-8-25-14-8-5-15-11-22-18s-13-14-18-22-10-16-13-25c-4-9-7-18-9-27s-3-19-3-28v-1888c0-10 1-19 3-29 2-9 5-18 9-27 3-9 8-17 13-25s11-15 18-22 14-13 22-18 16-10 25-13c9-4 18-7 27-9 10-2 19-2 29-2z">
          <text:p/>
        </draw:path>
        <draw:frame draw:style-name="gr42" draw:text-style-name="P41" draw:layer="layout" svg:width="8.419cm" svg:height="0.407cm" svg:x="9.333cm" svg:y="12.292cm">
          <draw:text-box>
            <text:p text:style-name="P3"><text:span text:style-name="T43">Knowledge Graph · Memory Pyramid · Artifact Store</text:span></text:p>
          </draw:text-box>
        </draw:frame>
        <draw:frame draw:style-name="gr40" draw:text-style-name="P40" draw:layer="layout" svg:width="5.366cm" svg:height="0.568cm" svg:x="10.771cm" svg:y="14.265cm">
          <draw:text-box>
            <text:p text:style-name="P3"><text:span text:style-name="T44">5. Infrastructure Layer</text:span></text:p>
          </draw:text-box>
        </draw:frame>
        <draw:frame draw:style-name="gr42" draw:text-style-name="P41" draw:layer="layout" svg:width="8.137cm" svg:height="0.407cm" svg:x="9.465cm" svg:y="14.977cm">
          <draw:text-box>
            <text:p text:style-name="P3"><text:span text:style-name="T45">Provider Adapter · ToolRuntime · Budget Manager</text:span></text:p>
          </draw:text-box>
        </draw:frame>
        <draw:polygon draw:style-name="gr6" draw:text-style-name="P7" draw:layer="layout" svg:width="0.714cm" svg:height="0.635cm" svg:x="25.479cm" svg:y="18.388cm" svg:viewBox="0 0 715 636" draw:points="0,0 715,0 715,636 0,636">
          <text:p/>
        </draw:polygon>
        <draw:frame draw:style-name="gr42" draw:text-style-name="P41" draw:layer="layout" svg:width="7.449cm" svg:height="0.407cm" svg:x="9.694cm" svg:y="16.646cm">
          <draw:text-box>
            <text:p text:style-name="P3"><text:span text:style-name="T41">typing.Protocol interfaces between every layer</text:span></text:p>
          </draw:text-box>
        </draw:frame>
        <draw:frame draw:style-name="gr7" draw:text-style-name="P8" draw:layer="layout" svg:width="0.412cm" svg:height="0.412cm" svg:x="25.617cm" svg:y="18.503cm">
          <draw:text-box>
            <text:p text:style-name="P3"><text:span text:style-name="T6">13</text:span></text:p>
          </draw:text-box>
        </draw:frame>
      </draw:page>
      <draw:page draw:name="page14"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19.43cm" svg:height="1.119cm" svg:x="2.9cm" svg:y="9.519cm">
          <draw:text-box>
            <text:p text:style-name="P3"><text:span text:style-name="T11">TECHNICAL ARCHITECTURE OVERVIEW</text:span></text:p>
          </draw:text-box>
        </draw:frame>
        <draw:frame draw:style-name="gr15" draw:text-style-name="P16" draw:layer="layout" svg:width="4.122cm" svg:height="4.137cm" svg:x="10.98cm" svg:y="6.517cm">
          <draw:text-box>
            <text:p text:style-name="P3"><text:span text:style-name="T12">03</text:span></text:p>
          </draw:text-box>
        </draw:frame>
        <draw:polygon draw:style-name="gr6" draw:text-style-name="P7" draw:layer="layout" svg:width="0.714cm" svg:height="0.635cm" svg:x="25.479cm" svg:y="18.388cm" svg:viewBox="0 0 715 636" draw:points="0,0 715,0 715,636 0,636">
          <text:p/>
        </draw:polygon>
        <draw:frame draw:style-name="gr16" draw:text-style-name="P17" draw:layer="layout" svg:width="9.761cm" svg:height="0.827cm" svg:x="8.651cm" svg:y="11.077cm">
          <draw:text-box>
            <text:p text:style-name="P3"><text:span text:style-name="T13">Stack, Layers, and Modularity</text:span></text:p>
          </draw:text-box>
        </draw:frame>
        <draw:frame draw:style-name="gr7" draw:text-style-name="P8" draw:layer="layout" svg:width="0.412cm" svg:height="0.412cm" svg:x="25.617cm" svg:y="18.503cm">
          <draw:text-box>
            <text:p text:style-name="P3"><text:span text:style-name="T6">14</text:span></text:p>
          </draw:text-box>
        </draw:frame>
      </draw:page>
      <draw:page draw:name="page15" draw:style-name="dp1" draw:master-page-name="master-page3">
        <draw:polygon draw:style-name="gr1" draw:text-style-name="P1" draw:layer="layout" svg:width="26.405cm" svg:height="19.235cm" svg:x="0cm" svg:y="0cm" svg:viewBox="0 0 26406 19236" draw:points="0,0 26406,0 26406,19236 0,19236">
          <text:p/>
        </draw:polygon>
        <draw:polygon draw:style-name="gr2" draw:text-style-name="P2" draw:layer="layout" svg:width="5.9cm" svg:height="0.82cm" svg:x="0.502cm" svg:y="6.482cm" svg:viewBox="0 0 5901 821" draw:points="0,0 5901,0 5901,821 0,821">
          <text:p/>
        </draw:polygon>
        <draw:polygon draw:style-name="gr2" draw:text-style-name="P2" draw:layer="layout" svg:width="19.5cm" svg:height="0.82cm" svg:x="6.402cm" svg:y="6.482cm" svg:viewBox="0 0 19501 821" draw:points="0,0 19501,0 19501,821 0,821">
          <text:p/>
        </draw:polygon>
        <draw:polygon draw:style-name="gr30" draw:text-style-name="P31" draw:layer="layout" svg:width="5.9cm" svg:height="0.767cm" svg:x="0.502cm" svg:y="8.096cm" svg:viewBox="0 0 5901 768" draw:points="0,0 5901,0 5901,768 0,768">
          <text:p/>
        </draw:polygon>
        <draw:polygon draw:style-name="gr30" draw:text-style-name="P31" draw:layer="layout" svg:width="19.5cm" svg:height="0.767cm" svg:x="6.402cm" svg:y="8.096cm" svg:viewBox="0 0 19501 768" draw:points="0,0 19501,0 19501,768 0,768">
          <text:p/>
        </draw:polygon>
        <draw:polygon draw:style-name="gr30" draw:text-style-name="P31" draw:layer="layout" svg:width="5.9cm" svg:height="0.767cm" svg:x="0.502cm" svg:y="9.657cm" svg:viewBox="0 0 5901 768" draw:points="0,0 5901,0 5901,768 0,768">
          <text:p/>
        </draw:polygon>
        <draw:polygon draw:style-name="gr30" draw:text-style-name="P31" draw:layer="layout" svg:width="19.5cm" svg:height="0.767cm" svg:x="6.402cm" svg:y="9.657cm" svg:viewBox="0 0 19501 768" draw:points="0,0 19501,0 19501,768 0,768">
          <text:p/>
        </draw:polygon>
        <draw:polygon draw:style-name="gr30" draw:text-style-name="P31" draw:layer="layout" svg:width="5.9cm" svg:height="0.767cm" svg:x="0.502cm" svg:y="11.218cm" svg:viewBox="0 0 5901 768" draw:points="0,0 5901,0 5901,768 0,768">
          <text:p/>
        </draw:polygon>
        <draw:polygon draw:style-name="gr30" draw:text-style-name="P31" draw:layer="layout" svg:width="19.5cm" svg:height="0.767cm" svg:x="6.402cm" svg:y="11.218cm" svg:viewBox="0 0 19501 768" draw:points="0,0 19501,0 19501,768 0,768">
          <text:p/>
        </draw:polygon>
        <draw:polygon draw:style-name="gr1" draw:text-style-name="P1" draw:layer="layout" svg:width="5.9cm" svg:height="0.026cm" svg:x="0.502cm" svg:y="7.302cm" svg:viewBox="0 0 5901 27" draw:points="0,0 5901,0 5901,27 0,27">
          <text:p/>
        </draw:polygon>
        <draw:polygon draw:style-name="gr1" draw:text-style-name="P1" draw:layer="layout" svg:width="19.5cm" svg:height="0.026cm" svg:x="6.402cm" svg:y="7.302cm" svg:viewBox="0 0 19501 27" draw:points="0,0 19501,0 19501,27 0,27">
          <text:p/>
        </draw:polygon>
        <draw:polygon draw:style-name="gr31" draw:text-style-name="P32" draw:layer="layout" svg:width="5.9cm" svg:height="0.027cm" svg:x="0.502cm" svg:y="8.069cm" svg:viewBox="0 0 5901 28" draw:points="0,0 5901,0 5901,28 0,28">
          <text:p/>
        </draw:polygon>
        <draw:polygon draw:style-name="gr31" draw:text-style-name="P32" draw:layer="layout" svg:width="19.5cm" svg:height="0.027cm" svg:x="6.402cm" svg:y="8.069cm" svg:viewBox="0 0 19501 28" draw:points="0,0 19501,0 19501,28 0,28">
          <text:p/>
        </draw:polygon>
        <draw:polygon draw:style-name="gr31" draw:text-style-name="P32" draw:layer="layout" svg:width="5.9cm" svg:height="0.027cm" svg:x="0.502cm" svg:y="8.863cm" svg:viewBox="0 0 5901 28" draw:points="0,0 5901,0 5901,28 0,28">
          <text:p/>
        </draw:polygon>
        <draw:polygon draw:style-name="gr31" draw:text-style-name="P32" draw:layer="layout" svg:width="19.5cm" svg:height="0.027cm" svg:x="6.402cm" svg:y="8.863cm" svg:viewBox="0 0 19501 28" draw:points="0,0 19501,0 19501,28 0,28">
          <text:p/>
        </draw:polygon>
        <draw:polygon draw:style-name="gr31" draw:text-style-name="P32" draw:layer="layout" svg:width="5.9cm" svg:height="0.027cm" svg:x="0.502cm" svg:y="9.63cm" svg:viewBox="0 0 5901 28" draw:points="0,0 5901,0 5901,28 0,28">
          <text:p/>
        </draw:polygon>
        <draw:polygon draw:style-name="gr31" draw:text-style-name="P32" draw:layer="layout" svg:width="19.5cm" svg:height="0.027cm" svg:x="6.402cm" svg:y="9.63cm" svg:viewBox="0 0 19501 28" draw:points="0,0 19501,0 19501,28 0,28">
          <text:p/>
        </draw:polygon>
        <draw:polygon draw:style-name="gr31" draw:text-style-name="P32" draw:layer="layout" svg:width="5.9cm" svg:height="0.027cm" svg:x="0.502cm" svg:y="10.424cm" svg:viewBox="0 0 5901 28" draw:points="0,0 5901,0 5901,28 0,28">
          <text:p/>
        </draw:polygon>
        <draw:polygon draw:style-name="gr31" draw:text-style-name="P32" draw:layer="layout" svg:width="19.5cm" svg:height="0.027cm" svg:x="6.402cm" svg:y="10.424cm" svg:viewBox="0 0 19501 28" draw:points="0,0 19501,0 19501,28 0,28">
          <text:p/>
        </draw:polygon>
        <draw:polygon draw:style-name="gr31" draw:text-style-name="P32" draw:layer="layout" svg:width="5.9cm" svg:height="0.027cm" svg:x="0.502cm" svg:y="11.191cm" svg:viewBox="0 0 5901 28" draw:points="0,0 5901,0 5901,28 0,28">
          <text:p/>
        </draw:polygon>
        <draw:polygon draw:style-name="gr31" draw:text-style-name="P32" draw:layer="layout" svg:width="19.5cm" svg:height="0.027cm" svg:x="6.402cm" svg:y="11.191cm" svg:viewBox="0 0 19501 28" draw:points="0,0 19501,0 19501,28 0,28">
          <text:p/>
        </draw:polygon>
        <draw:polygon draw:style-name="gr31" draw:text-style-name="P32" draw:layer="layout" svg:width="5.9cm" svg:height="0.027cm" svg:x="0.502cm" svg:y="11.985cm" svg:viewBox="0 0 5901 28" draw:points="0,0 5901,0 5901,28 0,28">
          <text:p/>
        </draw:polygon>
        <draw:polygon draw:style-name="gr31" draw:text-style-name="P32" draw:layer="layout" svg:width="19.5cm" svg:height="0.027cm" svg:x="6.402cm" svg:y="11.985cm" svg:viewBox="0 0 19501 28" draw:points="0,0 19501,0 19501,28 0,28">
          <text:p/>
        </draw:polygon>
        <draw:frame draw:style-name="gr9" draw:text-style-name="P10" draw:layer="layout" svg:width="10.605cm" svg:height="1.119cm" svg:x="7.667cm" svg:y="4.942cm">
          <draw:text-box>
            <text:p text:style-name="P3"><text:span text:style-name="T7">TECHNOLOGY STACK</text:span></text:p>
          </draw:text-box>
        </draw:frame>
        <draw:frame draw:style-name="gr5" draw:text-style-name="P6" draw:layer="layout" svg:width="1.188cm" svg:height="0.496cm" svg:x="0.68cm" svg:y="6.609cm">
          <draw:text-box>
            <text:p text:style-name="P3"><text:span text:style-name="T30">Layer</text:span></text:p>
          </draw:text-box>
        </draw:frame>
        <draw:frame draw:style-name="gr5" draw:text-style-name="P6" draw:layer="layout" svg:width="2.496cm" svg:height="0.496cm" svg:x="6.574cm" svg:y="6.609cm">
          <draw:text-box>
            <text:p text:style-name="P3"><text:span text:style-name="T30">Technology</text:span></text:p>
          </draw:text-box>
        </draw:frame>
        <draw:frame draw:style-name="gr5" draw:text-style-name="P6" draw:layer="layout" svg:width="1.78cm" svg:height="0.496cm" svg:x="0.68cm" svg:y="7.403cm">
          <draw:text-box>
            <text:p text:style-name="P3"><text:span text:style-name="T27">Runtime</text:span></text:p>
          </draw:text-box>
        </draw:frame>
        <draw:path draw:style-name="gr33" draw:text-style-name="P34" draw:layer="layout" svg:width="0.635cm" svg:height="0.556cm" svg:x="9.207cm" svg:y="7.381cm" svg:viewBox="0 0 636 557" svg:d="M0 478v-398c0-11 2-21 6-31 4-9 10-18 17-25 8-8 16-14 26-18s20-6 30-6h477c10 0 20 2 30 6s18 10 26 18c7 7 14 16 18 25 4 10 6 20 6 31v398c0 10-2 20-6 30s-11 18-18 26c-8 7-16 13-26 17s-20 6-30 6h-477c-10 0-20-2-30-6s-18-10-26-17c-7-8-13-16-17-26s-6-20-6-30z">
          <text:p/>
        </draw:path>
        <draw:frame draw:style-name="gr5" draw:text-style-name="P6" draw:layer="layout" svg:width="2.881cm" svg:height="0.496cm" svg:x="6.574cm" svg:y="7.403cm">
          <draw:text-box>
            <text:p text:style-name="P3"><text:span text:style-name="T15">Python 3.11+, </text:span></text:p>
          </draw:text-box>
        </draw:frame>
        <draw:frame draw:style-name="gr34" draw:text-style-name="P35" draw:layer="layout" svg:width="0.4cm" svg:height="0.424cm" svg:x="9.289cm" svg:y="7.455cm">
          <draw:text-box>
            <text:p text:style-name="P3"><text:span text:style-name="T32">uv</text:span></text:p>
          </draw:text-box>
        </draw:frame>
        <draw:frame draw:style-name="gr5" draw:text-style-name="P6" draw:layer="layout" svg:width="3.684cm" svg:height="0.496cm" svg:x="9.836cm" svg:y="7.403cm">
          <draw:text-box>
            <text:p text:style-name="P3"><text:span text:style-name="T15"><text:s/>package manager</text:span></text:p>
          </draw:text-box>
        </draw:frame>
        <draw:frame draw:style-name="gr5" draw:text-style-name="P6" draw:layer="layout" svg:width="3.213cm" svg:height="0.496cm" svg:x="0.68cm" svg:y="8.197cm">
          <draw:text-box>
            <text:p text:style-name="P3"><text:span text:style-name="T27">TUI Framework</text:span></text:p>
          </draw:text-box>
        </draw:frame>
        <draw:frame draw:style-name="gr5" draw:text-style-name="P6" draw:layer="layout" svg:width="4.868cm" svg:height="0.496cm" svg:x="6.574cm" svg:y="8.197cm">
          <draw:text-box>
            <text:p text:style-name="P3"><text:span text:style-name="T15">Textual (rich terminal UI)</text:span></text:p>
          </draw:text-box>
        </draw:frame>
        <draw:frame draw:style-name="gr5" draw:text-style-name="P6" draw:layer="layout" svg:width="3.089cm" svg:height="0.496cm" svg:x="0.68cm" svg:y="8.964cm">
          <draw:text-box>
            <text:p text:style-name="P3"><text:span text:style-name="T27">LLM Providers</text:span></text:p>
          </draw:text-box>
        </draw:frame>
        <draw:frame draw:style-name="gr5" draw:text-style-name="P6" draw:layer="layout" svg:width="11.343cm" svg:height="0.496cm" svg:x="6.574cm" svg:y="8.964cm">
          <draw:text-box>
            <text:p text:style-name="P3"><text:span text:style-name="T15">DeepSeek, OpenAI, Ollama (OpenAI-compatible adapter)</text:span></text:p>
          </draw:text-box>
        </draw:frame>
        <draw:frame draw:style-name="gr5" draw:text-style-name="P6" draw:layer="layout" svg:width="2.498cm" svg:height="0.496cm" svg:x="0.68cm" svg:y="9.758cm">
          <draw:text-box>
            <text:p text:style-name="P3"><text:span text:style-name="T27">Persistence</text:span></text:p>
          </draw:text-box>
        </draw:frame>
        <draw:frame draw:style-name="gr5" draw:text-style-name="P6" draw:layer="layout" svg:width="7.933cm" svg:height="0.496cm" svg:x="6.574cm" svg:y="9.758cm">
          <draw:text-box>
            <text:p text:style-name="P3"><text:span text:style-name="T15">SQLite (WAL mode, connection pooling)</text:span></text:p>
          </draw:text-box>
        </draw:frame>
        <draw:frame draw:style-name="gr5" draw:text-style-name="P6" draw:layer="layout" svg:width="2.645cm" svg:height="0.496cm" svg:x="0.68cm" svg:y="10.525cm">
          <draw:text-box>
            <text:p text:style-name="P3"><text:span text:style-name="T27">AST Parsing</text:span></text:p>
          </draw:text-box>
        </draw:frame>
        <draw:path draw:style-name="gr33" draw:text-style-name="P34" draw:layer="layout" svg:width="0.873cm" svg:height="0.529cm" svg:x="9.128cm" svg:y="10.53cm" svg:viewBox="0 0 874 530" svg:d="M0 451v-372c0-10 2-20 6-30s9-18 17-26c7-7 17-13 27-17 9-4 19-6 30-6h714c11 0 21 2 31 6 9 4 18 10 26 17 7 8 13 16 17 26s6 20 6 30v372c0 10-2 20-6 30s-10 18-17 26c-8 7-17 13-26 17-10 4-20 6-31 6h-714c-11 0-21-2-30-6-10-4-20-10-27-17-8-8-13-16-17-26s-6-20-6-30z">
          <text:p/>
        </draw:path>
        <draw:frame draw:style-name="gr5" draw:text-style-name="P6" draw:layer="layout" svg:width="2.671cm" svg:height="0.496cm" svg:x="6.574cm" svg:y="10.525cm">
          <draw:text-box>
            <text:p text:style-name="P3"><text:span text:style-name="T15">Python stdlib </text:span></text:p>
          </draw:text-box>
        </draw:frame>
        <draw:frame draw:style-name="gr34" draw:text-style-name="P35" draw:layer="layout" svg:width="0.505cm" svg:height="0.424cm" svg:x="9.232cm" svg:y="10.604cm">
          <draw:text-box>
            <text:p text:style-name="P3"><text:span text:style-name="T32">ast</text:span></text:p>
          </draw:text-box>
        </draw:frame>
        <draw:path draw:style-name="gr33" draw:text-style-name="P34" draw:layer="layout" svg:width="1.111cm" svg:height="0.529cm" svg:x="6.561cm" svg:y="11.297cm" svg:viewBox="0 0 1112 530" svg:d="M0 451v-370c0-12 2-22 6-32s10-18 17-26c8-7 16-13 26-17s20-6 31-6h953c11 0 21 2 30 6 10 4 19 10 26 17 8 8 13 16 17 26s6 20 6 32v370c0 10-2 21-6 30-4 10-9 19-17 26-7 8-16 13-26 17-9 4-19 6-30 6h-953c-11 0-21-2-31-6s-18-9-26-17c-7-7-13-16-17-26-4-9-6-20-6-30z">
          <text:p/>
        </draw:path>
        <draw:frame draw:style-name="gr5" draw:text-style-name="P6" draw:layer="layout" svg:width="3.164cm" svg:height="0.496cm" svg:x="0.68cm" svg:y="11.319cm">
          <draw:text-box>
            <text:p text:style-name="P3"><text:span text:style-name="T27">Static Analysis</text:span></text:p>
          </draw:text-box>
        </draw:frame>
        <draw:frame draw:style-name="gr34" draw:text-style-name="P35" draw:layer="layout" svg:width="0.546cm" svg:height="0.424cm" svg:x="6.669cm" svg:y="11.371cm">
          <draw:text-box>
            <text:p text:style-name="P3"><text:span text:style-name="T32">ruff</text:span></text:p>
          </draw:text-box>
        </draw:frame>
        <draw:path draw:style-name="gr33" draw:text-style-name="P34" draw:layer="layout" svg:width="1.084cm" svg:height="0.529cm" svg:x="9.763cm" svg:y="11.297cm" svg:viewBox="0 0 1085 530" svg:d="M0 451v-370c0-12 2-22 6-32s9-18 17-26c7-7 16-13 26-17 9-4 19-6 30-6h927c11 0 21 2 30 6 10 4 19 10 26 17 8 8 13 16 17 26s6 20 6 32v370c0 10-2 21-6 30-4 10-9 19-17 26-7 8-16 13-26 17-9 4-19 6-30 6h-927c-11 0-21-2-30-6-10-4-19-9-26-17-8-7-13-16-17-26-4-9-6-20-6-30z">
          <text:p/>
        </draw:path>
        <draw:frame draw:style-name="gr5" draw:text-style-name="P6" draw:layer="layout" svg:width="2.176cm" svg:height="0.496cm" svg:x="7.669cm" svg:y="11.319cm">
          <draw:text-box>
            <text:p text:style-name="P3"><text:span text:style-name="T15"><text:s/>for linting, </text:span></text:p>
          </draw:text-box>
        </draw:frame>
        <draw:frame draw:style-name="gr34" draw:text-style-name="P35" draw:layer="layout" svg:width="0.902cm" svg:height="0.424cm" svg:x="9.853cm" svg:y="11.371cm">
          <draw:text-box>
            <text:p text:style-name="P3"><text:span text:style-name="T32">mypy</text:span></text:p>
          </draw:text-box>
        </draw:frame>
        <draw:frame draw:style-name="gr5" draw:text-style-name="P6" draw:layer="layout" svg:width="3.486cm" svg:height="0.496cm" svg:x="10.854cm" svg:y="11.319cm">
          <draw:text-box>
            <text:p text:style-name="P3"><text:span text:style-name="T15"><text:s/>for type checking</text:span></text:p>
          </draw:text-box>
        </draw:frame>
        <draw:path draw:style-name="gr33" draw:text-style-name="P34" draw:layer="layout" svg:width="1.561cm" svg:height="0.529cm" svg:x="6.561cm" svg:y="12.091cm" svg:viewBox="0 0 1562 530" svg:d="M0 451v-372c0-10 2-20 6-30s10-18 17-26c8-7 16-13 26-17s20-6 31-6h1403c10 0 20 2 30 6s19 10 26 17c7 8 13 16 17 26s6 20 6 30v372c0 10-2 20-6 30s-10 18-17 26c-7 7-16 13-26 17s-20 6-30 6h-1403c-11 0-21-2-31-6s-18-10-26-17c-7-8-13-16-17-26s-6-20-6-30z">
          <text:p/>
        </draw:path>
        <draw:frame draw:style-name="gr5" draw:text-style-name="P6" draw:layer="layout" svg:width="1.582cm" svg:height="0.496cm" svg:x="0.68cm" svg:y="12.086cm">
          <draw:text-box>
            <text:p text:style-name="P3"><text:span text:style-name="T27">Testing</text:span></text:p>
          </draw:text-box>
        </draw:frame>
        <draw:frame draw:style-name="gr34" draw:text-style-name="P35" draw:layer="layout" svg:width="1.007cm" svg:height="0.424cm" svg:x="6.669cm" svg:y="12.165cm">
          <draw:text-box>
            <text:p text:style-name="P3"><text:span text:style-name="T32">pytest</text:span></text:p>
          </draw:text-box>
        </draw:frame>
        <draw:polygon draw:style-name="gr6" draw:text-style-name="P7" draw:layer="layout" svg:width="0.714cm" svg:height="0.635cm" svg:x="25.479cm" svg:y="18.388cm" svg:viewBox="0 0 715 636" draw:points="0,0 715,0 715,636 0,636">
          <text:p/>
        </draw:polygon>
        <draw:frame draw:style-name="gr13" draw:text-style-name="P14" draw:layer="layout" svg:width="11.408cm" svg:height="0.454cm" svg:x="7.824cm" svg:y="13.31cm">
          <draw:text-box>
            <text:p text:style-name="P3"><text:span text:style-name="T33">POC stack — deliberately minimal, no premature infrastructure.</text:span></text:p>
          </draw:text-box>
        </draw:frame>
        <draw:frame draw:style-name="gr7" draw:text-style-name="P8" draw:layer="layout" svg:width="0.412cm" svg:height="0.412cm" svg:x="25.617cm" svg:y="18.503cm">
          <draw:text-box>
            <text:p text:style-name="P3"><text:span text:style-name="T6">15</text:span></text:p>
          </draw:text-box>
        </draw:frame>
      </draw:page>
      <draw:page draw:name="page16" draw:style-name="dp1" draw:master-page-name="master-page3">
        <draw:polygon draw:style-name="gr1" draw:text-style-name="P1" draw:layer="layout" svg:width="26.405cm" svg:height="19.235cm" svg:x="0cm" svg:y="0cm" svg:viewBox="0 0 26406 19236" draw:points="0,0 26406,0 26406,19236 0,19236">
          <text:p/>
        </draw:polygon>
        <draw:path draw:style-name="gr38" draw:text-style-name="P39" draw:layer="layout" svg:width="21.389cm" svg:height="2.172cm" svg:x="2.508cm" svg:y="3.58cm" svg:viewBox="0 0 21390 2173" svg:d="M133 0h21123c18 0 35 3 51 10 17 7 31 16 44 29 12 12 22 27 28 43 7 17 11 34 11 51v1906c0 18-4 35-11 52-6 16-16 30-28 43-13 12-27 22-44 29-16 7-33 10-51 10h-21123c-17 0-34-3-51-10-16-7-31-17-43-29-13-13-22-27-29-43-7-17-10-34-10-52v-1906c0-17 3-34 10-51 7-16 16-31 29-43 12-13 27-22 43-29 17-7 34-10 51-10z">
          <text:p/>
        </draw:path>
        <draw:path draw:style-name="gr46" draw:text-style-name="P26" draw:layer="layout" svg:width="21.389cm" svg:height="2.172cm" svg:x="2.508cm" svg:y="3.58cm" svg:viewBox="0 0 21390 2173" svg:d="M133 0h21123c18 0 35 3 51 10 17 7 31 16 44 29 12 12 22 27 28 43 7 17 11 34 11 51v1906c0 18-4 35-11 52-6 16-16 30-28 43-13 12-27 22-44 29-16 7-33 10-51 10h-21123c-17 0-34-3-51-10-16-7-31-17-43-29-13-13-22-27-29-43-7-17-10-34-10-52v-1906c0-17 3-34 10-51 7-16 16-31 29-43 12-13 27-22 43-29 17-7 34-10 51-10z">
          <text:p/>
        </draw:path>
        <draw:frame draw:style-name="gr9" draw:text-style-name="P10" draw:layer="layout" svg:width="14.99cm" svg:height="1.119cm" svg:x="5.067cm" svg:y="1.873cm">
          <draw:text-box>
            <text:p text:style-name="P3"><text:span text:style-name="T7">5-LAYER MODULAR MONOLITH</text:span></text:p>
          </draw:text-box>
        </draw:frame>
        <draw:frame draw:style-name="gr47" draw:text-style-name="P42" draw:layer="layout" svg:width="3.37cm" svg:height="0.488cm" svg:x="5.719cm" svg:y="4.022cm">
          <draw:text-box>
            <text:p text:style-name="P3"><text:span text:style-name="T46">1. UI &amp; UX Layer</text:span></text:p>
          </draw:text-box>
        </draw:frame>
        <draw:frame draw:style-name="gr48" draw:text-style-name="P43" draw:layer="layout" svg:width="7.486cm" svg:height="0.378cm" svg:x="3.905cm" svg:y="4.781cm">
          <draw:text-box>
            <text:p text:style-name="P3"><text:span text:style-name="T47">Textual TUI · Spec Wizard · Canvas · Diﬀ Screens</text:span></text:p>
          </draw:text-box>
        </draw:frame>
        <draw:path draw:style-name="gr10" draw:text-style-name="P11" draw:layer="layout" svg:width="21.389cm" svg:height="2.173cm" svg:x="2.508cm" svg:y="6.019cm" svg:viewBox="0 0 21390 2174" svg:d="M133 0h21123c18 0 35 4 51 11 17 6 31 16 44 29 12 12 22 27 28 43 7 16 11 33 11 51v1906c0 18-4 35-11 51-6 17-16 31-28 44-13 12-27 22-44 29-16 6-33 10-51 10h-21123c-17 0-34-4-51-10-16-7-31-17-43-29-13-13-22-27-29-44-7-16-10-33-10-51v-1906c0-18 3-35 10-51s16-31 29-43c12-13 27-23 43-29 17-7 34-11 51-11z">
          <text:p/>
        </draw:path>
        <draw:path draw:style-name="gr46" draw:text-style-name="P26" draw:layer="layout" svg:width="21.389cm" svg:height="2.173cm" svg:x="2.508cm" svg:y="6.019cm" svg:viewBox="0 0 21390 2174" svg:d="M133 0h21123c18 0 35 4 51 11 17 6 31 16 44 29 12 12 22 27 28 43 7 16 11 33 11 51v1906c0 18-4 35-11 51-6 17-16 31-28 44-13 12-27 22-44 29-16 6-33 10-51 10h-21123c-17 0-34-4-51-10-16-7-31-17-43-29-13-13-22-27-29-44-7-16-10-33-10-51v-1906c0-18 3-35 10-51s16-31 29-43c12-13 27-23 43-29 17-7 34-11 51-11z">
          <text:p/>
        </draw:path>
        <draw:frame draw:style-name="gr48" draw:text-style-name="P43" draw:layer="layout" svg:width="2.586cm" svg:height="0.378cm" svg:x="15.98cm" svg:y="4.447cm">
          <draw:text-box>
            <text:p text:style-name="P3"><text:span text:style-name="T48">Presentation only</text:span></text:p>
          </draw:text-box>
        </draw:frame>
        <draw:frame draw:style-name="gr47" draw:text-style-name="P42" draw:layer="layout" svg:width="4.146cm" svg:height="0.488cm" svg:x="5.313cm" svg:y="6.462cm">
          <draw:text-box>
            <text:p text:style-name="P3"><text:span text:style-name="T49">2. Middleware Layer</text:span></text:p>
          </draw:text-box>
        </draw:frame>
        <draw:frame draw:style-name="gr48" draw:text-style-name="P43" draw:layer="layout" svg:width="7.679cm" svg:height="0.378cm" svg:x="3.647cm" svg:y="7.221cm">
          <draw:text-box>
            <text:p text:style-name="P3"><text:span text:style-name="T50">SessionController · ApprovalGateway · AuditLogger</text:span></text:p>
          </draw:text-box>
        </draw:frame>
        <draw:path draw:style-name="gr2" draw:text-style-name="P2" draw:layer="layout" svg:width="21.389cm" svg:height="2.172cm" svg:x="2.508cm" svg:y="8.459cm" svg:viewBox="0 0 21390 2173" svg:d="M133 0h21123c18 0 35 3 51 10 17 7 31 17 44 29 12 13 22 27 28 44 7 16 11 33 11 51v1906c0 17-4 34-11 51-6 16-16 31-28 43-13 13-27 22-44 29-16 7-33 10-51 10h-21123c-17 0-34-3-51-10-16-7-31-16-43-29-13-12-22-27-29-43-7-17-10-34-10-51v-1906c0-18 3-35 10-51 7-17 16-31 29-44 12-12 27-22 43-29 17-7 34-10 51-10z">
          <text:p/>
        </draw:path>
        <draw:path draw:style-name="gr49" draw:text-style-name="P26" draw:layer="layout" svg:width="21.389cm" svg:height="2.172cm" svg:x="2.508cm" svg:y="8.459cm" svg:viewBox="0 0 21390 2173" svg:d="M133 0h21123c18 0 35 3 51 10 17 7 31 17 44 29 12 13 22 27 28 44 7 16 11 33 11 51v1906c0 17-4 34-11 51-6 16-16 31-28 43-13 13-27 22-44 29-16 7-33 10-51 10h-21123c-17 0-34-3-51-10-16-7-31-16-43-29-13-12-22-27-29-43-7-17-10-34-10-51v-1906c0-18 3-35 10-51 7-17 16-31 29-44 12-12 27-22 43-29 17-7 34-10 51-10z">
          <text:p/>
        </draw:path>
        <draw:frame draw:style-name="gr48" draw:text-style-name="P43" draw:layer="layout" svg:width="4.222cm" svg:height="0.378cm" svg:x="15.256cm" svg:y="6.887cm">
          <draw:text-box>
            <text:p text:style-name="P3"><text:span text:style-name="T50">Orchestration &amp; safety gates</text:span></text:p>
          </draw:text-box>
        </draw:frame>
        <draw:frame draw:style-name="gr47" draw:text-style-name="P42" draw:layer="layout" svg:width="2.934cm" svg:height="0.488cm" svg:x="5.913cm" svg:y="8.902cm">
          <draw:text-box>
            <text:p text:style-name="P3"><text:span text:style-name="T49">3. Logic Layer</text:span></text:p>
          </draw:text-box>
        </draw:frame>
        <draw:frame draw:style-name="gr48" draw:text-style-name="P43" draw:layer="layout" svg:width="8.07cm" svg:height="0.378cm" svg:x="3.546cm" svg:y="9.661cm">
          <draw:text-box>
            <text:p text:style-name="P3"><text:span text:style-name="T50">SpecAgent · PlanAgent · CodingAgent · SchemaTailor</text:span></text:p>
          </draw:text-box>
        </draw:frame>
        <draw:path draw:style-name="gr28" draw:text-style-name="P29" draw:layer="layout" svg:width="21.389cm" svg:height="2.172cm" svg:x="2.508cm" svg:y="10.899cm" svg:viewBox="0 0 21390 2173" svg:d="M133 0h21123c18 0 35 3 51 10 17 7 31 16 44 29 12 12 22 27 28 43 7 17 11 34 11 51v1906c0 18-4 35-11 52-6 16-16 30-28 43-13 12-27 22-44 29-16 7-33 10-51 10h-21123c-17 0-34-3-51-10-16-7-31-17-43-29-13-13-22-27-29-43-7-17-10-34-10-52v-1906c0-17 3-34 10-51 7-16 16-31 29-43 12-13 27-22 43-29 17-7 34-10 51-10z">
          <text:p/>
        </draw:path>
        <draw:path draw:style-name="gr50" draw:text-style-name="P26" draw:layer="layout" svg:width="21.389cm" svg:height="2.172cm" svg:x="2.508cm" svg:y="10.899cm" svg:viewBox="0 0 21390 2173" svg:d="M133 0h21123c18 0 35 3 51 10 17 7 31 16 44 29 12 12 22 27 28 43 7 17 11 34 11 51v1906c0 18-4 35-11 52-6 16-16 30-28 43-13 12-27 22-44 29-16 7-33 10-51 10h-21123c-17 0-34-3-51-10-16-7-31-17-43-29-13-13-22-27-29-43-7-17-10-34-10-52v-1906c0-17 3-34 10-51 7-16 16-31 29-43 12-13 27-22 43-29 17-7 34-10 51-10z">
          <text:p/>
        </draw:path>
        <draw:frame draw:style-name="gr48" draw:text-style-name="P43" draw:layer="layout" svg:width="3.766cm" svg:height="0.378cm" svg:x="15.482cm" svg:y="9.327cm">
          <draw:text-box>
            <text:p text:style-name="P3"><text:span text:style-name="T50">Three agents + heuristics</text:span></text:p>
          </draw:text-box>
        </draw:frame>
        <draw:frame draw:style-name="gr47" draw:text-style-name="P42" draw:layer="layout" svg:width="2.717cm" svg:height="0.488cm" svg:x="5.97cm" svg:y="11.342cm">
          <draw:text-box>
            <text:p text:style-name="P3"><text:span text:style-name="T49">4. Data Layer</text:span></text:p>
          </draw:text-box>
        </draw:frame>
        <draw:frame draw:style-name="gr48" draw:text-style-name="P43" draw:layer="layout" svg:width="7.734cm" svg:height="0.378cm" svg:x="3.621cm" svg:y="12.1cm">
          <draw:text-box>
            <text:p text:style-name="P3"><text:span text:style-name="T50">Knowledge Graph · Memory Pyramid · Artifact Store</text:span></text:p>
          </draw:text-box>
        </draw:frame>
        <draw:path draw:style-name="gr14" draw:text-style-name="P15" draw:layer="layout" svg:width="21.389cm" svg:height="2.173cm" svg:x="2.508cm" svg:y="13.338cm" svg:viewBox="0 0 21390 2174" svg:d="M133 0h21123c18 0 35 4 51 11 17 6 31 16 44 29 12 12 22 27 28 43 7 16 11 33 11 51v1906c0 18-4 35-11 51-6 17-16 31-28 44-13 12-27 22-44 29-16 6-33 10-51 10h-21123c-17 0-34-4-51-10-16-7-31-17-43-29-13-13-22-27-29-44-7-16-10-33-10-51v-1906c0-18 3-35 10-51s16-31 29-43c12-13 27-23 43-29 17-7 34-11 51-11z">
          <text:p/>
        </draw:path>
        <draw:path draw:style-name="gr50" draw:text-style-name="P26" draw:layer="layout" svg:width="21.389cm" svg:height="2.173cm" svg:x="2.508cm" svg:y="13.338cm" svg:viewBox="0 0 21390 2174" svg:d="M133 0h21123c18 0 35 4 51 11 17 6 31 16 44 29 12 12 22 27 28 43 7 16 11 33 11 51v1906c0 18-4 35-11 51-6 17-16 31-28 44-13 12-27 22-44 29-16 6-33 10-51 10h-21123c-17 0-34-4-51-10-16-7-31-17-43-29-13-13-22-27-29-44-7-16-10-33-10-51v-1906c0-18 3-35 10-51s16-31 29-43c12-13 27-23 43-29 17-7 34-11 51-11z">
          <text:p/>
        </draw:path>
        <draw:frame draw:style-name="gr48" draw:text-style-name="P43" draw:layer="layout" svg:width="4.826cm" svg:height="0.378cm" svg:x="14.948cm" svg:y="11.766cm">
          <draw:text-box>
            <text:p text:style-name="P3"><text:span text:style-name="T50">Queryable repo + tiered memory</text:span></text:p>
          </draw:text-box>
        </draw:frame>
        <draw:frame draw:style-name="gr47" draw:text-style-name="P42" draw:layer="layout" svg:width="4.606cm" svg:height="0.488cm" svg:x="5.107cm" svg:y="13.781cm">
          <draw:text-box>
            <text:p text:style-name="P3"><text:span text:style-name="T51">5. Infrastructure Layer</text:span></text:p>
          </draw:text-box>
        </draw:frame>
        <draw:frame draw:style-name="gr48" draw:text-style-name="P43" draw:layer="layout" svg:width="7.475cm" svg:height="0.378cm" svg:x="3.744cm" svg:y="14.54cm">
          <draw:text-box>
            <text:p text:style-name="P3"><text:span text:style-name="T52">Provider Adapter · ToolRuntime · Budget Manager</text:span></text:p>
          </draw:text-box>
        </draw:frame>
        <draw:frame draw:style-name="gr48" draw:text-style-name="P43" draw:layer="layout" svg:width="5.913cm" svg:height="0.378cm" svg:x="14.566cm" svg:y="14.206cm">
          <draw:text-box>
            <text:p text:style-name="P3"><text:span text:style-name="T52">LLM access + safe exec + context limits</text:span></text:p>
          </draw:text-box>
        </draw:frame>
        <draw:polygon draw:style-name="gr6" draw:text-style-name="P7" draw:layer="layout" svg:width="0.714cm" svg:height="0.635cm" svg:x="25.479cm" svg:y="18.388cm" svg:viewBox="0 0 715 636" draw:points="0,0 715,0 715,636 0,636">
          <text:p/>
        </draw:polygon>
        <draw:frame draw:style-name="gr51" draw:text-style-name="P44" draw:layer="layout" svg:width="11.12cm" svg:height="0.712cm" svg:x="7.984cm" svg:y="15.705cm">
          <draw:text-box>
            <text:p text:style-name="P3"><text:span text:style-name="T53">Protocol interfaces between every layer</text:span></text:p>
          </draw:text-box>
        </draw:frame>
        <draw:frame draw:style-name="gr7" draw:text-style-name="P8" draw:layer="layout" svg:width="0.412cm" svg:height="0.412cm" svg:x="25.617cm" svg:y="18.503cm">
          <draw:text-box>
            <text:p text:style-name="P3"><text:span text:style-name="T6">16</text:span></text:p>
          </draw:text-box>
        </draw:frame>
      </draw:page>
      <draw:page draw:name="page17"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11.104cm" svg:height="1.119cm" svg:x="7.271cm" svg:y="0.259cm">
          <draw:text-box>
            <text:p text:style-name="P3"><text:span text:style-name="T7">SYSTEM MODULE MAP</text:span></text:p>
          </draw:text-box>
        </draw:frame>
        <draw:polygon draw:style-name="gr52" draw:text-style-name="P45" draw:layer="layout" svg:width="2.218cm" svg:height="0.783cm" svg:x="5.622cm" svg:y="9.68cm" svg:viewBox="0 0 2219 784" draw:points="0,0 2219,0 2219,784 0,784">
          <text:p/>
        </draw:polygon>
        <draw:polygon draw:style-name="gr53" draw:text-style-name="P26" draw:layer="layout" svg:width="2.218cm" svg:height="0.783cm" svg:x="5.622cm" svg:y="9.68cm" svg:viewBox="0 0 2219 784" draw:points="0,0 2219,0 2219,784 0,784">
          <text:p/>
        </draw:polygon>
        <draw:frame draw:style-name="gr7" draw:text-style-name="P8" draw:layer="layout" svg:width="14.393cm" svg:height="0.412cm" svg:x="6.495cm" svg:y="1.94cm">
          <draw:text-box>
            <text:p text:style-name="P3"><text:span text:style-name="T36">Each numbered flow corresponds to the </text:span><text:span text:style-name="T54">15-step execution protocol</text:span><text:span text:style-name="T36"> between modules.</text:span></text:p>
          </draw:text-box>
        </draw:frame>
        <draw:polygon draw:style-name="gr52" draw:text-style-name="P45" draw:layer="layout" svg:width="3.821cm" svg:height="1.902cm" svg:x="8.003cm" svg:y="9.68cm" svg:viewBox="0 0 3822 1903" draw:points="0,0 3822,0 3822,1903 0,1903">
          <text:p/>
        </draw:polygon>
        <draw:polygon draw:style-name="gr53" draw:text-style-name="P26" draw:layer="layout" svg:width="3.821cm" svg:height="1.902cm" svg:x="8.003cm" svg:y="9.68cm" svg:viewBox="0 0 3822 1903" draw:points="0,0 3822,0 3822,1903 0,1903">
          <text:p/>
        </draw:polygon>
        <draw:frame draw:style-name="gr54" draw:text-style-name="P46" draw:layer="layout" svg:width="0.694cm" svg:height="0.098cm" svg:x="6.303cm" svg:y="9.689cm">
          <draw:text-box>
            <text:p text:style-name="P3"><text:span text:style-name="T55">Providers Module</text:span></text:p>
          </draw:text-box>
        </draw:frame>
        <draw:polygon draw:style-name="gr52" draw:text-style-name="P45" draw:layer="layout" svg:width="8.82cm" svg:height="1.699cm" svg:x="11.788cm" svg:y="13.242cm" svg:viewBox="0 0 8821 1700" draw:points="0,0 8821,0 8821,1700 0,1700">
          <text:p/>
        </draw:polygon>
        <draw:polygon draw:style-name="gr53" draw:text-style-name="P26" draw:layer="layout" svg:width="8.82cm" svg:height="1.699cm" svg:x="11.788cm" svg:y="13.242cm" svg:viewBox="0 0 8821 1700" draw:points="0,0 8821,0 8821,1700 0,1700">
          <text:p/>
        </draw:polygon>
        <draw:frame draw:style-name="gr54" draw:text-style-name="P46" draw:layer="layout" svg:width="1.114cm" svg:height="0.098cm" svg:x="9.217cm" svg:y="9.689cm">
          <draw:text-box>
            <text:p text:style-name="P3"><text:span text:style-name="T55">Execution &amp; Safety Modules</text:span></text:p>
          </draw:text-box>
        </draw:frame>
        <draw:polygon draw:style-name="gr52" draw:text-style-name="P45" draw:layer="layout" svg:width="2.877cm" svg:height="3.022cm" svg:x="17.905cm" svg:y="9.68cm" svg:viewBox="0 0 2878 3023" draw:points="0,0 2878,0 2878,3023 0,3023">
          <text:p/>
        </draw:polygon>
        <draw:polygon draw:style-name="gr53" draw:text-style-name="P26" draw:layer="layout" svg:width="2.877cm" svg:height="3.022cm" svg:x="17.905cm" svg:y="9.68cm" svg:viewBox="0 0 2878 3023" draw:points="0,0 2878,0 2878,3023 0,3023">
          <text:p/>
        </draw:polygon>
        <draw:frame draw:style-name="gr54" draw:text-style-name="P46" draw:layer="layout" svg:width="1.376cm" svg:height="0.098cm" svg:x="15.368cm" svg:y="13.251cm">
          <draw:text-box>
            <text:p text:style-name="P3"><text:span text:style-name="T55">Knowledge &amp; Persistence Modules</text:span></text:p>
          </draw:text-box>
        </draw:frame>
        <draw:polygon draw:style-name="gr52" draw:text-style-name="P45" draw:layer="layout" svg:width="8.76cm" svg:height="3.534cm" svg:x="5.622cm" svg:y="5.606cm" svg:viewBox="0 0 8761 3535" draw:points="0,0 8761,0 8761,3535 0,3535">
          <text:p/>
        </draw:polygon>
        <draw:polygon draw:style-name="gr53" draw:text-style-name="P26" draw:layer="layout" svg:width="8.76cm" svg:height="3.534cm" svg:x="5.622cm" svg:y="5.606cm" svg:viewBox="0 0 8761 3535" draw:points="0,0 8761,0 8761,3535 0,3535">
          <text:p/>
        </draw:polygon>
        <draw:frame draw:style-name="gr54" draw:text-style-name="P46" draw:layer="layout" svg:width="1.168cm" svg:height="0.098cm" svg:x="18.621cm" svg:y="9.689cm">
          <draw:text-box>
            <text:p text:style-name="P3"><text:span text:style-name="T55">Context Engineering Modules</text:span></text:p>
          </draw:text-box>
        </draw:frame>
        <draw:polygon draw:style-name="gr52" draw:text-style-name="P45" draw:layer="layout" svg:width="2.18cm" svg:height="9.031cm" svg:x="14.544cm" svg:y="2.551cm" svg:viewBox="0 0 2181 9032" draw:points="0,0 2181,0 2181,9032 0,9032">
          <text:p/>
        </draw:polygon>
        <draw:polygon draw:style-name="gr53" draw:text-style-name="P26" draw:layer="layout" svg:width="2.18cm" svg:height="9.031cm" svg:x="14.544cm" svg:y="2.551cm" svg:viewBox="0 0 2181 9032" draw:points="0,0 2181,0 2181,9032 0,9032">
          <text:p/>
        </draw:polygon>
        <draw:frame draw:style-name="gr54" draw:text-style-name="P46" draw:layer="layout" svg:width="0.551cm" svg:height="0.098cm" svg:x="9.681cm" svg:y="5.615cm">
          <draw:text-box>
            <text:p text:style-name="P3"><text:span text:style-name="T55">Agent Module</text:span></text:p>
          </draw:text-box>
        </draw:frame>
        <draw:path draw:style-name="gr55" draw:text-style-name="P26" draw:layer="layout" svg:width="2.768cm" svg:height="1.812cm" svg:x="12.893cm" svg:y="4.099cm" svg:viewBox="0 0 2769 1813" svg:d="M2769 0v206c0 207 0 620 0 871 0 252 0 341-463 437-461 96-1383 198-1845 249l-461 50">
          <text:p/>
        </draw:path>
        <draw:polygon draw:style-name="gr56" draw:text-style-name="P47" draw:layer="layout" svg:width="0.068cm" svg:height="0.064cm" svg:x="12.861cm" svg:y="5.876cm" svg:viewBox="0 0 69 65" draw:points="0,39 62,0 69,65">
          <text:p/>
        </draw:polygon>
        <draw:path draw:style-name="gr56" draw:text-style-name="P47" draw:layer="layout" svg:width="0.069cm" svg:height="0.065cm" svg:x="12.86cm" svg:y="5.876cm" svg:viewBox="0 0 70 66" svg:d="M70 65l-8 1-6-2-6-3-6-2-6-2-6-2-7-3-6-2-6-2-6-2-6-2-1-8 3-2 6-3 5-4 4 6-6 3-4 3 1 1 6 2 6 2 7 2 6 3 6 2 6 2 7 2 6 3 6 2h1l-1-3v-7l-1-6-1-7v-6l-1-7-1-6v-6l-1-7-3 3-6 4v-2 2l-5 3-5 4-2-3 2 3-6 3-5 4-7 3-3-5 5-4 7-3 5-4 5-3 1 1-1-1 6-5 5-3 2-2h8zM14 27l6-3 3 5-5 4z">
          <text:p/>
        </draw:path>
        <draw:path draw:style-name="gr55" draw:text-style-name="P26" draw:layer="layout" svg:width="0cm" svg:height="0.506cm" svg:x="12.108cm" svg:y="6.187cm" svg:viewBox="0 0 0 507" svg:d="M0 0v44c0 45 0 135 0 220 0 84 0 164 0 203v40">
          <text:p/>
        </draw:path>
        <draw:polygon draw:style-name="gr56" draw:text-style-name="P47" draw:layer="layout" svg:width="0.065cm" svg:height="0.065cm" svg:x="12.076cm" svg:y="6.661cm" svg:viewBox="0 0 66 66" draw:points="66,0 32,66 0,0">
          <text:p/>
        </draw:polygon>
        <draw:path draw:style-name="gr56" draw:text-style-name="P47" draw:layer="layout" svg:width="0.065cm" svg:height="0.065cm" svg:x="12.076cm" svg:y="6.661cm" svg:viewBox="0 0 66 66" svg:d="M63 13l-3 6-3 6-3 7-4 5-3 6-2 6-3 6-3 6-3 5h-7l-2-3-3-6-3-6 6-3 3 6 2 5 1-1 3-6 3-6 3-6 3-5 2-6 3-7 4-6 3-6 3-5 1-2h-4-7-7-6-7-6-7-6-6l2 4 3 5-2 1 2-1 3 6 3 6-3 2 3-2 2 7 3 6 3 5-6 3-2-5-3-6-3-6-3-7 1-1-1 1-3-6-3-5-1-3v-7h66v7zM21 51l-3-6 6-3 3 6z">
          <text:p/>
        </draw:path>
        <draw:path draw:style-name="gr56" draw:text-style-name="P47" draw:layer="layout" svg:width="0.623cm" svg:height="0.511cm" svg:x="12.539cm" svg:y="7.1cm" svg:viewBox="0 0 624 512" svg:d="M3 0l15 6-3 8-15-7zM33 13l15 6-4 8-14-7zM63 26l14 6-3 8-15-7zM92 39l14 6h1l-3 8-1-1-14-6zM121 51l15 7-3 7-15-6zM152 65l14 6-3 7-15-6zM181 78l15 7-3 7-16-7zM210 91l15 7-4 7-14-7zM240 104l15 7-4 8-14-7zM270 118l15 7-4 8-15-7zM300 133l15 7-4 8-15-8zM329 148l4 2 11 5-4 8-11-6-3-2zM359 163l14 8-4 7-14-8zM387 179l14 7-3 7-15-7zM415 194l14 8-4 7-14-8zM443 211c5 3 10 6 14 9l-4 7c-5-3-9-6-14-9zM471 229c4 3 9 6 13 9l-4 7c-5-4-9-7-14-10zM498 248c4 3 9 6 13 9l-5 7c-4-3-8-7-13-10zM523 267c5 4 9 8 13 12l-5 6c-4-4-9-8-13-11zM548 290c4 4 7 8 11 12l-6 6c-3-4-7-8-11-12zM570 315c3 4 7 8 10 13l-7 4c-3-4-6-8-9-12zM589 342c3 4 6 9 9 13l-8 4c-2-4-5-9-8-13zM605 371c2 4 4 9 6 14l-7 3c-2-5-4-9-6-14zM617 403c1 5 2 10 3 16l-8 1c-1-5-2-10-3-15zM623 434c0 6 1 12 1 18h-8c0-6-1-12-1-17zM624 467v5 11h-8v-11-5zM624 499v13h-8v-13z">
          <text:p/>
        </draw:path>
        <draw:polygon draw:style-name="gr56" draw:text-style-name="P47" draw:layer="layout" svg:width="0.065cm" svg:height="0.065cm" svg:x="13.126cm" svg:y="7.578cm" svg:viewBox="0 0 66 66" draw:points="66,0 33,66 0,0">
          <text:p/>
        </draw:polygon>
        <draw:path draw:style-name="gr56" draw:text-style-name="P47" draw:layer="layout" svg:width="0.065cm" svg:height="0.065cm" svg:x="13.126cm" svg:y="7.578cm" svg:viewBox="0 0 66 66" svg:d="M63 14l-3 6-3 6-3 6-3 5-3 6-2 6-3 6-3 6-3 5h-7l-2-3-4-6-3-6 7-3 3 6 2 5 1-1 3-6 3-6 3-6 3-6 2-5 3-6 3-6 3-6 3-7 1-1h-4-6-7-6-7-7-7-6-6l2 5 3 5-2 1 2-1 3 6 2 6-2 1 2-1 3 6 3 6 3 5-6 3-3-6-2-5-3-6-3-6 1-1-1 1-3-6-3-6-1-2v-8h66v8zM21 51l-3-6 6-3 4 6z">
          <text:p/>
        </draw:path>
        <draw:path draw:style-name="gr55" draw:text-style-name="P26" draw:layer="layout" svg:width="0.577cm" svg:height="0.508cm" svg:x="11.127cm" svg:y="7.103cm" svg:viewBox="0 0 578 509" svg:d="M578 0l-96 45c-96 45-289 135-386 221-96 84-96 163-96 203v40">
          <text:p/>
        </draw:path>
        <draw:polygon draw:style-name="gr56" draw:text-style-name="P47" draw:layer="layout" svg:width="0.065cm" svg:height="0.065cm" svg:x="11.094cm" svg:y="7.578cm" svg:viewBox="0 0 66 66" draw:points="66,0 34,66 0,0">
          <text:p/>
        </draw:polygon>
        <draw:path draw:style-name="gr56" draw:text-style-name="P47" draw:layer="layout" svg:width="0.065cm" svg:height="0.065cm" svg:x="11.094cm" svg:y="7.578cm" svg:viewBox="0 0 66 66" svg:d="M63 14l-3 6-3 6-3 6-2 5-3 6-3 6-3 6-3 6-3 5h-7l-2-3-3-6-2-6 5-3 3 6 3 5v-1l3-6 3-6 3-6 3-6 3-5 3-6 2-6 3-6 3-7 1-1h-4-6-7-6-7-6-7-6-7l2 5 4 5-3 1 3-1 3 6 3 6-3 1 3-1 3 6 3 6 2 5-5 3-3-6-3-5-3-6-4-6 1-1-1 1-3-6-3-6-1-2v-8h66v8zM23 51l-3-6 5-3 3 6z">
          <text:p/>
        </draw:path>
        <draw:path draw:style-name="gr55" draw:text-style-name="P26" draw:layer="layout" svg:width="0cm" svg:height="0.506cm" svg:x="11.127cm" svg:y="8.02cm" svg:viewBox="0 0 0 507" svg:d="M0 0v45c0 45 0 135 0 220 0 84 0 163 0 203v39">
          <text:p/>
        </draw:path>
        <draw:polygon draw:style-name="gr56" draw:text-style-name="P47" draw:layer="layout" svg:width="0.065cm" svg:height="0.065cm" svg:x="11.094cm" svg:y="8.495cm" svg:viewBox="0 0 66 66" draw:points="66,0 34,66 0,0">
          <text:p/>
        </draw:polygon>
        <draw:path draw:style-name="gr56" draw:text-style-name="P47" draw:layer="layout" svg:width="0.065cm" svg:height="0.065cm" svg:x="11.094cm" svg:y="8.495cm" svg:viewBox="0 0 66 66" svg:d="M63 13l-3 6-3 6-3 5-2 6-3 6-3 6-3 7-3 5-3 6h-7l-2-3-3-6-2-6 5-4 3 7 3 5v-1l3-6 3-7 3-6 3-6 3-5 3-6 2-6 3-6 3-6 1-1h-4-6-7-6-7-6-7-6-7l2 3 4 6-3 1 3-1 3 6 3 6-3 1 3-1 3 6 3 5 2 6-5 3-3-6-3-5-3-6-4-6 1-1-1 1-3-6-3-6-1-2v-7h66v7zM23 51l-3-7 5-3 3 6z">
          <text:p/>
        </draw:path>
        <draw:path draw:style-name="gr55" draw:text-style-name="P26" draw:layer="layout" svg:width="8.136cm" svg:height="0.977cm" svg:x="11.691cm" svg:y="8.873cm" svg:viewBox="0 0 8137 978" svg:d="M0 0l202 45c202 44 606 133 1962 222 1356 90 3664 181 4818 271 1155 90 1155 180 1155 253s0 130 0 159v28">
          <text:p/>
        </draw:path>
        <draw:polygon draw:style-name="gr56" draw:text-style-name="P47" draw:layer="layout" svg:width="0.065cm" svg:height="0.065cm" svg:x="19.794cm" svg:y="9.817cm" svg:viewBox="0 0 66 66" draw:points="66,0 34,66 0,0">
          <text:p/>
        </draw:polygon>
        <draw:path draw:style-name="gr56" draw:text-style-name="P47" draw:layer="layout" svg:width="0.065cm" svg:height="0.065cm" svg:x="19.794cm" svg:y="9.817cm" svg:viewBox="0 0 66 66" svg:d="M63 15l-3 5-3 6-3 6-2 6-3 6-3 5-3 6-3 6-3 5h-7l-2-3-3-6-2-6 5-2 3 5 3 5v-1l3-6 3-6 3-5 3-6 3-6 3-6 2-6 3-5 3-7 1-1h-4-6-7-6-7-6-7-7-6l2 4 3 6h-2 2l3 6 4 5-4 2 4-2 3 6 3 6 2 6-5 3-3-6-4-6-3-6-3-6h1-1l-3-5-3-6-1-2v-9h66v9zM23 51l-3-5 5-3 3 6z">
          <text:p/>
        </draw:path>
        <draw:path draw:style-name="gr55" draw:text-style-name="P26" draw:layer="layout" svg:width="0cm" svg:height="0.709cm" svg:x="19.827cm" svg:y="10.26cm" svg:viewBox="0 0 0 710" svg:d="M0 0v34c0 33 0 101 0 180 0 78 0 168 0 253 0 84 0 164 0 203v40">
          <text:p/>
        </draw:path>
        <draw:polygon draw:style-name="gr56" draw:text-style-name="P47" draw:layer="layout" svg:width="0.065cm" svg:height="0.065cm" svg:x="19.794cm" svg:y="10.937cm" svg:viewBox="0 0 66 66" draw:points="66,0 34,66 0,0">
          <text:p/>
        </draw:polygon>
        <draw:path draw:style-name="gr56" draw:text-style-name="P47" draw:layer="layout" svg:width="0.065cm" svg:height="0.065cm" svg:x="19.794cm" svg:y="10.937cm" svg:viewBox="0 0 66 66" svg:d="M63 13l-3 6-3 6-3 6-2 5-3 7-3 6-3 6-3 6-3 5h-7l-2-3-3-6-2-6 5-3 3 6 3 5v-1l3-6 3-6 3-6 3-6 3-6 3-6 2-6 3-6 3-5 1-2h-4-6-7-6-7-6-7-7-6l2 4 3 5-2 1 2-1 3 6 4 6-4 2 4-2 3 6 3 6 2 6-5 3-3-5-4-7-3-6-3-6 1-1-1 1-3-6-3-5-1-3v-7h66v7zM23 51l-3-6 5-3 3 6z">
          <text:p/>
        </draw:path>
        <draw:path draw:style-name="gr55" draw:text-style-name="P26" draw:layer="layout" svg:width="0.269cm" svg:height="0.721cm" svg:x="19.558cm" svg:y="11.379cm" svg:viewBox="0 0 270 722" svg:d="M270 0v34c0 34 0 102 0 180 0 79 0 169-45 255-45 88-135 170-180 212l-45 41">
          <text:p/>
        </draw:path>
        <draw:polygon draw:style-name="gr56" draw:text-style-name="P47" draw:layer="layout" svg:width="0.069cm" svg:height="0.068cm" svg:x="19.535cm" svg:y="12.054cm" svg:viewBox="0 0 70 69" draw:points="70,49 0,69 25,0">
          <text:p/>
        </draw:polygon>
        <draw:path draw:style-name="gr56" draw:text-style-name="P47" draw:layer="layout" svg:width="0.072cm" svg:height="0.071cm" svg:x="19.532cm" svg:y="12.054cm" svg:viewBox="0 0 73 72" svg:d="M73 49l-5 5-6 1-6 2-7 2-6 2-6 2-6 1-7 2-6 2-7 2-6 2-5-6 1-3 3-6 2-6 6 2-2 6-2 5h1l6-2 8-2 6-2 6-2 6-1 6-2 7-2 6-2 6-2h1l-2-3-4-4-5-5-4-5-5-5-4-5-4-5-5-5-4-4-1 3-2 6h-2 2l-2 8-3 6-3-2 3 2-2 6-2 6-4 6-6-2 3-7 2-6 2-6 4-7 1 1-1-1 2-6 2-6 1-2 5-5zM6 51l2-6 6 2-2 6z">
          <text:p/>
        </draw:path>
        <draw:path draw:style-name="gr56" draw:text-style-name="P47" draw:layer="layout" svg:width="4.587cm" svg:height="1.068cm" svg:x="14.41cm" svg:y="12.496cm" svg:viewBox="0 0 4588 1069" svg:d="M4588 7l-14 8-4-7 14-8zM4560 23l-14 8-4-8 14-7zM4531 38l-3 2-10 6-4-7 10-6 3-2zM4503 54l-13 8-4-8 13-7zM4475 69l-14 8-4-8 14-7zM4446 84l-15 7-4-7 16-7zM4417 98l-15 7-3-8 14-6zM4387 111l-15 7-3-8 14-6zM4357 124l-15 6-3-7 15-7zM4326 137l-14 5-3-7 14-6zM4297 148l-15 6-3-8 15-6zM4266 159l-16 6-3-7 16-6zM4236 170l-15 5-3-7 15-5zM4205 181l-15 5-3-8 16-5zM4173 191l-15 5-2-8 15-4zM4143 201l-15 5-2-8 15-5zM4113 210l-16 5-3-8 16-4zM4080 220l-4 1-11 3-2-7 11-4 4-1zM4050 229l-16 4-2-8 16-4zM4019 237l-16 5-2-8 16-4zM3987 246l-16 5-3-8 17-5zM3955 255l-15 4-2-8 15-4zM3924 263l-15 4-2-8 15-4zM3893 271l-16 4-2-7 16-5zM3861 280l-16 4-2-8 16-4zM3830 288l-16 4-2-8 16-4zM3798 296l-15 4-2-8 15-4zM3767 304l-16 4-2-8 16-4zM3736 312l-16 4-2-8 16-4zM3704 320l-16 4-2-8 16-4zM3672 328l-15 4-3-8 16-4zM3641 336l-16 5-2-8 16-4zM3609 345l-16 4-2-8 16-4zM3577 353l-15 4-2-8 15-4zM3546 362l-16 4-2-8 16-4zM3515 370l-16 4-2-8 16-4zM3484 379l-16 4-2-8 16-4zM3452 388l-16 4-2-8 16-4zM3420 397l-15 4-2-8 15-4zM3390 406l-15 4-3-8 15-4zM3359 415l-16 5-3-8 17-5zM3327 425l-15 5-3-8 16-5zM3296 435l-15 5-2-8 15-5zM3267 445l-16 6-3-8 16-6zM3235 456l-16 6-2-7 15-6zM3204 468l-14 6-3-8 14-6zM3176 480c-5 2-10 4-16 7l-3-8c5-2 11-5 16-7zM3145 494c-5 2-9 4-14 7l-4-8c5-2 10-4 15-7zM3117 508c-4 2-9 4-14 7l-3-7c4-3 9-5 13-8zM3089 523l-14 8-4-7 14-8zM3061 539l-14 8-4-7 14-8zM3034 555l-7 4-7 5-4-7 7-4 6-4zM3006 572l-14 9-4-7 14-9zM2979 589l-14 8-4-7 14-8zM2951 605c-5 3-10 5-15 8l-4-7c5-3 10-6 15-8zM2922 620l-14 7-4-7 14-7zM2893 634c-5 2-10 5-15 7l-3-8c5-2 10-4 15-6zM2862 648l-15 6-3-7 15-7zM2832 660l-15 6-3-8 15-6zM2802 671l-15 6-3-8 15-5zM2771 682l-16 5-2-7 15-6zM2740 692l-15 5-3-8 16-5zM2709 701l-16 5-2-8 15-4zM2678 710l-16 4-2-8 16-4zM2646 718l-16 5-2-8 16-4zM2615 726l-16 4-2-8 16-4zM2583 734l-16 4-2-8 17-4zM2551 741l-15 3-2-8 15-3zM2520 748l-16 3-1-8 15-3zM2488 754l-16 4h-1l-1-4-1-4h1l16-4zM2456 761l-16 3-1-8 15-3zM2425 767l-17 3-1-8 16-3zM2392 773l-17 3-1-8 17-3zM2360 779l-16 2-1-8 15-2zM2328 784l-16 3-1-8 16-3zM2296 790l-16 2-1-8 16-2zM2263 795l-15 3-2-8 16-3zM2232 800l-16 3-1-8 16-3zM2200 805l-16 3-1-8 16-3zM2168 810l-17 3-1-8 16-3zM2135 815l-15 3-2-8 16-3zM2104 820l-16 2-2-8 16-2zM2072 825l-17 2-1-8 16-2zM2039 830l-16 2-1-8 16-2zM2007 834l-15 2-2-8 16-2zM1976 839l-16 2-1-8 16-2zM1944 843l-16 2-1-8 16-2zM1912 848l-16 2-1-8 16-2zM1880 852l-16 3-1-9 16-2zM1848 857l-17 3-1-9 17-3zM1815 862l-16 2-2-8 17-3zM1782 866l-16 2-2-8 17-2zM1749 871l-15 2-2-8 16-2zM1718 875l-16 2-1-8 16-2zM1686 879l-17 2-1-8 17-2zM1653 883l-17 2-1-8 17-2zM1620 887l-16 2-1-8 16-2zM1588 891l-16 2-1-8 16-2zM1556 895l-17 2-1-8 17-2zM1523 899l-16 2-1-8 16-2zM1491 903l-16 2-1-8 16-2zM1458 907l-16 2-1-8 16-2zM1426 911l-16 2-1-8 16-2zM1393 915l-16 2-1-8 16-2zM1361 919l-16 2-1-8 16-2zM1329 923l-16 2-1-8 16-2zM1297 927l-16 2-1-8 16-2zM1264 930l-16 2v-8l16-2zM1233 934l-16 2-1-8 16-2zM1200 938l-16 2-1-8 17-2zM1167 942l-16 2-1-8 16-2zM1135 946l-17 1-1-8 17-2zM1102 949l-16 2-1-8 16-2zM1069 953l-16 2-1-8 17-2zM1037 957l-16 1-1-8 16-1zM1005 960l-15 2-1-8 16-2zM974 964l-16 2-1-9 16-1zM943 967l-17 2-1-8 17-2zM910 971l-17 2v-8l16-2zM877 975l-16 1-1-8 16-2zM845 978l-16 2v-8l15-2zM813 982l-16 1-1-8 17-1zM780 985l-16 2-1-8 17-2zM748 989l-16 1-1-8 16-1zM716 992l-15 2-1-8 15-2zM684 996l-17 2v-9l16-1zM651 999l-16 2-1-8 16-2zM619 1003l-16 1v-8l15-1zM587 1006l-16 2-1-8 17-2zM554 1010l-16 1-1-8 16-1zM522 1013l-16 2v-8l15-2zM491 1017l-16 1-1-8 16-2zM459 1020l-17 2v-8l16-2zM426 1023l-16 2-1-8 16-2zM394 1027l-16 2-1-8 16-2zM362 1030l-16 2-1-8 16-2zM330 1034l-17 2v-8l16-2zM297 1037l-16 2-1-8 16-2zM265 1041l-16 2-1-9 16-1zM233 1044l-16 2-1-8 16-2zM200 1048l-16 2-1-9 17-1zM168 1051l-16 2-1-8 16-2zM136 1055l-16 1-1-8 16-1zM104 1058l-16 2-1-8 16-2zM71 1062l-16 1-1-8 17-1zM39 1065l-16 2-1-8 16-2zM7 1069h-6l-1-8h6z">
          <text:p/>
        </draw:path>
        <draw:polygon draw:style-name="gr56" draw:text-style-name="P47" draw:layer="layout" svg:width="0.068cm" svg:height="0.065cm" svg:x="14.378cm" svg:y="13.524cm" svg:viewBox="0 0 69 66" draw:points="62,0 69,66 0,41">
          <text:p/>
        </draw:polygon>
        <draw:path draw:style-name="gr56" draw:text-style-name="P47" draw:layer="layout" svg:width="0.068cm" svg:height="0.066cm" svg:x="14.378cm" svg:y="13.524cm" svg:viewBox="0 0 69 67" svg:d="M69 66l-7 1-6-2-6-3-7-2-6-2-6-3-6-2-6-2-6-2-6-3-7-2v-7l3-2 6-3 6-5 3 7-5 3-5 3h1l6 3 6 2 6 2 7 2 6 3 6 2 6 2 6 2 6 3h1v-3l-1-7-1-6v-7l-1-6-1-8v-6l-1-7-1-5-3 2-5 3-1-1 1 1-6 4-5 4-2-3 2 3-6 3-5 4-5 4-4-6 6-4 5-3 5-4 6-3 1 1-1-1 5-4 6-3 2-2 7-1zM15 27l5-3 4 6-6 4z">
          <text:p/>
        </draw:path>
        <draw:path draw:style-name="gr56" draw:text-style-name="P47" draw:layer="layout" svg:width="0.264cm" svg:height="0.919cm" svg:x="19.567cm" svg:y="12.496cm" svg:viewBox="0 0 265 920" svg:d="M5 0l13 10-5 6-13-10zM32 20l12 10-5 6-13-10zM56 39l12 10-5 6-12-9zM82 60c4 4 8 7 12 11l-5 6c-4-4-8-7-13-11zM106 81c4 4 9 7 13 11l-6 6c-4-4-8-7-12-11zM131 104c4 3 8 7 12 11l-6 6c-4-4-8-8-12-12zM154 127c4 4 8 8 11 12l-6 5c-3-4-7-8-11-12zM176 151c4 4 7 8 11 13l-7 5c-3-4-6-9-10-13zM197 177c3 4 6 9 9 13l-6 5c-3-4-6-9-10-13zM215 204c2 4 4 8 6 11l2 3-7 4-2-3c-2-3-4-7-6-11zM230 233c3 5 5 10 7 16l-8 3c-2-5-4-10-6-15zM242 264c2 5 4 10 5 16l-8 2c-1-5-3-10-4-15zM251 295c1 6 3 11 4 16l-8 2c-1-5-2-11-4-16zM257 328c1 5 2 10 3 16l-8 1c-1-6-2-11-3-16zM261 360c1 5 1 11 2 16l-9 1c0-6 0-11-1-16zM263 392l1 17h-8l-1-16zM264 425l1 16h-9v-16zM265 458v16h-8v-16zM265 491v16h-8v-16zM265 523v17h-9l1-17zM264 556v16h-8v-16zM264 588l-1 16h-8l1-16zM263 621l-1 17h-8l1-17zM261 655l-1 16h-8l1-17zM259 687l-2 16-8-1 2-15zM255 719l-1 11-1 4-8-1 1-4 1-11zM250 751c-1 5-2 10-3 16l-8-2c1-5 2-10 3-16zM244 782c-1 6-3 11-4 17l-8-2c2-6 3-11 4-17zM236 814c-2 6-3 11-5 17l-7-4c1-5 3-10 4-15zM226 847c-1 5-3 10-5 15l-7-3c1-5 3-10 5-14zM215 878l-5 14-7-3 5-14zM205 907l-5 13-8-2 5-14z">
          <text:p/>
        </draw:path>
        <draw:polygon draw:style-name="gr56" draw:text-style-name="P47" draw:layer="layout" svg:width="0.061cm" svg:height="0.072cm" svg:x="19.743cm" svg:y="13.372cm" svg:viewBox="0 0 62 73" draw:points="62,23 7,73 0,0 61,23">
          <text:p/>
        </draw:polygon>
        <draw:path draw:style-name="gr56" draw:text-style-name="P47" draw:layer="layout" svg:width="0.064cm" svg:height="0.074cm" svg:x="19.74cm" svg:y="13.372cm" svg:viewBox="0 0 65 75" svg:d="M65 23l-3 8-5 4-5 5-4 4-5 5-5 4-5 4-4 5-5 4-5 5-4 4-8-3v-4l-1-6-1-6 8-1v6l1 6 1-1 4-5 5-4 5-4 5-5 5-4 4-5 5-4 5-4 5-5v-1l-3-2-6-2-6-3-6-2-6-2-6-2-6-3-6-2-6-2v4l1 6h-2 2v7l1 7h-3 3l1 6v7l2 6-7 1-1-6-1-7v-6l-1-8h1-1l-1-6-1-7v-2l3-7zM5 56v-7l7-1 1 7z">
          <text:p/>
        </draw:path>
        <draw:path draw:style-name="gr55" draw:text-style-name="P26" draw:layer="layout" svg:width="7.381cm" svg:height="3.229cm" svg:x="11.723cm" svg:y="8.893cm" svg:viewBox="0 0 7382 3230" svg:d="M7382 3230l-54-45c-54-45-161-135-215-225s-54-180-54-290 0-241 0-383 0-295 0-416c0-122 0-212 0-322s0-240 0-371c0-130 0-261 0-371s0-200-1008-290c-1007-90-3021-180-4197-266-1177-86-1515-168-1685-210l-169-41">
          <text:p/>
        </draw:path>
        <draw:polygon draw:style-name="gr56" draw:text-style-name="P47" draw:layer="layout" svg:width="0.071cm" svg:height="0.063cm" svg:x="11.691cm" svg:y="8.869cm" svg:viewBox="0 0 72 64" draw:points="57,64 0,17 72,0">
          <text:p/>
        </draw:polygon>
        <draw:path draw:style-name="gr56" draw:text-style-name="P47" draw:layer="layout" svg:width="0.072cm" svg:height="0.064cm" svg:x="11.69cm" svg:y="8.868cm" svg:viewBox="0 0 73 65" svg:d="M57 65l-7-1-5-5-5-5-5-4-5-4-5-4-5-4-5-5-5-4-5-4-5-4 2-7 4-1 6-1 6-2 2 7-6 1-6 1 1 1 5 4 5 4 5 5 5 4 5 4 5 4 5 4 5 5 5 4 1 1 1-4 1-6 2-6 1-7 3-6 1-6 2-7 1-6 2-5-4 1-7 1v-2 2l-6 1-7 2-1-3 1 3-6 1-6 2-7 1-1-6 6-2 6-1 7-1 6-2v2-2l6-1 8-2h2l7 1zM18 10l7-1 1 6-6 2z">
          <text:p/>
        </draw:path>
        <draw:path draw:style-name="gr55" draw:text-style-name="P26" draw:layer="layout" svg:width="3.526cm" svg:height="1.056cm" svg:x="7.036cm" svg:y="8.806cm" svg:viewBox="0 0 3527 1057" svg:d="M3527 0l-549 55c-549 56-1648 169-2197 269-549 101-549 191-549 281s0 180-39 255c-38 75-116 136-154 167l-39 30">
          <text:p/>
        </draw:path>
        <draw:polygon draw:style-name="gr56" draw:text-style-name="P47" draw:layer="layout" svg:width="0.071cm" svg:height="0.065cm" svg:x="7.011cm" svg:y="9.817cm" svg:viewBox="0 0 72 66" draw:points="0,66 31,0 72,52">
          <text:p/>
        </draw:polygon>
        <draw:path draw:style-name="gr56" draw:text-style-name="P47" draw:layer="layout" svg:width="0.073cm" svg:height="0.068cm" svg:x="7.009cm" svg:y="9.817cm" svg:viewBox="0 0 74 69" svg:d="M74 52l-6 4-6 1-7 2-6 1-6 1-8 2-6 1-6 1-7 2-6 1-6 1-4-5 1-4 3-6 3-6 6 3-3 6-3 5h2l6-2 6-1 7-1 6-2 7-1 7-1 6-2 6-1 7-1h1l-2-3-4-5-4-5-4-6-4-5-4-5-4-5-4-5-5-5-1 4-3 6-1-1 1 1-3 6-2 6-3-2 3 2-3 6-3 5-3 6-6-2 3-6 3-6 3-6 2-6 2 1-2-1 3-6 3-7 1-2 6-4zM7 48l2-5 6 2-2 6z">
          <text:p/>
        </draw:path>
        <draw:path draw:style-name="gr55" draw:text-style-name="P26" draw:layer="layout" svg:width="4.254cm" svg:height="1.085cm" svg:x="6.276cm" svg:y="8.797cm" svg:viewBox="0 0 4255 1086" svg:d="M258 1086l-43-33c-43-34-130-102-173-181-42-78-42-168-42-258s0-180 710-283c709-102 2127-217 2836-274l709-57">
          <text:p/>
        </draw:path>
        <draw:polygon draw:style-name="gr56" draw:text-style-name="P47" draw:layer="layout" svg:width="0.067cm" svg:height="0.065cm" svg:x="10.495cm" svg:y="8.767cm" svg:viewBox="0 0 68 66" draw:points="0,0 68,27 5,66">
          <text:p/>
        </draw:polygon>
        <draw:path draw:style-name="gr56" draw:text-style-name="P47" draw:layer="layout" svg:width="0.067cm" svg:height="0.066cm" svg:x="10.495cm" svg:y="8.766cm" svg:viewBox="0 0 68 67" svg:d="M0 1l7-1 6 3 6 2 6 3 6 2 6 2 6 3 6 2 6 3 7 2 6 2v8l-3 2-6 3-6 3-3-5 5-4 6-2-1-1-7-2-7-3-6-2-6-2-6-3-6-2-6-3-6-2-6-3h-1v3l1 7 1 6v7l1 6v8l1 6v7l1 5 3-2 5-3 1 1-1-1 6-3 5-4 2 3-2-3 6-3 5-5 6-3 3 7-5 3-6 3-5 4-6 3-1-1 1 1-5 3-6 4-2 1-7 1zM53 40l-6 5-3-7 6-3z">
          <text:p/>
        </draw:path>
        <draw:path draw:style-name="gr55" draw:text-style-name="P26" draw:layer="layout" svg:width="0.401cm" svg:height="0.913cm" svg:x="10.353cm" svg:y="8.937cm" svg:viewBox="0 0 402 914" svg:d="M402 0l-67 34c-67 34-201 101-268 180s-67 169-67 259 0 181 0 254 0 130 0 159v28">
          <text:p/>
        </draw:path>
        <draw:polygon draw:style-name="gr56" draw:text-style-name="P47" draw:layer="layout" svg:width="0.065cm" svg:height="0.065cm" svg:x="10.321cm" svg:y="9.817cm" svg:viewBox="0 0 66 66" draw:points="66,0 33,66 0,0">
          <text:p/>
        </draw:polygon>
        <draw:path draw:style-name="gr56" draw:text-style-name="P47" draw:layer="layout" svg:width="0.065cm" svg:height="0.065cm" svg:x="10.321cm" svg:y="9.817cm" svg:viewBox="0 0 66 66" svg:d="M63 15l-3 5-3 6-3 6-3 6-3 6-3 5-2 6-3 6-3 5h-7l-2-3-3-6-3-6 6-2 3 5 2 5 1-1 3-6 3-6 3-5 2-6 3-6 3-6 3-6 3-5 3-7 1-1h-4-7-6-7-6-7-6-8-5l2 4 3 6h-2 2l3 6 3 5-3 2 3-2 3 6 3 6 3 6-6 3-3-6-3-6-3-6-3-6h1-1l-3-5-3-6-1-2v-9h66v9zM22 51l-3-5 6-3 3 6z">
          <text:p/>
        </draw:path>
        <draw:path draw:style-name="gr55" draw:text-style-name="P26" draw:layer="layout" svg:width="4.146cm" svg:height="0.848cm" svg:x="10.65cm" svg:y="10.26cm" svg:viewBox="0 0 4147 849" svg:d="M0 0l54 34c53 33 159 101 213 180 53 78 53 169 691 277 637 108 1913 233 2550 296l639 62">
          <text:p/>
        </draw:path>
        <draw:polygon draw:style-name="gr56" draw:text-style-name="P47" draw:layer="layout" svg:width="0.068cm" svg:height="0.065cm" svg:x="14.76cm" svg:y="11.073cm" svg:viewBox="0 0 69 66" draw:points="7,0 69,40 0,66">
          <text:p/>
        </draw:polygon>
        <draw:path draw:style-name="gr56" draw:text-style-name="P47" draw:layer="layout" svg:width="0.069cm" svg:height="0.065cm" svg:x="14.76cm" svg:y="11.073cm" svg:viewBox="0 0 70 66" svg:d="M7 0l7 1 6 3 5 4 7 4 5 3 6 4 5 3 6 4 5 3 5 4 6 3-1 7-4 2-6 2-6 2-2-6 6-2 5-2-1-1-5-3-6-4-5-3-6-4-5-3-7-3-5-4-6-3-5-5-1-1-1 4v7l-1 7-1 6v7l-1 6-1 7v6l-1 6 4-2 6-2v2-2l6-2 6-3 1 3-1-3 7-2 6-2 6-3 2 6-6 3-6 2-7 2-6 3-1-2 1 2-6 2-6 2-2 1h-8zM53 49l-6 2-2-6 6-2z">
          <text:p/>
        </draw:path>
        <draw:path draw:style-name="gr55" draw:text-style-name="P26" draw:layer="layout" svg:width="0.7cm" svg:height="0.724cm" svg:x="9.356cm" svg:y="10.26cm" svg:viewBox="0 0 701 725" svg:d="M701 0l-53 34c-53 33-160 101-213 180s-53 169-117 256c-63 87-190 171-254 213l-64 42">
          <text:p/>
        </draw:path>
        <draw:polygon draw:style-name="gr56" draw:text-style-name="P47" draw:layer="layout" svg:width="0.072cm" svg:height="0.063cm" svg:x="9.329cm" svg:y="10.939cm" svg:viewBox="0 0 73 64" draw:points="73,55 0,64 36,0">
          <text:p/>
        </draw:polygon>
        <draw:path draw:style-name="gr56" draw:text-style-name="P47" draw:layer="layout" svg:width="0.074cm" svg:height="0.066cm" svg:x="9.327cm" svg:y="10.939cm" svg:viewBox="0 0 75 67" svg:d="M75 55l-6 4-6 1-7 1-6 1h-6l-7 1-7 1-7 1-6 1h-7l-6 1-4-6 2-3 3-6 4-5 5 3-3 6-3 4h2l6-1 6-1h7l7-1 7-1 6-1 7-1h6l6-1h2l-2-3-4-6-3-5-4-5-4-6-3-5-4-6-3-6-3-5-2 3-3 7-3-1 3 1-5 6-3 5-3-1 3 1-3 6-3 6-4 5-5-3 3-6 3-5 4-6 3-5h1-1l3-7 3-6 1-2 7-4zM9 47l3-6 5 3-3 6z">
          <text:p/>
        </draw:path>
        <draw:path draw:style-name="gr55" draw:text-style-name="P26" draw:layer="layout" svg:width="1.808cm" svg:height="2.156cm" svg:x="8.722cm" svg:y="8.846cm" svg:viewBox="0 0 1809 2157" svg:d="M190 2157l-32-45c-31-45-94-135-126-225s-32-180-32-290 0-240 0-371c0-130 0-261 0-372 0-110 0-200 0-290s0-180 302-274c301-94 903-192 1206-241l301-49">
          <text:p/>
        </draw:path>
        <draw:polygon draw:style-name="gr56" draw:text-style-name="P47" draw:layer="layout" svg:width="0.069cm" svg:height="0.064cm" svg:x="10.493cm" svg:y="8.819cm" svg:viewBox="0 0 70 65" draw:points="0,0 70,21 10,65">
          <text:p/>
        </draw:polygon>
        <draw:path draw:style-name="gr56" draw:text-style-name="P47" draw:layer="layout" svg:width="0.069cm" svg:height="0.065cm" svg:x="10.493cm" svg:y="8.818cm" svg:viewBox="0 0 70 66" svg:d="M0 1l7-1 6 2 6 2 6 1 8 2 6 2 6 2 6 2 6 2 7 2 5 2 1 7-3 2-5 4-5 4-4-5 5-4 5-3-1-1-7-2-6-2-6-2-6-1-6-2-8-2-6-2-6-2-6-2h-1v3l1 6 1 7 1 6 1 7 1 6 1 6 2 7v6l3-2 6-5v3-3l5-3 6-4 2 2-2-2 5-4 6-4 5-4 4 6-6 3-5 4-5 4-5 5-2-3 2 3-7 4-5 3-2 2-7 1zM57 36l-5 4-4-6 5-3z">
          <text:p/>
        </draw:path>
        <draw:path draw:style-name="gr55" draw:text-style-name="P26" draw:layer="layout" svg:width="1.375cm" svg:height="4.515cm" svg:x="11.691cm" svg:y="8.92cm" svg:viewBox="0 0 1376 4516" svg:d="M0 0l121 37c120 36 361 110 482 191 120 82 120 172 120 262s0 180 0 290 0 241 0 371c0 131 0 261 0 371s0 200 0 322c0 121 0 274 0 416s0 273 0 383 0 200 0 321c0 122 0 275 0 416 0 142 0 272 0 383 0 110 0 200 0 290s0 180 109 257 326 142 435 174l109 32">
          <text:p/>
        </draw:path>
        <draw:polygon draw:style-name="gr56" draw:text-style-name="P47" draw:layer="layout" svg:width="0.072cm" svg:height="0.062cm" svg:x="13.026cm" svg:y="13.395cm" svg:viewBox="0 0 73 63" draw:points="20,0 73,50 0,63">
          <text:p/>
        </draw:polygon>
        <draw:path draw:style-name="gr56" draw:text-style-name="P47" draw:layer="layout" svg:width="0.073cm" svg:height="0.064cm" svg:x="13.026cm" svg:y="13.395cm" svg:viewBox="0 0 74 65" svg:d="M19 0l6 2 5 4 5 5 5 5 5 5 5 4 5 4 5 5 4 4 5 5 5 4-3 7-3 1-7 1-6 1-1-7 6-1 6-1h-1l-5-5-5-4-5-5-4-4-6-5-5-4-4-5-5-5-5-4-1-1-1 3-2 7-2 7-1 6-2 6-2 6-2 7-2 6-1 5 3-1 7-1v2-2l6-1 6-1 1 3-1-3 7-1 6-1 8-1 1 6-8 1-6 1-7 1-6 1v-1 1l-6 2-7 1h-2l-7-2zM55 57l-6 1-1-6 6-2z">
          <text:p/>
        </draw:path>
        <draw:path draw:style-name="gr55" draw:text-style-name="P26" draw:layer="layout" svg:width="7.339cm" svg:height="4.558cm" svg:x="11.691cm" svg:y="8.901cm" svg:viewBox="0 0 7340 4559" svg:d="M0 0l148 40c147 40 443 119 1380 204s2516 175 3306 265c789 90 789 180 789 290s0 241 0 371c0 131 0 261 0 371s0 200 0 322c0 121 0 274 0 416 0 141 0 273 0 383s0 200 0 321c0 122 0 275 0 416 0 142 0 272 150 383 150 110 450 200 600 290s150 180 287 261c136 81 408 154 544 190l136 36">
          <text:p/>
        </draw:path>
        <draw:polygon draw:style-name="gr56" draw:text-style-name="P47" draw:layer="layout" svg:width="0.071cm" svg:height="0.062cm" svg:x="18.99cm" svg:y="13.42cm" svg:viewBox="0 0 72 63" draw:points="18,0 72,49 0,63">
          <text:p/>
        </draw:polygon>
        <draw:path draw:style-name="gr56" draw:text-style-name="P47" draw:layer="layout" svg:width="0.072cm" svg:height="0.064cm" svg:x="18.99cm" svg:y="13.42cm" svg:viewBox="0 0 73 65" svg:d="M17 0l7 2 5 4 4 4 5 5 5 4 5 4 5 4 6 5 5 4 4 4 5 4-2 7-4 2-6 1-6 2-3-8 8-1 5-1-1-1-5-4-6-4-4-5-5-4-5-4-5-5-5-4-5-4-5-5h-1v3l-2 6-2 7-1 6-2 6-2 6-1 7-2 7-2 5h4l6-2 1 2-1-2 7-1 6-1 1 3-1-3 6-2 7-2 6-1 1 7-6 1-6 2-7 1-6 1v-1 1l-6 2-7 1h-2l-7-2zM55 56l-8 1-1-7 6-2z">
          <text:p/>
        </draw:path>
        <draw:path draw:style-name="gr56" draw:text-style-name="P47" draw:layer="layout" svg:width="0.008cm" svg:height="0.503cm" svg:x="19.675cm" svg:y="13.822cm" svg:viewBox="0 0 9 504" svg:d="M9 0v17h-9v-17zM9 33v13 3h-9v-3-13zM9 64v17h-9v-17zM9 97v16h-9v-16zM9 130v16h-9v-16zM9 162v16h-9v-16zM9 194v16h-9v-16zM9 227v10 7h-9v-7-10zM9 260v5 12h-9v-12-5zM9 293v16h-9v-16zM9 325v17h-9v-17zM9 359v15h-9v-15zM9 391v17h-9v-17zM9 423v17h-9v-17zM9 457v11 3h-9v-3-11zM9 488v16h-9v-16z">
          <text:p/>
        </draw:path>
        <draw:polygon draw:style-name="gr56" draw:text-style-name="P47" draw:layer="layout" svg:width="0.065cm" svg:height="0.065cm" svg:x="19.647cm" svg:y="14.296cm" svg:viewBox="0 0 66 66" draw:points="66,0 32,66 0,0">
          <text:p/>
        </draw:polygon>
        <draw:path draw:style-name="gr56" draw:text-style-name="P47" draw:layer="layout" svg:width="0.065cm" svg:height="0.065cm" svg:x="19.647cm" svg:y="14.296cm" svg:viewBox="0 0 66 66" svg:d="M63 14l-3 6-3 6-3 6-3 6-3 5-3 6-2 6-3 6-3 5h-8l-2-3-3-6-3-6 6-3 3 6 2 5 2-1 3-6 3-6 3-5 2-6 3-6 3-6 3-6 3-5 3-7 1-1h-4-7-6-6-8-6-7-6-6l2 3 3 7h-2 2l3 5 2 6-2 2 2-2 3 6 3 6 3 6-6 3-3-6-2-6-3-6-3-6h1-1l-3-5-3-6-1-2v-9h66v9zM21 51l-3-5 6-3 3 5z">
          <text:p/>
        </draw:path>
        <draw:polygon draw:style-name="gr57" draw:text-style-name="P48" draw:layer="layout" svg:width="1.071cm" svg:height="0.113cm" svg:x="15.125cm" svg:y="5.27cm" svg:viewBox="0 0 1072 114" draw:points="0,0 1072,0 1072,114 0,114">
          <text:p/>
        </draw:polygon>
        <draw:polygon draw:style-name="gr58" draw:text-style-name="P49" draw:layer="layout" svg:width="1.071cm" svg:height="0.113cm" svg:x="15.125cm" svg:y="5.27cm" svg:viewBox="0 0 1072 114" draw:points="0,0 1072,0 1072,114 0,114">
          <text:p/>
        </draw:polygon>
        <draw:frame draw:style-name="gr54" draw:text-style-name="P46" draw:layer="layout" svg:width="0.407cm" svg:height="0.098cm" svg:x="15.393cm" svg:y="2.56cm">
          <draw:text-box>
            <text:p text:style-name="P3"><text:span text:style-name="T55">UI Module</text:span></text:p>
          </draw:text-box>
        </draw:frame>
        <draw:polygon draw:style-name="gr57" draw:text-style-name="P48" draw:layer="layout" svg:width="0.86cm" svg:height="0.114cm" svg:x="11.68cm" svg:y="6.389cm" svg:viewBox="0 0 861 115" draw:points="0,0 861,0 861,115 0,115">
          <text:p/>
        </draw:polygon>
        <draw:polygon draw:style-name="gr58" draw:text-style-name="P49" draw:layer="layout" svg:width="0.86cm" svg:height="0.114cm" svg:x="11.68cm" svg:y="6.389cm" svg:viewBox="0 0 861 115" draw:points="0,0 861,0 861,115 0,115">
          <text:p/>
        </draw:polygon>
        <draw:frame draw:style-name="gr54" draw:text-style-name="P46" draw:layer="layout" svg:width="0.788cm" svg:height="0.098cm" svg:x="15.126cm" svg:y="5.279cm">
          <draw:text-box>
            <text:p text:style-name="P3"><text:span text:style-name="T56">1. Spec Interactions</text:span></text:p>
          </draw:text-box>
        </draw:frame>
        <draw:polygon draw:style-name="gr57" draw:text-style-name="P48" draw:layer="layout" svg:width="0.641cm" svg:height="0.114cm" svg:x="12.837cm" svg:y="7.306cm" svg:viewBox="0 0 642 115" draw:points="0,0 642,0 642,115 0,115">
          <text:p/>
        </draw:polygon>
        <draw:polygon draw:style-name="gr58" draw:text-style-name="P49" draw:layer="layout" svg:width="0.641cm" svg:height="0.114cm" svg:x="12.837cm" svg:y="7.306cm" svg:viewBox="0 0 642 115" draw:points="0,0 642,0 642,115 0,115">
          <text:p/>
        </draw:polygon>
        <draw:frame draw:style-name="gr54" draw:text-style-name="P46" draw:layer="layout" svg:width="0.699cm" svg:height="0.098cm" svg:x="11.68cm" svg:y="6.398cm">
          <draw:text-box>
            <text:p text:style-name="P3"><text:span text:style-name="T56">2. Generate Spec</text:span></text:p>
          </draw:text-box>
        </draw:frame>
        <draw:polygon draw:style-name="gr57" draw:text-style-name="P48" draw:layer="layout" svg:width="1.014cm" svg:height="0.114cm" svg:x="10.618cm" svg:y="7.306cm" svg:viewBox="0 0 1015 115" draw:points="0,0 1015,0 1015,115 0,115">
          <text:p/>
        </draw:polygon>
        <draw:polygon draw:style-name="gr58" draw:text-style-name="P49" draw:layer="layout" svg:width="1.014cm" svg:height="0.114cm" svg:x="10.618cm" svg:y="7.306cm" svg:viewBox="0 0 1015 115" draw:points="0,0 1015,0 1015,115 0,115">
          <text:p/>
        </draw:polygon>
        <draw:frame draw:style-name="gr54" draw:text-style-name="P46" draw:layer="layout" svg:width="0.541cm" svg:height="0.098cm" svg:x="12.838cm" svg:y="7.315cm">
          <draw:text-box>
            <text:p text:style-name="P3"><text:span text:style-name="T56">Batch Update</text:span></text:p>
          </draw:text-box>
        </draw:frame>
        <draw:polygon draw:style-name="gr57" draw:text-style-name="P48" draw:layer="layout" svg:width="1.396cm" svg:height="0.114cm" svg:x="10.43cm" svg:y="8.223cm" svg:viewBox="0 0 1397 115" draw:points="0,0 1397,0 1397,115 0,115">
          <text:p/>
        </draw:polygon>
        <draw:polygon draw:style-name="gr58" draw:text-style-name="P49" draw:layer="layout" svg:width="1.396cm" svg:height="0.114cm" svg:x="10.43cm" svg:y="8.223cm" svg:viewBox="0 0 1397 115" draw:points="0,0 1397,0 1397,115 0,115">
          <text:p/>
        </draw:polygon>
        <draw:frame draw:style-name="gr54" draw:text-style-name="P46" draw:layer="layout" svg:width="0.768cm" svg:height="0.098cm" svg:x="10.618cm" svg:y="7.315cm">
          <draw:text-box>
            <text:p text:style-name="P3"><text:span text:style-name="T56">3. Pass to Planning</text:span></text:p>
          </draw:text-box>
        </draw:frame>
        <draw:polygon draw:style-name="gr57" draw:text-style-name="P48" draw:layer="layout" svg:width="1.071cm" svg:height="0.113cm" svg:x="19.291cm" svg:y="9.343cm" svg:viewBox="0 0 1072 114" draw:points="0,0 1072,0 1072,114 0,114">
          <text:p/>
        </draw:polygon>
        <draw:polygon draw:style-name="gr58" draw:text-style-name="P49" draw:layer="layout" svg:width="1.071cm" svg:height="0.113cm" svg:x="19.291cm" svg:y="9.343cm" svg:viewBox="0 0 1072 114" draw:points="0,0 1072,0 1072,114 0,114">
          <text:p/>
        </draw:polygon>
        <draw:frame draw:style-name="gr54" draw:text-style-name="P46" draw:layer="layout" svg:width="1.069cm" svg:height="0.098cm" svg:x="10.431cm" svg:y="8.232cm">
          <draw:text-box>
            <text:p text:style-name="P3"><text:span text:style-name="T56">4. Provide Executable Plan</text:span></text:p>
          </draw:text-box>
        </draw:frame>
        <draw:polygon draw:style-name="gr57" draw:text-style-name="P48" draw:layer="layout" svg:width="0.86cm" svg:height="0.114cm" svg:x="19.398cm" svg:y="10.665cm" svg:viewBox="0 0 861 115" draw:points="0,0 861,0 861,115 0,115">
          <text:p/>
        </draw:polygon>
        <draw:polygon draw:style-name="gr58" draw:text-style-name="P49" draw:layer="layout" svg:width="0.86cm" svg:height="0.114cm" svg:x="19.398cm" svg:y="10.665cm" svg:viewBox="0 0 861 115" draw:points="0,0 861,0 861,115 0,115">
          <text:p/>
        </draw:polygon>
        <draw:frame draw:style-name="gr54" draw:text-style-name="P46" draw:layer="layout" svg:width="0.837cm" svg:height="0.098cm" svg:x="19.292cm" svg:y="9.352cm">
          <draw:text-box>
            <text:p text:style-name="P3"><text:span text:style-name="T56">5. Request Hydration</text:span></text:p>
          </draw:text-box>
        </draw:frame>
        <draw:polygon draw:style-name="gr57" draw:text-style-name="P48" draw:layer="layout" svg:width="0.909cm" svg:height="0.114cm" svg:x="19.371cm" svg:y="11.785cm" svg:viewBox="0 0 910 115" draw:points="0,0 910,0 910,115 0,115">
          <text:p/>
        </draw:polygon>
        <draw:polygon draw:style-name="gr58" draw:text-style-name="P49" draw:layer="layout" svg:width="0.909cm" svg:height="0.114cm" svg:x="19.371cm" svg:y="11.785cm" svg:viewBox="0 0 910 115" draw:points="0,0 910,0 910,115 0,115">
          <text:p/>
        </draw:polygon>
        <draw:frame draw:style-name="gr54" draw:text-style-name="P46" draw:layer="layout" svg:width="0.605cm" svg:height="0.098cm" svg:x="19.399cm" svg:y="10.674cm">
          <draw:text-box>
            <text:p text:style-name="P3"><text:span text:style-name="T56">6. Collect Parts</text:span></text:p>
          </draw:text-box>
        </draw:frame>
        <draw:polygon draw:style-name="gr57" draw:text-style-name="P48" draw:layer="layout" svg:width="1.071cm" svg:height="0.113cm" svg:x="16.838cm" svg:y="12.905cm" svg:viewBox="0 0 1072 114" draw:points="0,0 1072,0 1072,114 0,114">
          <text:p/>
        </draw:polygon>
        <draw:polygon draw:style-name="gr58" draw:text-style-name="P49" draw:layer="layout" svg:width="1.071cm" svg:height="0.113cm" svg:x="16.838cm" svg:y="12.905cm" svg:viewBox="0 0 1072 114" draw:points="0,0 1072,0 1072,114 0,114">
          <text:p/>
        </draw:polygon>
        <draw:frame draw:style-name="gr54" draw:text-style-name="P46" draw:layer="layout" svg:width="0.634cm" svg:height="0.098cm" svg:x="19.372cm" svg:y="11.794cm">
          <draw:text-box>
            <text:p text:style-name="P3"><text:span text:style-name="T56">7. Trim to Limits</text:span></text:p>
          </draw:text-box>
        </draw:frame>
        <draw:polygon draw:style-name="gr57" draw:text-style-name="P48" draw:layer="layout" svg:width="0.965cm" svg:height="0.113cm" svg:x="19.345cm" svg:y="12.905cm" svg:viewBox="0 0 966 114" draw:points="0,0 966,0 966,114 0,114">
          <text:p/>
        </draw:polygon>
        <draw:polygon draw:style-name="gr58" draw:text-style-name="P49" draw:layer="layout" svg:width="0.965cm" svg:height="0.113cm" svg:x="19.345cm" svg:y="12.905cm" svg:viewBox="0 0 966 114" draw:points="0,0 966,0 966,114 0,114">
          <text:p/>
        </draw:polygon>
        <draw:frame draw:style-name="gr54" draw:text-style-name="P46" draw:layer="layout" svg:width="0.867cm" svg:height="0.098cm" svg:x="16.839cm" svg:y="12.914cm">
          <draw:text-box>
            <text:p text:style-name="P3"><text:span text:style-name="T56">Query Repo Structure</text:span></text:p>
          </draw:text-box>
        </draw:frame>
        <draw:polygon draw:style-name="gr57" draw:text-style-name="P48" draw:layer="layout" svg:width="0.908cm" svg:height="0.114cm" svg:x="18.326cm" svg:y="10.665cm" svg:viewBox="0 0 909 115" draw:points="0,0 909,0 909,115 0,115">
          <text:p/>
        </draw:polygon>
        <draw:polygon draw:style-name="gr58" draw:text-style-name="P49" draw:layer="layout" svg:width="0.908cm" svg:height="0.114cm" svg:x="18.326cm" svg:y="10.665cm" svg:viewBox="0 0 909 115" draw:points="0,0 909,0 909,115 0,115">
          <text:p/>
        </draw:polygon>
        <draw:frame draw:style-name="gr54" draw:text-style-name="P46" draw:layer="layout" svg:width="0.743cm" svg:height="0.098cm" svg:x="19.345cm" svg:y="12.914cm">
          <draw:text-box>
            <text:p text:style-name="P3"><text:span text:style-name="T56">Query Fact History</text:span></text:p>
          </draw:text-box>
        </draw:frame>
        <draw:polygon draw:style-name="gr57" draw:text-style-name="P48" draw:layer="layout" svg:width="0.641cm" svg:height="0.113cm" svg:x="6.947cm" svg:y="9.343cm" svg:viewBox="0 0 642 114" draw:points="0,0 642,0 642,114 0,114">
          <text:p/>
        </draw:polygon>
        <draw:polygon draw:style-name="gr58" draw:text-style-name="P49" draw:layer="layout" svg:width="0.641cm" svg:height="0.113cm" svg:x="6.947cm" svg:y="9.343cm" svg:viewBox="0 0 642 114" draw:points="0,0 642,0 642,114 0,114">
          <text:p/>
        </draw:polygon>
        <draw:frame draw:style-name="gr54" draw:text-style-name="P46" draw:layer="layout" svg:width="0.699cm" svg:height="0.098cm" svg:x="18.326cm" svg:y="10.674cm">
          <draw:text-box>
            <text:p text:style-name="P3"><text:span text:style-name="T56">8. Return Context</text:span></text:p>
          </draw:text-box>
        </draw:frame>
        <draw:polygon draw:style-name="gr57" draw:text-style-name="P48" draw:layer="layout" svg:width="1.014cm" svg:height="0.113cm" svg:x="5.767cm" svg:y="9.343cm" svg:viewBox="0 0 1015 114" draw:points="0,0 1015,0 1015,114 0,114">
          <text:p/>
        </draw:polygon>
        <draw:polygon draw:style-name="gr58" draw:text-style-name="P49" draw:layer="layout" svg:width="1.014cm" svg:height="0.113cm" svg:x="5.767cm" svg:y="9.343cm" svg:viewBox="0 0 1015 114" draw:points="0,0 1015,0 1015,114 0,114">
          <text:p/>
        </draw:polygon>
        <draw:frame draw:style-name="gr54" draw:text-style-name="P46" draw:layer="layout" svg:width="0.472cm" svg:height="0.098cm" svg:x="6.947cm" svg:y="9.352cm">
          <draw:text-box>
            <text:p text:style-name="P3"><text:span text:style-name="T56">9. Inference</text:span></text:p>
          </draw:text-box>
        </draw:frame>
        <draw:polygon draw:style-name="gr57" draw:text-style-name="P48" draw:layer="layout" svg:width="0.966cm" svg:height="0.113cm" svg:x="9.871cm" svg:y="9.343cm" svg:viewBox="0 0 967 114" draw:points="0,0 967,0 967,114 0,114">
          <text:p/>
        </draw:polygon>
        <draw:polygon draw:style-name="gr58" draw:text-style-name="P49" draw:layer="layout" svg:width="0.966cm" svg:height="0.113cm" svg:x="9.871cm" svg:y="9.343cm" svg:viewBox="0 0 967 114" draw:points="0,0 967,0 967,114 0,114">
          <text:p/>
        </draw:polygon>
        <draw:frame draw:style-name="gr54" draw:text-style-name="P46" draw:layer="layout" svg:width="0.763cm" svg:height="0.098cm" svg:x="5.767cm" svg:y="9.352cm">
          <draw:text-box>
            <text:p text:style-name="P3"><text:span text:style-name="T56">10. Action Decision</text:span></text:p>
          </draw:text-box>
        </draw:frame>
        <draw:polygon draw:style-name="gr57" draw:text-style-name="P48" draw:layer="layout" svg:width="1.176cm" svg:height="0.114cm" svg:x="10.381cm" svg:y="10.665cm" svg:viewBox="0 0 1177 115" draw:points="0,0 1177,0 1177,115 0,115">
          <text:p/>
        </draw:polygon>
        <draw:polygon draw:style-name="gr58" draw:text-style-name="P49" draw:layer="layout" svg:width="1.176cm" svg:height="0.114cm" svg:x="10.381cm" svg:y="10.665cm" svg:viewBox="0 0 1177 115" draw:points="0,0 1177,0 1177,115 0,115">
          <text:p/>
        </draw:polygon>
        <draw:frame draw:style-name="gr54" draw:text-style-name="P46" draw:layer="layout" svg:width="0.753cm" svg:height="0.098cm" svg:x="9.872cm" svg:y="9.352cm">
          <draw:text-box>
            <text:p text:style-name="P3"><text:span text:style-name="T56">11. Propose Action</text:span></text:p>
          </draw:text-box>
        </draw:frame>
        <draw:polygon draw:style-name="gr57" draw:text-style-name="P48" draw:layer="layout" svg:width="0.965cm" svg:height="0.114cm" svg:x="9.255cm" svg:y="10.665cm" svg:viewBox="0 0 966 115" draw:points="0,0 966,0 966,115 0,115">
          <text:p/>
        </draw:polygon>
        <draw:polygon draw:style-name="gr58" draw:text-style-name="P49" draw:layer="layout" svg:width="0.965cm" svg:height="0.114cm" svg:x="9.255cm" svg:y="10.665cm" svg:viewBox="0 0 966 115" draw:points="0,0 966,0 966,115 0,115">
          <text:p/>
        </draw:polygon>
        <draw:frame draw:style-name="gr54" draw:text-style-name="P46" draw:layer="layout" svg:width="0.901cm" svg:height="0.098cm" svg:x="10.381cm" svg:y="10.674cm">
          <draw:text-box>
            <text:p text:style-name="P3"><text:span text:style-name="T56">12. Human Verification</text:span></text:p>
          </draw:text-box>
        </draw:frame>
        <draw:polygon draw:style-name="gr57" draw:text-style-name="P48" draw:layer="layout" svg:width="0.86cm" svg:height="0.114cm" svg:x="8.294cm" svg:y="10.004cm" svg:viewBox="0 0 861 115" draw:points="0,0 861,0 861,115 0,115">
          <text:p/>
        </draw:polygon>
        <draw:polygon draw:style-name="gr58" draw:text-style-name="P49" draw:layer="layout" svg:width="0.86cm" svg:height="0.114cm" svg:x="8.294cm" svg:y="10.004cm" svg:viewBox="0 0 861 115" draw:points="0,0 861,0 861,115 0,115">
          <text:p/>
        </draw:polygon>
        <draw:frame draw:style-name="gr54" draw:text-style-name="P46" draw:layer="layout" svg:width="0.728cm" svg:height="0.098cm" svg:x="9.255cm" svg:y="10.674cm">
          <draw:text-box>
            <text:p text:style-name="P3"><text:span text:style-name="T56">13. Route to Tools</text:span></text:p>
          </draw:text-box>
        </draw:frame>
        <draw:polygon draw:style-name="gr57" draw:text-style-name="P48" draw:layer="layout" svg:width="0.86cm" svg:height="0.113cm" svg:x="11.986cm" svg:y="11.124cm" svg:viewBox="0 0 861 114" draw:points="0,0 861,0 861,114 0,114">
          <text:p/>
        </draw:polygon>
        <draw:polygon draw:style-name="gr58" draw:text-style-name="P49" draw:layer="layout" svg:width="0.86cm" svg:height="0.113cm" svg:x="11.986cm" svg:y="11.124cm" svg:viewBox="0 0 861 114" draw:points="0,0 861,0 861,114 0,114">
          <text:p/>
        </draw:polygon>
        <draw:frame draw:style-name="gr54" draw:text-style-name="P46" draw:layer="layout" svg:width="0.625cm" svg:height="0.098cm" svg:x="8.294cm" svg:y="10.013cm">
          <draw:text-box>
            <text:p text:style-name="P3"><text:span text:style-name="T56">14. Yield Result</text:span></text:p>
          </draw:text-box>
        </draw:frame>
        <draw:polygon draw:style-name="gr57" draw:text-style-name="P48" draw:layer="layout" svg:width="0.86cm" svg:height="0.113cm" svg:x="16.886cm" svg:y="11.124cm" svg:viewBox="0 0 861 114" draw:points="0,0 861,0 861,114 0,114">
          <text:p/>
        </draw:polygon>
        <draw:polygon draw:style-name="gr58" draw:text-style-name="P49" draw:layer="layout" svg:width="0.86cm" svg:height="0.113cm" svg:x="16.886cm" svg:y="11.124cm" svg:viewBox="0 0 861 114" draw:points="0,0 861,0 861,114 0,114">
          <text:p/>
        </draw:polygon>
        <draw:frame draw:style-name="gr54" draw:text-style-name="P46" draw:layer="layout" svg:width="0.679cm" svg:height="0.098cm" svg:x="11.986cm" svg:y="11.133cm">
          <draw:text-box>
            <text:p text:style-name="P3"><text:span text:style-name="T56">15. Update Facts</text:span></text:p>
          </draw:text-box>
        </draw:frame>
        <draw:polygon draw:style-name="gr57" draw:text-style-name="P48" draw:layer="layout" svg:width="1.071cm" svg:height="0.113cm" svg:x="19.144cm" svg:y="14.025cm" svg:viewBox="0 0 1072 114" draw:points="0,0 1072,0 1072,114 0,114">
          <text:p/>
        </draw:polygon>
        <draw:polygon draw:style-name="gr58" draw:text-style-name="P49" draw:layer="layout" svg:width="1.071cm" svg:height="0.113cm" svg:x="19.144cm" svg:y="14.025cm" svg:viewBox="0 0 1072 114" draw:points="0,0 1072,0 1072,114 0,114">
          <text:p/>
        </draw:polygon>
        <draw:frame draw:style-name="gr54" draw:text-style-name="P46" draw:layer="layout" svg:width="0.679cm" svg:height="0.098cm" svg:x="16.887cm" svg:y="11.133cm">
          <draw:text-box>
            <text:p text:style-name="P3"><text:span text:style-name="T56">15. Update Facts</text:span></text:p>
          </draw:text-box>
        </draw:frame>
        <draw:polygon draw:style-name="gr52" draw:text-style-name="P45" draw:layer="layout" svg:width="3.5cm" svg:height="0.985cm" svg:x="10.76cm" svg:y="3.418cm" svg:viewBox="0 0 3501 986" draw:points="0,0 3501,0 3501,986 0,986">
          <text:p/>
        </draw:polygon>
        <draw:polygon draw:style-name="gr53" draw:text-style-name="P26" draw:layer="layout" svg:width="3.5cm" svg:height="0.985cm" svg:x="10.76cm" svg:y="3.418cm" svg:viewBox="0 0 3501 986" draw:points="0,0 3501,0 3501,986 0,986">
          <text:p/>
        </draw:polygon>
        <draw:frame draw:style-name="gr54" draw:text-style-name="P46" draw:layer="layout" svg:width="0.832cm" svg:height="0.098cm" svg:x="19.144cm" svg:y="14.034cm">
          <draw:text-box>
            <text:p text:style-name="P3"><text:span text:style-name="T56">Offload Cold Storage</text:span></text:p>
          </draw:text-box>
        </draw:frame>
        <draw:path draw:style-name="gr59" draw:text-style-name="P50" draw:layer="layout" svg:width="1.129cm" svg:height="0.377cm" svg:x="11.044cm" svg:y="3.722cm" svg:viewBox="0 0 1130 378" svg:d="M40 0h1050c5 0 10 1 15 3s10 5 13 9c4 4 7 8 9 13s3 10 3 15v298c0 5-1 10-3 15s-5 10-9 13c-3 4-8 7-13 9s-10 3-15 3h-1050c-5 0-10-1-15-3s-9-5-13-9c-4-3-7-8-9-13s-3-10-3-15v-298c0-5 1-10 3-15s5-9 9-13 8-7 13-9 10-3 15-3z">
          <text:p/>
        </draw:path>
        <draw:path draw:style-name="gr60" draw:text-style-name="P26" draw:layer="layout" svg:width="1.129cm" svg:height="0.377cm" svg:x="11.044cm" svg:y="3.722cm" svg:viewBox="0 0 1130 378" svg:d="M40 0h1050c5 0 10 1 15 3s10 5 13 9c4 4 7 8 9 13s3 10 3 15v298c0 5-1 10-3 15s-5 10-9 13c-3 4-8 7-13 9s-10 3-15 3h-1050c-5 0-10-1-15-3s-9-5-13-9c-4-3-7-8-9-13s-3-10-3-15v-298c0-5 1-10 3-15s5-9 9-13 8-7 13-9 10-3 15-3z">
          <text:p/>
        </draw:path>
        <draw:frame draw:style-name="gr54" draw:text-style-name="P46" draw:layer="layout" svg:width="0.635cm" svg:height="0.098cm" svg:x="12.136cm" svg:y="3.427cm">
          <draw:text-box>
            <text:p text:style-name="P3"><text:span text:style-name="T55">Logging Module</text:span></text:p>
          </draw:text-box>
        </draw:frame>
        <draw:path draw:style-name="gr59" draw:text-style-name="P50" draw:layer="layout" svg:width="1.397cm" svg:height="0.377cm" svg:x="12.579cm" svg:y="3.722cm" svg:viewBox="0 0 1398 378" svg:d="M41 0h1317c5 0 10 1 15 3s10 5 13 9c4 4 7 8 9 13s3 10 3 15v298c0 5-1 10-3 15s-5 10-9 13c-3 4-8 7-13 9s-10 3-15 3h-1317c-6 0-11-1-16-3s-9-5-13-9c-4-3-7-8-9-13s-3-10-3-15v-298c0-5 1-10 3-15s5-9 9-13 8-7 13-9 10-3 16-3z">
          <text:p/>
        </draw:path>
        <draw:path draw:style-name="gr60" draw:text-style-name="P26" draw:layer="layout" svg:width="1.397cm" svg:height="0.377cm" svg:x="12.579cm" svg:y="3.722cm" svg:viewBox="0 0 1398 378" svg:d="M41 0h1317c5 0 10 1 15 3s10 5 13 9c4 4 7 8 9 13s3 10 3 15v298c0 5-1 10-3 15s-5 10-9 13c-3 4-8 7-13 9s-10 3-15 3h-1317c-6 0-11-1-16-3s-9-5-13-9c-4-3-7-8-9-13s-3-10-3-15v-298c0-5 1-10 3-15s5-9 9-13 8-7 13-9 10-3 16-3z">
          <text:p/>
        </draw:path>
        <draw:frame draw:style-name="gr54" draw:text-style-name="P46" draw:layer="layout" svg:width="0.506cm" svg:height="0.098cm" svg:x="11.288cm" svg:y="3.853cm">
          <draw:text-box>
            <text:p text:style-name="P3"><text:span text:style-name="T57">Audit Logger</text:span></text:p>
          </draw:text-box>
        </draw:frame>
        <draw:polygon draw:style-name="gr52" draw:text-style-name="P45" draw:layer="layout" svg:width="2.353cm" svg:height="2.313cm" svg:x="17.008cm" svg:y="2.754cm" svg:viewBox="0 0 2354 2314" draw:points="0,0 2354,0 2354,2314 0,2314">
          <text:p/>
        </draw:polygon>
        <draw:polygon draw:style-name="gr53" draw:text-style-name="P26" draw:layer="layout" svg:width="2.353cm" svg:height="2.313cm" svg:x="17.008cm" svg:y="2.754cm" svg:viewBox="0 0 2354 2314" draw:points="0,0 2354,0 2354,2314 0,2314">
          <text:p/>
        </draw:polygon>
        <draw:frame draw:style-name="gr54" draw:text-style-name="P46" draw:layer="layout" svg:width="0.753cm" svg:height="0.098cm" svg:x="12.823cm" svg:y="3.853cm">
          <draw:text-box>
            <text:p text:style-name="P3"><text:span text:style-name="T57">Argumentation Log</text:span></text:p>
          </draw:text-box>
        </draw:frame>
        <draw:path draw:style-name="gr61" draw:text-style-name="P51" draw:layer="layout" svg:width="1.744cm" svg:height="1.745cm" svg:x="17.312cm" svg:y="3.038cm" svg:viewBox="0 0 1745 1746" svg:d="M1745 873c0 28-1 57-4 85s-7 57-12 85c-6 28-13 55-21 83-8 27-18 54-29 80-11 27-23 53-37 78-13 25-28 50-44 74-15 24-32 47-51 69-18 22-37 43-57 63-20 21-41 40-63 58s-45 35-69 51-48 30-74 44c-25 13-51 25-77 36s-53 21-81 29c-27 9-55 15-83 21s-57 10-85 13c-29 2-57 4-86 4-28 0-57-2-85-4-29-3-57-7-85-13s-56-12-83-21c-27-8-54-18-81-29-26-11-52-23-77-36-25-14-50-28-73-44-24-16-47-33-69-51s-43-37-64-58c-20-20-39-41-57-63s-35-45-51-69-31-49-44-74-26-51-37-78c-11-26-20-53-28-80-9-28-16-55-21-83-6-28-10-57-13-85s-4-57-4-85c0-29 1-57 4-86 3-28 7-57 13-85 5-28 12-55 21-83 8-27 17-54 28-80 11-27 24-52 37-78 13-25 28-49 44-73s33-47 51-69 37-43 57-63c21-20 42-40 64-58s45-35 69-51c23-16 48-30 73-44 25-13 51-25 77-36 27-11 54-21 81-29s55-15 83-21c28-5 56-10 85-12 28-3 57-5 85-5 29 0 57 2 86 5 28 2 57 7 85 12 28 6 56 13 83 21 28 8 55 18 81 29s52 23 77 36c26 14 50 28 74 44s47 33 69 51 43 38 63 58 39 41 57 63c19 22 36 45 51 69 16 24 31 48 44 73 14 26 26 51 37 78 11 26 21 53 29 80 8 28 15 55 21 83 5 28 9 57 12 85 3 29 4 57 4 86z">
          <text:p/>
        </draw:path>
        <draw:path draw:style-name="gr62" draw:text-style-name="P52" draw:layer="layout" svg:width="1.761cm" svg:height="1.761cm" svg:x="17.304cm" svg:y="3.03cm" svg:viewBox="0 0 1762 1762" svg:d="M1758 961c-1 14-3 28-5 41l-16-2c2-13 4-27 5-40zM1746 1044c-2 13-5 26-8 39l-16-3c3-13 6-26 8-39zM1727 1123c-3 13-7 26-12 39l-15-5c4-13 8-25 12-38zM1701 1201c-5 13-10 25-15 38l-15-7c5-12 10-25 15-37zM1668 1276c-6 12-13 24-19 36l-14-8c6-12 12-24 18-36zM1628 1347c-7 12-15 23-23 35l-13-9c8-12 15-23 22-35zM1581 1415c-8 11-17 22-25 32l-13-10c9-10 17-21 25-31zM1529 1478c-10 10-19 20-29 30l-11-12c9-9 18-19 28-29zM1470 1536c-10 9-21 18-31 27l-10-13c10-8 20-17 30-26zM1406 1588c-10 8-22 16-33 24l-9-14c11-7 22-15 33-23zM1339 1634c-12 7-24 14-36 20l-8-14c12-6 24-13 35-20zM1267 1673c-13 6-25 12-38 17l-6-15c12-5 24-11 37-17zM1191 1705c-12 5-26 10-39 14l-5-15c12-5 25-9 39-14zM1113 1731c-14 3-27 7-40 10l-4-16c13-3 26-6 39-10zM1033 1749c-14 2-28 4-42 6l-2-16c14-2 27-4 41-6zM950 1759c-13 1-27 2-40 2l-1-16c13 0 27-1 40-2zM870 1762c-14 0-27-1-40-2l1-16c13 1 26 1 39 2zM789 1757c-14-1-28-3-41-5l2-16c14 2 27 4 41 5zM707 1745c-14-3-27-6-40-9l4-16c13 3 26 6 39 9zM627 1725c-13-4-26-8-39-13l6-15c12 4 25 8 38 12zM550 1698c-13-5-25-11-37-17l6-14c12 5 25 11 37 16zM476 1663c-13-6-24-12-36-19l8-14c11 6 23 13 35 19zM405 1622c-12-7-23-15-34-22l9-14c11 8 22 16 33 23zM338 1575c-11-8-21-17-32-26l11-12c10 9 20 17 31 25zM276 1522c-10-10-20-20-30-29l12-12c9 10 19 19 29 29zM219 1462c-9-10-18-21-27-31l13-10c8 10 17 20 26 31zM167 1398c-8-11-15-22-23-34l14-9c7 11 15 23 23 34zM122 1329c-6-12-13-24-20-36l15-8c6 12 13 24 19 35zM84 1256c-6-12-11-24-17-37l15-6c6 12 11 24 17 36zM53 1181c-5-13-9-26-13-39l15-5c4 13 8 26 13 38zM28 1102c-3-13-6-26-9-39l16-4c3 13 6 26 9 39zM11 1022c-2-14-4-28-5-41l16-2c1 13 3 27 5 40zM2 940c-1-14-2-27-2-40l16-1c1 13 1 27 2 40zM0 860c0-14 1-27 2-41l16 2c-1 13-1 26-2 39zM6 779c1-14 3-28 6-42l16 3c-3 13-4 27-6 40zM19 697c3-14 6-27 10-40l15 4c-3 13-6 26-9 39zM40 617c4-13 9-25 13-38l16 5c-5 13-9 26-13 38zM68 540c5-12 11-25 17-37l15 7c-6 12-12 24-17 37zM103 466c7-12 13-23 20-35l14 8c-6 12-13 23-19 35zM145 396c8-11 15-23 23-34l14 10c-8 11-16 22-23 33zM193 330c9-11 18-21 27-32l12 11c-9 10-18 21-26 31zM248 268c9-10 19-19 29-29l11 12c-10 9-19 19-29 29zM308 212c10-9 21-18 31-26l10 13c-10 8-21 16-31 25zM372 161c11-7 23-15 34-22l9 13c-11 8-22 15-33 23zM441 117c12-6 24-13 36-19l8 14c-12 6-24 13-36 19zM514 80c13-6 25-11 38-16l6 15c-13 5-25 10-37 16zM590 49c13-4 26-8 39-12l5 15c-13 4-26 8-38 13zM669 26c13-3 26-6 40-9l3 16c-13 3-26 6-39 9zM750 10c13-2 27-4 41-5l2 16c-14 1-27 3-41 5zM832 2c13-1 26-2 40-2v16c-13 1-26 1-40 2zM912 1c13 0 27 1 40 2l-1 16c-14-1-27-2-40-2zM993 7c14 2 28 4 41 7l-2 16c-14-3-27-5-41-6zM1075 22c13 3 26 6 39 10l-4 16c-13-4-26-7-39-10zM1153 44c14 4 27 8 40 13l-6 16c-13-5-26-10-39-14zM1231 73c13 5 25 11 37 17l-7 14c-12-5-24-11-36-16zM1305 109c12 6 24 13 35 20l-8 14c-12-7-23-14-35-20zM1375 151c11 8 22 16 33 24l-10 13c-10-8-21-16-32-23zM1440 200c11 9 21 18 31 27l-10 12c-10-9-21-17-31-26zM1501 256c10 9 20 19 29 29l-12 11c-9-10-19-19-28-29zM1557 316c9 11 17 21 25 32l-12 10c-9-11-17-21-26-31zM1606 381c8 12 16 23 23 35l-14 8c-7-11-14-22-22-33zM1650 451c6 12 13 24 19 36l-15 7c-6-12-12-23-18-35zM1686 524c6 13 11 25 16 38l-15 6c-5-13-10-25-16-37zM1716 601c4 13 8 26 12 39l-16 4c-3-13-7-25-11-38zM1738 680c3 13 6 26 9 39l-16 3c-3-13-5-26-8-39zM1753 761c2 13 4 27 5 41l-16 1c-1-13-3-27-5-40zM1761 842c0 13 1 26 1 39s-1 26-1 40l-17-1c1-13 1-26 1-39s0-25 0-38z">
          <text:p/>
        </draw:path>
        <draw:frame draw:style-name="gr54" draw:text-style-name="P46" draw:layer="layout" svg:width="0.941cm" svg:height="0.098cm" svg:x="17.596cm" svg:y="2.763cm">
          <draw:text-box>
            <text:p text:style-name="P3"><text:span text:style-name="T55">Shared Contracts Layer</text:span></text:p>
          </draw:text-box>
        </draw:frame>
        <draw:frame draw:style-name="gr54" draw:text-style-name="P46" draw:layer="layout" svg:width="1.104cm" svg:height="0.098cm" svg:x="17.435cm" svg:y="3.786cm">
          <draw:text-box>
            <text:p text:style-name="P3"><text:span text:style-name="T57">Data Models: Specification, </text:span></text:p>
          </draw:text-box>
        </draw:frame>
        <draw:path draw:style-name="gr63" draw:text-style-name="P53" draw:layer="layout" svg:width="1.612cm" svg:height="0.377cm" svg:x="14.828cm" svg:y="11.002cm" svg:viewBox="0 0 1613 378" svg:d="M41 0h1531c6 0 11 1 16 3s9 5 13 9 7 8 9 13 3 10 3 16v297c0 5-1 10-3 15s-5 10-9 14c-4 3-8 6-13 8s-10 3-16 3h-1531c-6 0-11-1-16-3s-9-5-13-8c-4-4-7-9-9-14s-3-10-3-15v-297c0-6 1-11 3-16s5-9 9-13 8-7 13-9 10-3 16-3z">
          <text:p/>
        </draw:path>
        <draw:path draw:style-name="gr64" draw:text-style-name="P26" draw:layer="layout" svg:width="1.612cm" svg:height="0.377cm" svg:x="14.828cm" svg:y="11.002cm" svg:viewBox="0 0 1613 378" svg:d="M41 0h1531c6 0 11 1 16 3s9 5 13 9 7 8 9 13 3 10 3 16v297c0 5-1 10-3 15s-5 10-9 14c-4 3-8 6-13 8s-10 3-16 3h-1531c-6 0-11-1-16-3s-9-5-13-8c-4-4-7-9-9-14s-3-10-3-15v-297c0-6 1-11 3-16s5-9 9-13 8-7 13-9 10-3 16-3z">
          <text:p/>
        </draw:path>
        <draw:frame draw:style-name="gr54" draw:text-style-name="P46" draw:layer="layout" svg:width="0.813cm" svg:height="0.098cm" svg:x="17.676cm" svg:y="3.899cm">
          <draw:text-box>
            <text:p text:style-name="P3"><text:span text:style-name="T57">Plan, ContextBundle</text:span></text:p>
          </draw:text-box>
        </draw:frame>
        <draw:path draw:style-name="gr63" draw:text-style-name="P53" draw:layer="layout" svg:width="1.558cm" svg:height="0.377cm" svg:x="14.882cm" svg:y="3.722cm" svg:viewBox="0 0 1559 378" svg:d="M40 0h1478c6 0 11 1 16 3s9 5 13 9 7 8 9 13 3 10 3 15v298c0 5-1 10-3 15s-5 10-9 13c-4 4-8 7-13 9s-10 3-16 3h-1478c-5 0-10-1-15-3s-9-5-13-9c-4-3-7-8-9-13s-3-10-3-15v-298c0-5 1-10 3-15s5-9 9-13 8-7 13-9 10-3 15-3z">
          <text:p/>
        </draw:path>
        <draw:path draw:style-name="gr64" draw:text-style-name="P26" draw:layer="layout" svg:width="1.558cm" svg:height="0.377cm" svg:x="14.882cm" svg:y="3.722cm" svg:viewBox="0 0 1559 378" svg:d="M40 0h1478c6 0 11 1 16 3s9 5 13 9 7 8 9 13 3 10 3 15v298c0 5-1 10-3 15s-5 10-9 13c-4 4-8 7-13 9s-10 3-16 3h-1478c-5 0-10-1-15-3s-9-5-13-9c-4-3-7-8-9-13s-3-10-3-15v-298c0-5 1-10 3-15s5-9 9-13 8-7 13-9 10-3 15-3z">
          <text:p/>
        </draw:path>
        <draw:frame draw:style-name="gr54" draw:text-style-name="P46" draw:layer="layout" svg:width="0.852cm" svg:height="0.098cm" svg:x="15.072cm" svg:y="11.133cm">
          <draw:text-box>
            <text:p text:style-name="P3"><text:span text:style-name="T57">Textual UI &amp; Displays</text:span></text:p>
          </draw:text-box>
        </draw:frame>
        <draw:path draw:style-name="gr65" draw:text-style-name="P54" draw:layer="layout" svg:width="1.451cm" svg:height="0.377cm" svg:x="11.383cm" svg:y="6.726cm" svg:viewBox="0 0 1452 378" svg:d="M41 0h1370c6 0 11 1 16 3s9 5 13 9 7 8 9 13 3 10 3 16v297c0 5-1 10-3 15s-5 10-9 14c-4 3-8 6-13 8s-10 3-16 3h-1370c-6 0-11-1-16-3s-9-5-13-8c-4-4-7-9-9-14s-3-10-3-15v-297c0-6 1-11 3-16s5-9 9-13 8-7 13-9 10-3 16-3z">
          <text:p/>
        </draw:path>
        <draw:path draw:style-name="gr66" draw:text-style-name="P26" draw:layer="layout" svg:width="1.451cm" svg:height="0.377cm" svg:x="11.383cm" svg:y="6.726cm" svg:viewBox="0 0 1452 378" svg:d="M41 0h1370c6 0 11 1 16 3s9 5 13 9 7 8 9 13 3 10 3 16v297c0 5-1 10-3 15s-5 10-9 14c-4 3-8 6-13 8s-10 3-16 3h-1370c-6 0-11-1-16-3s-9-5-13-8c-4-4-7-9-9-14s-3-10-3-15v-297c0-6 1-11 3-16s5-9 9-13 8-7 13-9 10-3 16-3z">
          <text:p/>
        </draw:path>
        <draw:frame draw:style-name="gr54" draw:text-style-name="P46" draw:layer="layout" svg:width="0.916cm" svg:height="0.098cm" svg:x="15.126cm" svg:y="3.853cm">
          <draw:text-box>
            <text:p text:style-name="P3"><text:span text:style-name="T57">Spec Wizard &amp; Canvas</text:span></text:p>
          </draw:text-box>
        </draw:frame>
        <draw:path draw:style-name="gr65" draw:text-style-name="P54" draw:layer="layout" svg:width="1.505cm" svg:height="0.378cm" svg:x="11.356cm" svg:y="5.809cm" svg:viewBox="0 0 1506 379" svg:d="M41 0h1424c5 0 11 1 16 3s9 5 13 9 6 8 9 13c2 5 3 11 3 17v296c0 5-1 11-3 15-3 5-5 10-9 14-4 3-8 6-13 8s-11 4-16 4h-1424c-6 0-11-2-16-4s-9-5-13-8c-4-4-7-9-9-14-2-4-3-10-3-15v-296c0-6 1-12 3-17s5-9 9-13 8-7 13-9 10-3 16-3z">
          <text:p/>
        </draw:path>
        <draw:path draw:style-name="gr66" draw:text-style-name="P26" draw:layer="layout" svg:width="1.505cm" svg:height="0.378cm" svg:x="11.356cm" svg:y="5.809cm" svg:viewBox="0 0 1506 379" svg:d="M41 0h1424c5 0 11 1 16 3s9 5 13 9 6 8 9 13c2 5 3 11 3 17v296c0 5-1 11-3 15-3 5-5 10-9 14-4 3-8 6-13 8s-11 4-16 4h-1424c-6 0-11-2-16-4s-9-5-13-8c-4-4-7-9-9-14-2-4-3-10-3-15v-296c0-6 1-12 3-17s5-9 9-13 8-7 13-9 10-3 16-3z">
          <text:p/>
        </draw:path>
        <draw:frame draw:style-name="gr54" draw:text-style-name="P46" draw:layer="layout" svg:width="0.728cm" svg:height="0.098cm" svg:x="11.627cm" svg:y="6.857cm">
          <draw:text-box>
            <text:p text:style-name="P3"><text:span text:style-name="T57">Session Controller</text:span></text:p>
          </draw:text-box>
        </draw:frame>
        <draw:path draw:style-name="gr65" draw:text-style-name="P54" draw:layer="layout" svg:width="1.237cm" svg:height="0.377cm" svg:x="10.508cm" svg:y="7.643cm" svg:viewBox="0 0 1238 378" svg:d="M41 0h1155c6 0 11 1 16 3s9 5 13 9 7 8 10 13c2 5 3 10 3 16v297c0 5-1 10-3 15-3 5-6 10-10 13-4 4-8 7-13 9s-10 3-16 3h-1155c-6 0-11-1-16-3s-9-5-13-9c-4-3-7-8-9-13s-3-10-3-15v-297c0-6 1-11 3-16s5-9 9-13 8-7 13-9 10-3 16-3z">
          <text:p/>
        </draw:path>
        <draw:path draw:style-name="gr66" draw:text-style-name="P26" draw:layer="layout" svg:width="1.237cm" svg:height="0.377cm" svg:x="10.508cm" svg:y="7.643cm" svg:viewBox="0 0 1238 378" svg:d="M41 0h1155c6 0 11 1 16 3s9 5 13 9 7 8 10 13c2 5 3 10 3 16v297c0 5-1 10-3 15-3 5-6 10-10 13-4 4-8 7-13 9s-10 3-16 3h-1155c-6 0-11-1-16-3s-9-5-13-9c-4-3-7-8-9-13s-3-10-3-15v-297c0-6 1-11 3-16s5-9 9-13 8-7 13-9 10-3 16-3z">
          <text:p/>
        </draw:path>
        <draw:frame draw:style-name="gr54" draw:text-style-name="P46" draw:layer="layout" svg:width="0.763cm" svg:height="0.098cm" svg:x="11.6cm" svg:y="5.94cm">
          <draw:text-box>
            <text:p text:style-name="P3"><text:span text:style-name="T57">Specification Agent</text:span></text:p>
          </draw:text-box>
        </draw:frame>
        <draw:path draw:style-name="gr65" draw:text-style-name="P54" draw:layer="layout" svg:width="1.129cm" svg:height="0.377cm" svg:x="10.562cm" svg:y="8.56cm" svg:viewBox="0 0 1130 378" svg:d="M40 0h1050c5 0 10 1 15 3s10 5 13 9c4 4 7 8 9 13s3 10 3 15v298c0 5-1 10-3 15s-5 9-9 13c-3 4-8 7-13 9s-10 3-15 3h-1050c-5 0-10-1-15-3s-9-5-13-9-7-8-9-13-3-10-3-15v-298c0-5 1-10 3-15s5-9 9-13 8-7 13-9 10-3 15-3z">
          <text:p/>
        </draw:path>
        <draw:path draw:style-name="gr66" draw:text-style-name="P26" draw:layer="layout" svg:width="1.129cm" svg:height="0.377cm" svg:x="10.562cm" svg:y="8.56cm" svg:viewBox="0 0 1130 378" svg:d="M40 0h1050c5 0 10 1 15 3s10 5 13 9c4 4 7 8 9 13s3 10 3 15v298c0 5-1 10-3 15s-5 9-9 13c-3 4-8 7-13 9s-10 3-15 3h-1050c-5 0-10-1-15-3s-9-5-13-9-7-8-9-13-3-10-3-15v-298c0-5 1-10 3-15s5-9 9-13 8-7 13-9 10-3 15-3z">
          <text:p/>
        </draw:path>
        <draw:frame draw:style-name="gr54" draw:text-style-name="P46" draw:layer="layout" svg:width="0.605cm" svg:height="0.098cm" svg:x="10.752cm" svg:y="7.774cm">
          <draw:text-box>
            <text:p text:style-name="P3"><text:span text:style-name="T57">Planning Agent</text:span></text:p>
          </draw:text-box>
        </draw:frame>
        <draw:path draw:style-name="gr65" draw:text-style-name="P54" draw:layer="layout" svg:width="1.879cm" svg:height="0.377cm" svg:x="12.219cm" svg:y="7.643cm" svg:viewBox="0 0 1880 378" svg:d="M40 0h1798c6 0 11 1 16 3s9 5 13 9 8 8 10 13 3 10 3 16v297c0 5-1 10-3 15s-6 10-10 13c-4 4-8 7-13 9s-10 3-16 3h-1798c-5 0-10-1-15-3s-10-5-13-9c-4-3-7-8-9-13s-3-10-3-15v-297c0-6 1-11 3-16s5-9 9-13c3-4 8-7 13-9s10-3 15-3z">
          <text:p/>
        </draw:path>
        <draw:path draw:style-name="gr66" draw:text-style-name="P26" draw:layer="layout" svg:width="1.879cm" svg:height="0.377cm" svg:x="12.219cm" svg:y="7.643cm" svg:viewBox="0 0 1880 378" svg:d="M40 0h1798c6 0 11 1 16 3s9 5 13 9 8 8 10 13 3 10 3 16v297c0 5-1 10-3 15s-6 10-10 13c-4 4-8 7-13 9s-10 3-16 3h-1798c-5 0-10-1-15-3s-10-5-13-9c-4-3-7-8-9-13s-3-10-3-15v-297c0-6 1-11 3-16s5-9 9-13c3-4 8-7 13-9s10-3 15-3z">
          <text:p/>
        </draw:path>
        <draw:frame draw:style-name="gr54" draw:text-style-name="P46" draw:layer="layout" svg:width="0.541cm" svg:height="0.098cm" svg:x="10.806cm" svg:y="8.691cm">
          <draw:text-box>
            <text:p text:style-name="P3"><text:span text:style-name="T57">Coding Agent</text:span></text:p>
          </draw:text-box>
        </draw:frame>
        <draw:path draw:style-name="gr67" draw:text-style-name="P55" draw:layer="layout" svg:width="1.29cm" svg:height="0.378cm" svg:x="19.182cm" svg:y="9.882cm" svg:viewBox="0 0 1291 379" svg:d="M40 0h1210c6 0 11 1 16 3 5 3 9 5 13 9s7 8 9 13 3 11 3 16v297c0 6-1 11-3 16s-5 9-9 13-8 7-13 9-10 3-16 3h-1210c-5 0-10-1-15-3s-10-5-14-9c-3-4-6-8-8-13s-3-10-3-16v-297c0-5 1-11 3-16s5-9 8-13c4-4 9-6 14-9 5-2 10-3 15-3z">
          <text:p/>
        </draw:path>
        <draw:path draw:style-name="gr68" draw:text-style-name="P26" draw:layer="layout" svg:width="1.29cm" svg:height="0.378cm" svg:x="19.182cm" svg:y="9.882cm" svg:viewBox="0 0 1291 379" svg:d="M40 0h1210c6 0 11 1 16 3 5 3 9 5 13 9s7 8 9 13 3 11 3 16v297c0 6-1 11-3 16s-5 9-9 13-8 7-13 9-10 3-16 3h-1210c-5 0-10-1-15-3s-10-5-14-9c-3-4-6-8-8-13s-3-10-3-16v-297c0-5 1-11 3-16s5-9 8-13c4-4 9-6 14-9 5-2 10-3 15-3z">
          <text:p/>
        </draw:path>
        <draw:frame draw:style-name="gr54" draw:text-style-name="P46" draw:layer="layout" svg:width="1.074cm" svg:height="0.098cm" svg:x="12.463cm" svg:y="7.774cm">
          <draw:text-box>
            <text:p text:style-name="P3"><text:span text:style-name="T57">Schema Tailor &amp; Heuristics</text:span></text:p>
          </draw:text-box>
        </draw:frame>
        <draw:path draw:style-name="gr67" draw:text-style-name="P55" draw:layer="layout" svg:width="1.344cm" svg:height="0.377cm" svg:x="19.155cm" svg:y="11.002cm" svg:viewBox="0 0 1345 378" svg:d="M40 0h1264c5 0 10 1 15 3s10 5 14 9c3 4 6 8 8 13s4 10 4 16v297c0 5-2 10-4 15s-5 10-8 14c-4 3-9 6-14 8s-10 3-15 3h-1264c-5 0-10-1-15-3s-10-5-13-8c-4-4-7-9-9-14s-3-10-3-15v-297c0-6 1-11 3-16s5-9 9-13c3-4 8-7 13-9s10-3 15-3z">
          <text:p/>
        </draw:path>
        <draw:path draw:style-name="gr68" draw:text-style-name="P26" draw:layer="layout" svg:width="1.344cm" svg:height="0.377cm" svg:x="19.155cm" svg:y="11.002cm" svg:viewBox="0 0 1345 378" svg:d="M40 0h1264c5 0 10 1 15 3s10 5 14 9c3 4 6 8 8 13s4 10 4 16v297c0 5-2 10-4 15s-5 10-8 14c-4 3-9 6-14 8s-10 3-15 3h-1264c-5 0-10-1-15-3s-10-5-13-8c-4-4-7-9-9-14s-3-10-3-15v-297c0-6 1-11 3-16s5-9 9-13c3-4 8-7 13-9s10-3 15-3z">
          <text:p/>
        </draw:path>
        <draw:frame draw:style-name="gr54" draw:text-style-name="P46" draw:layer="layout" svg:width="0.63cm" svg:height="0.098cm" svg:x="19.426cm" svg:y="10.013cm">
          <draw:text-box>
            <text:p text:style-name="P3"><text:span text:style-name="T57">Context Service</text:span></text:p>
          </draw:text-box>
        </draw:frame>
        <draw:path draw:style-name="gr67" draw:text-style-name="P55" draw:layer="layout" svg:width="1.237cm" svg:height="0.377cm" svg:x="18.712cm" svg:y="12.122cm" svg:viewBox="0 0 1238 378" svg:d="M41 0h1156c6 0 11 1 16 3s9 5 13 9 7 8 9 13 3 10 3 15v298c0 5-1 10-3 15s-5 9-9 13-8 7-13 9-10 3-16 3h-1156c-6 0-11-1-16-3s-9-5-13-9-7-8-9-13-3-10-3-15v-298c0-5 1-10 3-15s5-9 9-13 8-7 13-9 10-3 16-3z">
          <text:p/>
        </draw:path>
        <draw:path draw:style-name="gr68" draw:text-style-name="P26" draw:layer="layout" svg:width="1.237cm" svg:height="0.377cm" svg:x="18.712cm" svg:y="12.122cm" svg:viewBox="0 0 1238 378" svg:d="M41 0h1156c6 0 11 1 16 3s9 5 13 9 7 8 9 13 3 10 3 15v298c0 5-1 10-3 15s-5 9-9 13-8 7-13 9-10 3-16 3h-1156c-6 0-11-1-16-3s-9-5-13-9-7-8-9-13-3-10-3-15v-298c0-5 1-10 3-15s5-9 9-13 8-7 13-9 10-3 16-3z">
          <text:p/>
        </draw:path>
        <draw:frame draw:style-name="gr54" draw:text-style-name="P46" draw:layer="layout" svg:width="0.733cm" svg:height="0.098cm" svg:x="19.399cm" svg:y="11.133cm">
          <draw:text-box>
            <text:p text:style-name="P3"><text:span text:style-name="T57">Prompt Assembler</text:span></text:p>
          </draw:text-box>
        </draw:frame>
        <draw:path draw:style-name="gr69" draw:text-style-name="P56" draw:layer="layout" svg:width="1.29cm" svg:height="0.378cm" svg:x="13.088cm" svg:y="13.444cm" svg:viewBox="0 0 1291 379" svg:d="M40 0h1210c6 0 11 1 16 3 5 3 9 5 13 9s7 8 9 13 3 11 3 16v297c0 6-1 11-3 16s-5 9-9 13-8 7-13 9-10 3-16 3h-1210c-5 0-10-1-15-3s-9-5-13-9-7-8-9-13-3-10-3-16v-297c0-5 1-11 3-16s5-9 9-13 8-6 13-9c5-2 10-3 15-3z">
          <text:p/>
        </draw:path>
        <draw:path draw:style-name="gr70" draw:text-style-name="P26" draw:layer="layout" svg:width="1.29cm" svg:height="0.378cm" svg:x="13.088cm" svg:y="13.444cm" svg:viewBox="0 0 1291 379" svg:d="M40 0h1210c6 0 11 1 16 3 5 3 9 5 13 9s7 8 9 13 3 11 3 16v297c0 6-1 11-3 16s-5 9-9 13-8 7-13 9-10 3-16 3h-1210c-5 0-10-1-15-3s-9-5-13-9-7-8-9-13-3-10-3-16v-297c0-5 1-11 3-16s5-9 9-13 8-6 13-9c5-2 10-3 15-3z">
          <text:p/>
        </draw:path>
        <draw:frame draw:style-name="gr54" draw:text-style-name="P46" draw:layer="layout" svg:width="0.659cm" svg:height="0.098cm" svg:x="18.956cm" svg:y="12.253cm">
          <draw:text-box>
            <text:p text:style-name="P3"><text:span text:style-name="T57">Budget Manager</text:span></text:p>
          </draw:text-box>
        </draw:frame>
        <draw:path draw:style-name="gr69" draw:text-style-name="P56" draw:layer="layout" svg:width="1.237cm" svg:height="0.378cm" svg:x="19.061cm" svg:y="13.444cm" svg:viewBox="0 0 1238 379" svg:d="M41 0h1156c5 0 11 1 16 3 5 3 9 5 13 9s7 8 9 13 3 11 3 16v297c0 6-1 11-3 16s-5 9-9 13-8 7-13 9-11 3-16 3h-1156c-6 0-11-1-16-3s-9-5-13-9-7-8-9-13-3-10-3-16v-297c0-5 1-11 3-16s5-9 9-13 8-6 13-9c5-2 10-3 16-3z">
          <text:p/>
        </draw:path>
        <draw:path draw:style-name="gr70" draw:text-style-name="P26" draw:layer="layout" svg:width="1.237cm" svg:height="0.378cm" svg:x="19.061cm" svg:y="13.444cm" svg:viewBox="0 0 1238 379" svg:d="M41 0h1156c5 0 11 1 16 3 5 3 9 5 13 9s7 8 9 13 3 11 3 16v297c0 6-1 11-3 16s-5 9-9 13-8 7-13 9-11 3-16 3h-1156c-6 0-11-1-16-3s-9-5-13-9-7-8-9-13-3-10-3-16v-297c0-5 1-11 3-16s5-9 9-13 8-6 13-9c5-2 10-3 16-3z">
          <text:p/>
        </draw:path>
        <draw:frame draw:style-name="gr54" draw:text-style-name="P46" draw:layer="layout" svg:width="0.714cm" svg:height="0.098cm" svg:x="13.332cm" svg:y="13.575cm">
          <draw:text-box>
            <text:p text:style-name="P3"><text:span text:style-name="T57">Knowledge Graph</text:span></text:p>
          </draw:text-box>
        </draw:frame>
        <draw:path draw:style-name="gr69" draw:text-style-name="P56" draw:layer="layout" svg:width="1.29cm" svg:height="0.378cm" svg:x="19.034cm" svg:y="14.361cm" svg:viewBox="0 0 1291 379" svg:d="M41 0h1210c5 0 10 1 15 3s10 5 14 9c3 4 6 8 8 13s3 10 3 16v297c0 5-1 11-3 16s-5 9-8 13c-4 3-9 6-14 8-5 3-10 4-15 4h-1210c-6 0-11-1-16-4-5-2-9-5-13-8-4-4-7-8-9-13s-3-11-3-16v-297c0-6 1-11 3-16s5-9 9-13 8-7 13-9 10-3 16-3z">
          <text:p/>
        </draw:path>
        <draw:path draw:style-name="gr70" draw:text-style-name="P26" draw:layer="layout" svg:width="1.29cm" svg:height="0.378cm" svg:x="19.034cm" svg:y="14.361cm" svg:viewBox="0 0 1291 379" svg:d="M41 0h1210c5 0 10 1 15 3s10 5 14 9c3 4 6 8 8 13s3 10 3 16v297c0 5-1 11-3 16s-5 9-8 13c-4 3-9 6-14 8-5 3-10 4-15 4h-1210c-6 0-11-1-16-4-5-2-9-5-13-8-4-4-7-8-9-13s-3-11-3-16v-297c0-6 1-11 3-16s5-9 9-13 8-7 13-9 10-3 16-3z">
          <text:p/>
        </draw:path>
        <draw:frame draw:style-name="gr54" draw:text-style-name="P46" draw:layer="layout" svg:width="0.674cm" svg:height="0.098cm" svg:x="19.305cm" svg:y="13.575cm">
          <draw:text-box>
            <text:p text:style-name="P3"><text:span text:style-name="T57">Memory Pyramid</text:span></text:p>
          </draw:text-box>
        </draw:frame>
        <draw:path draw:style-name="gr71" draw:text-style-name="P57" draw:layer="layout" svg:width="1.344cm" svg:height="0.378cm" svg:x="9.681cm" svg:y="9.882cm" svg:viewBox="0 0 1345 379" svg:d="M41 0h1264c5 0 10 1 15 3 5 3 9 5 13 9s7 8 9 13 3 11 3 16v297c0 6-1 11-3 16s-5 9-9 13-8 7-13 9-10 3-15 3h-1264c-5 0-11-1-16-3-4-2-9-5-13-9-3-4-6-8-8-13-3-5-4-10-4-16v-297c0-5 1-11 4-16 2-5 5-9 8-13 4-4 9-6 13-9 5-2 11-3 16-3z">
          <text:p/>
        </draw:path>
        <draw:path draw:style-name="gr72" draw:text-style-name="P26" draw:layer="layout" svg:width="1.344cm" svg:height="0.378cm" svg:x="9.681cm" svg:y="9.882cm" svg:viewBox="0 0 1345 379" svg:d="M41 0h1264c5 0 10 1 15 3 5 3 9 5 13 9s7 8 9 13 3 11 3 16v297c0 6-1 11-3 16s-5 9-9 13-8 7-13 9-10 3-15 3h-1264c-5 0-11-1-16-3-4-2-9-5-13-9-3-4-6-8-8-13-3-5-4-10-4-16v-297c0-5 1-11 4-16 2-5 5-9 8-13 4-4 9-6 13-9 5-2 11-3 16-3z">
          <text:p/>
        </draw:path>
        <draw:frame draw:style-name="gr54" draw:text-style-name="P46" draw:layer="layout" svg:width="0.56cm" svg:height="0.098cm" svg:x="19.278cm" svg:y="14.492cm">
          <draw:text-box>
            <text:p text:style-name="P3"><text:span text:style-name="T57">Artifacts Store</text:span></text:p>
          </draw:text-box>
        </draw:frame>
        <draw:path draw:style-name="gr71" draw:text-style-name="P57" draw:layer="layout" svg:width="1.129cm" svg:height="0.377cm" svg:x="8.48cm" svg:y="11.002cm" svg:viewBox="0 0 1130 378" svg:d="M40 0h1049c5 0 10 1 15 3s10 5 14 9 7 8 9 13 3 10 3 16v297c0 5-1 10-3 15s-5 10-9 14c-4 3-9 6-14 8s-10 3-15 3h-1049c-5 0-10-1-15-3s-10-5-13-8c-4-4-7-9-9-14s-3-10-3-15v-297c0-6 1-11 3-16s5-9 9-13c3-4 8-7 13-9s10-3 15-3z">
          <text:p/>
        </draw:path>
        <draw:path draw:style-name="gr72" draw:text-style-name="P26" draw:layer="layout" svg:width="1.129cm" svg:height="0.377cm" svg:x="8.48cm" svg:y="11.002cm" svg:viewBox="0 0 1130 378" svg:d="M40 0h1049c5 0 10 1 15 3s10 5 14 9 7 8 9 13 3 10 3 16v297c0 5-1 10-3 15s-5 10-9 14c-4 3-9 6-14 8s-10 3-15 3h-1049c-5 0-10-1-15-3s-10-5-13-8c-4-4-7-9-9-14s-3-10-3-15v-297c0-6 1-11 3-16s5-9 9-13c3-4 8-7 13-9s10-3 15-3z">
          <text:p/>
        </draw:path>
        <draw:frame draw:style-name="gr54" draw:text-style-name="P46" draw:layer="layout" svg:width="0.728cm" svg:height="0.098cm" svg:x="9.925cm" svg:y="10.013cm">
          <draw:text-box>
            <text:p text:style-name="P3"><text:span text:style-name="T57">Approval Gateway</text:span></text:p>
          </draw:text-box>
        </draw:frame>
        <draw:path draw:style-name="gr73" draw:text-style-name="P58" draw:layer="layout" svg:width="1.397cm" svg:height="0.378cm" svg:x="6.073cm" svg:y="9.882cm" svg:viewBox="0 0 1398 379" svg:d="M41 0h1317c5 0 10 1 15 3 5 3 10 5 13 9 4 4 7 8 9 13s3 11 3 16v297c0 6-1 11-3 16s-5 9-9 13c-3 4-8 7-13 9s-10 3-15 3h-1317c-6 0-11-1-16-3s-9-5-13-9-7-8-9-13-3-10-3-16v-297c0-5 1-11 3-16s5-9 9-13 8-6 13-9c5-2 10-3 16-3z">
          <text:p/>
        </draw:path>
        <draw:path draw:style-name="gr74" draw:text-style-name="P26" draw:layer="layout" svg:width="1.397cm" svg:height="0.378cm" svg:x="6.073cm" svg:y="9.882cm" svg:viewBox="0 0 1398 379" svg:d="M41 0h1317c5 0 10 1 15 3 5 3 10 5 13 9 4 4 7 8 9 13s3 11 3 16v297c0 6-1 11-3 16s-5 9-9 13c-3 4-8 7-13 9s-10 3-15 3h-1317c-6 0-11-1-16-3s-9-5-13-9-7-8-9-13-3-10-3-16v-297c0-5 1-11 3-16s5-9 9-13 8-6 13-9c5-2 10-3 16-3z">
          <text:p/>
        </draw:path>
        <draw:frame draw:style-name="gr54" draw:text-style-name="P46" draw:layer="layout" svg:width="0.531cm" svg:height="0.098cm" svg:x="8.724cm" svg:y="11.133cm">
          <draw:text-box>
            <text:p text:style-name="P3"><text:span text:style-name="T57">Tool Runtime</text:span></text:p>
          </draw:text-box>
        </draw:frame>
        <draw:polygon draw:style-name="gr6" draw:text-style-name="P7" draw:layer="layout" svg:width="0.714cm" svg:height="0.635cm" svg:x="25.479cm" svg:y="18.388cm" svg:viewBox="0 0 715 636" draw:points="0,0 715,0 715,636 0,636">
          <text:p/>
        </draw:polygon>
        <draw:frame draw:style-name="gr54" draw:text-style-name="P46" draw:layer="layout" svg:width="0.748cm" svg:height="0.098cm" svg:x="6.317cm" svg:y="10.013cm">
          <draw:text-box>
            <text:p text:style-name="P3"><text:span text:style-name="T57">Model API Adapter</text:span></text:p>
          </draw:text-box>
        </draw:frame>
        <draw:frame draw:style-name="gr7" draw:text-style-name="P8" draw:layer="layout" svg:width="0.412cm" svg:height="0.412cm" svg:x="25.617cm" svg:y="18.503cm">
          <draw:text-box>
            <text:p text:style-name="P3"><text:span text:style-name="T6">17</text:span></text:p>
          </draw:text-box>
        </draw:frame>
      </draw:page>
      <draw:page draw:name="page18"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33cm" svg:height="3.996cm" svg:x="0.502cm" svg:y="4.206cm" svg:viewBox="0 0 12331 3997" svg:d="M31 31c21-20 46-31 75-31h12119c29 0 54 11 75 31 20 21 31 46 31 75v3785c0 29-11 54-31 75-21 20-46 31-75 31h-12119c-29 0-54-11-75-31-20-21-31-46-31-75v-3785c0-29 11-54 31-75z">
          <text:p/>
        </draw:path>
        <draw:path draw:style-name="gr2" draw:text-style-name="P2" draw:layer="layout" svg:width="12.252cm" svg:height="0.051cm" svg:x="0.55cm" svg:y="4.206cm" svg:viewBox="0 0 12253 52" svg:d="M12234 52l-1-1c-15-15-34-23-56-23h-12119c-4 0-7 2-10 6l-48-16c17-11 36-18 58-18h12119c29 0 54 12 75 32 0 1 1 1 1 2z">
          <text:p/>
        </draw:path>
        <draw:path draw:style-name="gr2" draw:text-style-name="P2" draw:layer="layout" svg:width="12.252cm" svg:height="0.051cm" svg:x="0.55cm" svg:y="8.151cm" svg:viewBox="0 0 12253 52" svg:d="M48 18c3 4 6 6 10 6h12119c22 0 41-8 56-23 1-1 1-1 1-1l19 18c0 1-1 1-1 2-21 21-46 32-75 32h-12119c-22 0-41-6-58-18z">
          <text:p/>
        </draw:path>
        <draw:path draw:style-name="gr2" draw:text-style-name="P2" draw:layer="layout" svg:width="0.05cm" svg:height="3.934cm" svg:x="12.782cm" svg:y="4.237cm" svg:viewBox="0 0 51 3935" svg:d="M0 3916c16-16 23-34 23-56v-3785c0-22-7-40-23-56l19-19c21 21 32 46 32 75v3785c0 29-11 54-32 75z">
          <text:p/>
        </draw:path>
        <draw:polygon draw:style-name="gr2" draw:text-style-name="P2" draw:layer="layout" svg:width="12.33cm" svg:height="3.996cm" svg:x="0.502cm" svg:y="4.206cm" svg:viewBox="0 0 12331 3997" draw:points="0,0 12331,0 12331,3997 0,3997">
          <text:p/>
        </draw:polygon>
        <draw:path draw:style-name="gr8" draw:text-style-name="P9" draw:layer="layout" svg:width="12.33cm" svg:height="3.995cm" svg:x="0.502cm" svg:y="8.413cm" svg:viewBox="0 0 12331 3996" svg:d="M31 31c21-20 46-31 75-31h12119c29 0 54 11 75 31 20 21 31 46 31 75v3785c0 29-11 54-31 74-21 21-46 31-75 31h-12119c-29 0-54-10-75-31-20-20-31-45-31-74v-3785c0-29 11-54 31-75z">
          <text:p/>
        </draw:path>
        <draw:path draw:style-name="gr2" draw:text-style-name="P2" draw:layer="layout" svg:width="12.252cm" svg:height="0.051cm" svg:x="0.55cm" svg:y="8.413cm" svg:viewBox="0 0 12253 52" svg:d="M12234 52c0 0 0-1-1-1-15-16-34-24-56-24h-12119c-4 0-7 3-10 7l-48-17c17-11 36-17 58-17h12119c29 0 54 11 75 32 0 1 1 1 1 2z">
          <text:p/>
        </draw:path>
        <draw:path draw:style-name="gr2" draw:text-style-name="P2" draw:layer="layout" svg:width="12.252cm" svg:height="0.051cm" svg:x="0.55cm" svg:y="12.357cm" svg:viewBox="0 0 12253 52" svg:d="M48 20c3 4 6 6 10 6h12119c22 0 41-8 56-24 1-1 1-1 1-2l19 20c0 1-1 1-1 1-21 21-46 31-75 31h-12119c-22 0-41-5-58-16z">
          <text:p/>
        </draw:path>
        <draw:path draw:style-name="gr2" draw:text-style-name="P2" draw:layer="layout" svg:width="0.05cm" svg:height="3.933cm" svg:x="12.782cm" svg:y="8.444cm" svg:viewBox="0 0 51 3934" svg:d="M0 3916c16-16 23-34 23-56v-3785c0-22-7-41-23-56l19-19c21 21 32 46 32 75v3785c0 29-11 54-32 74z">
          <text:p/>
        </draw:path>
        <draw:polygon draw:style-name="gr2" draw:text-style-name="P2" draw:layer="layout" svg:width="12.33cm" svg:height="3.995cm" svg:x="0.502cm" svg:y="8.413cm" svg:viewBox="0 0 12331 3996" draw:points="0,0 12331,0 12331,3996 0,3996">
          <text:p/>
        </draw:polygon>
        <draw:path draw:style-name="gr8" draw:text-style-name="P9" draw:layer="layout" svg:width="12.33cm" svg:height="3.995cm" svg:x="0.502cm" svg:y="12.62cm" svg:viewBox="0 0 12331 3996" svg:d="M31 31c21-21 46-31 75-31h12119c29 0 54 10 75 31 20 21 31 46 31 75v3784c0 30-11 55-31 75-21 21-46 31-75 31h-12119c-29 0-54-10-75-31-20-20-31-45-31-75v-3784c0-29 11-54 31-75z">
          <text:p/>
        </draw:path>
        <draw:path draw:style-name="gr2" draw:text-style-name="P2" draw:layer="layout" svg:width="12.252cm" svg:height="0.051cm" svg:x="0.55cm" svg:y="12.62cm" svg:viewBox="0 0 12253 52" svg:d="M12234 52c0 0 0-1-1-1-15-16-34-23-56-23h-12119c-4 0-7 2-10 6l-48-16c17-11 36-18 58-18h12119c29 0 54 11 75 32 0 1 1 1 1 1z">
          <text:p/>
        </draw:path>
        <draw:path draw:style-name="gr2" draw:text-style-name="P2" draw:layer="layout" svg:width="12.252cm" svg:height="0.051cm" svg:x="0.55cm" svg:y="16.564cm" svg:viewBox="0 0 12253 52" svg:d="M48 19c3 4 6 6 10 6h12119c22 0 41-8 56-23 1-1 1-1 1-2l19 19-1 1c-21 22-46 32-75 32h-12119c-22 0-41-5-58-18z">
          <text:p/>
        </draw:path>
        <draw:path draw:style-name="gr2" draw:text-style-name="P2" draw:layer="layout" svg:width="0.05cm" svg:height="3.933cm" svg:x="12.782cm" svg:y="12.651cm" svg:viewBox="0 0 51 3934" svg:d="M0 3916c16-16 23-35 23-57v-3784c0-22-7-41-23-56l19-19c21 21 32 46 32 75v3784c0 30-11 55-32 75z">
          <text:p/>
        </draw:path>
        <draw:polygon draw:style-name="gr2" draw:text-style-name="P2" draw:layer="layout" svg:width="12.33cm" svg:height="3.995cm" svg:x="0.502cm" svg:y="12.62cm" svg:viewBox="0 0 12331 3996" draw:points="0,0 12331,0 12331,3996 0,3996">
          <text:p/>
        </draw:polygon>
        <draw:frame draw:style-name="gr9" draw:text-style-name="P10" draw:layer="layout" svg:width="18.489cm" svg:height="1.119cm" svg:x="3.485cm" svg:y="2.429cm">
          <draw:text-box>
            <text:p text:style-name="P3"><text:span text:style-name="T7">MODULARITY SERVES THE BUSINESS</text:span></text:p>
          </draw:text-box>
        </draw:frame>
        <draw:path draw:style-name="gr17" draw:text-style-name="P18" draw:layer="layout" svg:width="0.159cm" svg:height="0.159cm" svg:x="0.978cm" svg:y="5.529cm" svg:viewBox="0 0 160 160" svg:d="M160 81c0 10-2 20-6 30s-10 18-17 26c-7 7-16 13-26 17s-20 6-30 6c-11 0-21-2-31-6s-19-10-26-17c-8-8-13-16-17-26-5-10-7-20-7-30 0-12 2-22 7-32 4-9 9-18 17-26 7-7 16-13 26-17s20-6 31-6c10 0 20 2 30 6s19 10 26 17c7 8 13 17 17 26 4 10 6 20 6 32z">
          <text:p/>
        </draw:path>
        <draw:frame draw:style-name="gr20" draw:text-style-name="P21" draw:layer="layout" svg:width="4.415cm" svg:height="0.666cm" svg:x="1.027cm" svg:y="4.517cm">
          <draw:text-box>
            <text:p text:style-name="P3"><text:span text:style-name="T38">SWAPPABLE UI</text:span></text:p>
          </draw:text-box>
        </draw:frame>
        <draw:frame draw:style-name="gr18" draw:text-style-name="P19" draw:layer="layout" svg:width="11.75cm" svg:height="0.539cm" svg:x="1.46cm" svg:y="5.306cm">
          <draw:text-box>
            <text:p text:style-name="P3"><text:span text:style-name="T17">Replace Textual TUI with Web UI or IDE plugin — zero</text:span></text:p>
          </draw:text-box>
        </draw:frame>
        <draw:path draw:style-name="gr17" draw:text-style-name="P18" draw:layer="layout" svg:width="0.159cm" svg:height="0.159cm" svg:x="0.978cm" svg:y="6.799cm" svg:viewBox="0 0 160 160" svg:d="M160 81c0 10-2 20-6 30s-10 18-17 26c-7 7-16 13-26 17s-20 6-30 6c-11 0-21-2-31-6s-19-10-26-17c-8-8-13-16-17-26-5-10-7-20-7-30 0-12 2-22 7-32 4-9 9-18 17-26 7-7 16-13 26-17s20-6 31-6c10 0 20 2 30 6s19 10 26 17c7 8 13 17 17 26 4 10 6 20 6 32z">
          <text:p/>
        </draw:path>
        <draw:frame draw:style-name="gr18" draw:text-style-name="P19" draw:layer="layout" svg:width="4.992cm" svg:height="0.539cm" svg:x="1.46cm" svg:y="5.914cm">
          <draw:text-box>
            <text:p text:style-name="P3"><text:span text:style-name="T17">business logic changes</text:span></text:p>
          </draw:text-box>
        </draw:frame>
        <draw:path draw:style-name="gr33" draw:text-style-name="P34" draw:layer="layout" svg:width="1.693cm" svg:height="0.609cm" svg:x="7.064cm" svg:y="6.561cm" svg:viewBox="0 0 1694 610" svg:d="M0 530v-450c0-11 2-21 6-31s10-18 17-26c8-7 16-13 26-17s20-6 30-6h1536c10 0 20 2 30 6s19 10 26 17c7 8 13 16 17 26s6 20 6 31v450c0 11-2 21-6 31-4 9-10 18-17 25-7 8-16 14-26 18s-20 6-30 6h-1536c-10 0-20-2-30-6s-18-10-26-18c-7-7-13-16-17-25-4-10-6-20-6-31z">
          <text:p/>
        </draw:path>
        <draw:frame draw:style-name="gr18" draw:text-style-name="P19" draw:layer="layout" svg:width="6.012cm" svg:height="0.539cm" svg:x="1.46cm" svg:y="6.576cm">
          <draw:text-box>
            <text:p text:style-name="P3"><text:span text:style-name="T17">UI module only depends on </text:span></text:p>
          </draw:text-box>
        </draw:frame>
        <draw:frame draw:style-name="gr75" draw:text-style-name="P59" draw:layer="layout" svg:width="1.143cm" svg:height="0.463cm" svg:x="7.171cm" svg:y="6.635cm">
          <draw:text-box>
            <text:p text:style-name="P3"><text:span text:style-name="T58">UiPort</text:span></text:p>
          </draw:text-box>
        </draw:frame>
        <draw:frame draw:style-name="gr18" draw:text-style-name="P19" draw:layer="layout" svg:width="3.623cm" svg:height="0.539cm" svg:x="8.747cm" svg:y="6.576cm">
          <draw:text-box>
            <text:p text:style-name="P3"><text:span text:style-name="T17"><text:s/>protocol; swap it</text:span></text:p>
          </draw:text-box>
        </draw:frame>
        <draw:frame draw:style-name="gr18" draw:text-style-name="P19" draw:layer="layout" svg:width="1.987cm" svg:height="0.539cm" svg:x="1.46cm" svg:y="7.211cm">
          <draw:text-box>
            <text:p text:style-name="P3"><text:span text:style-name="T17">out freely</text:span></text:p>
          </draw:text-box>
        </draw:frame>
        <draw:path draw:style-name="gr17" draw:text-style-name="P18" draw:layer="layout" svg:width="0.159cm" svg:height="0.159cm" svg:x="0.978cm" svg:y="9.736cm" svg:viewBox="0 0 160 160" svg:d="M160 80c0 10-2 20-6 30s-10 18-17 26-16 14-26 18-20 6-30 6c-11 0-21-2-31-6s-19-10-26-18c-8-8-13-16-17-26-5-10-7-20-7-30 0-11 2-21 7-31 4-10 9-18 17-26 7-7 16-13 26-17s20-6 31-6c10 0 20 2 30 6s19 10 26 17c7 8 13 16 17 26s6 20 6 31z">
          <text:p/>
        </draw:path>
        <draw:frame draw:style-name="gr20" draw:text-style-name="P21" draw:layer="layout" svg:width="7.314cm" svg:height="0.666cm" svg:x="1.027cm" svg:y="8.724cm">
          <draw:text-box>
            <text:p text:style-name="P3"><text:span text:style-name="T38">SWAPPABLE PROVIDERS</text:span></text:p>
          </draw:text-box>
        </draw:frame>
        <draw:frame draw:style-name="gr18" draw:text-style-name="P19" draw:layer="layout" svg:width="11.537cm" svg:height="0.539cm" svg:x="1.46cm" svg:y="9.513cm">
          <draw:text-box>
            <text:p text:style-name="P3"><text:span text:style-name="T17">Swap DeepSeek for Ollama or OpenAI with zero code</text:span></text:p>
          </draw:text-box>
        </draw:frame>
        <draw:path draw:style-name="gr17" draw:text-style-name="P18" draw:layer="layout" svg:width="0.159cm" svg:height="0.159cm" svg:x="0.978cm" svg:y="11.006cm" svg:viewBox="0 0 160 160" svg:d="M160 80c0 10-2 20-6 30s-10 18-17 27c-7 7-16 13-26 17s-20 6-30 6c-11 0-21-2-31-6s-19-10-26-17c-8-9-13-17-17-27-5-10-7-20-7-30 0-11 2-21 7-31 4-10 9-18 17-26 7-7 16-13 26-17s20-6 31-6c10 0 20 2 30 6s19 10 26 17c7 8 13 16 17 26s6 20 6 31z">
          <text:p/>
        </draw:path>
        <draw:frame draw:style-name="gr18" draw:text-style-name="P19" draw:layer="layout" svg:width="1.827cm" svg:height="0.539cm" svg:x="1.46cm" svg:y="10.148cm">
          <draw:text-box>
            <text:p text:style-name="P3"><text:span text:style-name="T17">changes</text:span></text:p>
          </draw:text-box>
        </draw:frame>
        <draw:path draw:style-name="gr33" draw:text-style-name="P34" draw:layer="layout" svg:width="2.17cm" svg:height="0.609cm" svg:x="2.804cm" svg:y="10.768cm" svg:viewBox="0 0 2171 610" svg:d="M0 530v-451c0-10 2-20 6-30s10-18 17-26c8-7 16-13 26-17s20-6 30-6h2012c11 0 21 2 31 6 9 4 18 10 25 17 8 8 14 16 18 26s6 20 6 30v451c0 11-2 21-6 31-4 9-10 18-18 25-7 8-16 13-25 18-10 4-20 6-31 6h-2012c-10 0-20-2-30-6-10-5-18-10-26-18-7-7-13-16-17-25-4-10-6-20-6-31z">
          <text:p/>
        </draw:path>
        <draw:frame draw:style-name="gr18" draw:text-style-name="P19" draw:layer="layout" svg:width="1.478cm" svg:height="0.539cm" svg:x="1.46cm" svg:y="10.783cm">
          <draw:text-box>
            <text:p text:style-name="P3"><text:span text:style-name="T17">Single </text:span></text:p>
          </draw:text-box>
        </draw:frame>
        <draw:frame draw:style-name="gr75" draw:text-style-name="P59" draw:layer="layout" svg:width="1.531cm" svg:height="0.463cm" svg:x="2.901cm" svg:y="10.842cm">
          <draw:text-box>
            <text:p text:style-name="P3"><text:span text:style-name="T58">Provider</text:span></text:p>
          </draw:text-box>
        </draw:frame>
        <draw:frame draw:style-name="gr18" draw:text-style-name="P19" draw:layer="layout" svg:width="7.514cm" svg:height="0.539cm" svg:x="4.968cm" svg:y="10.783cm">
          <draw:text-box>
            <text:p text:style-name="P3"><text:span text:style-name="T17"><text:s/>protocol adapter handles all model</text:span></text:p>
          </draw:text-box>
        </draw:frame>
        <draw:frame draw:style-name="gr18" draw:text-style-name="P19" draw:layer="layout" svg:width="2.068cm" svg:height="0.539cm" svg:x="1.46cm" svg:y="11.418cm">
          <draw:text-box>
            <text:p text:style-name="P3"><text:span text:style-name="T17">backends</text:span></text:p>
          </draw:text-box>
        </draw:frame>
        <draw:path draw:style-name="gr17" draw:text-style-name="P18" draw:layer="layout" svg:width="0.159cm" svg:height="0.159cm" svg:x="0.978cm" svg:y="13.943cm" svg:viewBox="0 0 160 160" svg:d="M160 80c0 11-2 21-6 31-4 9-10 18-17 26-7 7-16 13-26 17s-20 6-30 6c-11 0-21-2-31-6s-19-10-26-17c-8-8-13-17-17-26-5-10-7-20-7-31 0-10 2-20 7-30 4-11 9-19 17-27 7-7 16-13 26-17s20-6 31-6c10 0 20 2 30 6s19 10 26 17c7 8 13 16 17 27 4 10 6 20 6 30z">
          <text:p/>
        </draw:path>
        <draw:path draw:style-name="gr33" draw:text-style-name="P34" draw:layer="layout" svg:width="3.889cm" svg:height="0.608cm" svg:x="1.455cm" svg:y="13.705cm" svg:viewBox="0 0 3890 609" svg:d="M0 529v-450c0-10 2-20 6-30s10-18 17-26c7-7 16-13 26-17 9-4 20-6 30-6h3732c10 0 20 2 30 6s18 10 26 17c7 8 13 16 17 26s6 20 6 30v450c0 11-2 21-6 30-4 10-10 19-17 27-8 8-16 13-26 17s-20 6-30 6h-3732c-10 0-21-2-30-6-10-4-19-9-26-17s-13-17-17-27c-4-9-6-19-6-30z">
          <text:p/>
        </draw:path>
        <draw:frame draw:style-name="gr20" draw:text-style-name="P21" draw:layer="layout" svg:width="5.798cm" svg:height="0.666cm" svg:x="1.027cm" svg:y="12.931cm">
          <draw:text-box>
            <text:p text:style-name="P3"><text:span text:style-name="T38">CONTRACTS LAYER</text:span></text:p>
          </draw:text-box>
        </draw:frame>
        <draw:frame draw:style-name="gr75" draw:text-style-name="P59" draw:layer="layout" svg:width="2.718cm" svg:height="0.463cm" svg:x="1.562cm" svg:y="13.779cm">
          <draw:text-box>
            <text:p text:style-name="P3"><text:span text:style-name="T58">typing.Protocol</text:span></text:p>
          </draw:text-box>
        </draw:frame>
        <draw:frame draw:style-name="gr18" draw:text-style-name="P19" draw:layer="layout" svg:width="6.87cm" svg:height="0.539cm" svg:x="5.348cm" svg:y="13.719cm">
          <draw:text-box>
            <text:p text:style-name="P3"><text:span text:style-name="T17"><text:s/>defines every module boundary</text:span></text:p>
          </draw:text-box>
        </draw:frame>
        <draw:path draw:style-name="gr17" draw:text-style-name="P18" draw:layer="layout" svg:width="0.159cm" svg:height="0.159cm" svg:x="0.978cm" svg:y="15.213cm" svg:viewBox="0 0 160 160" svg:d="M160 80c0 11-2 21-6 31-4 9-10 18-17 26-7 7-16 13-26 17s-20 6-30 6c-11 0-21-2-31-6s-19-10-26-17c-8-8-13-17-17-26-5-10-7-20-7-31 0-10 2-20 7-30 4-10 9-19 17-27 7-7 16-13 26-17s20-6 31-6c10 0 20 2 30 6s19 10 26 17c7 8 13 17 17 27s6 20 6 30z">
          <text:p/>
        </draw:path>
        <draw:frame draw:style-name="gr18" draw:text-style-name="P19" draw:layer="layout" svg:width="3.811cm" svg:height="0.539cm" svg:x="1.46cm" svg:y="14.354cm">
          <draw:text-box>
            <text:p text:style-name="P3"><text:span text:style-name="T17">via port interfaces</text:span></text:p>
          </draw:text-box>
        </draw:frame>
        <draw:frame draw:style-name="gr18" draw:text-style-name="P19" draw:layer="layout" svg:width="9.955cm" svg:height="0.539cm" svg:x="1.46cm" svg:y="14.989cm">
          <draw:text-box>
            <text:p text:style-name="P3"><text:span text:style-name="T17">Enables the numbered execution flow from the</text:span></text:p>
          </draw:text-box>
        </draw:frame>
        <draw:path draw:style-name="gr8" draw:text-style-name="P9" draw:layer="layout" svg:width="12.329cm" svg:height="3.996cm" svg:x="13.573cm" svg:y="4.206cm" svg:viewBox="0 0 12330 3997" svg:d="M31 31c20-20 45-31 74-31h12119c30 0 55 11 75 31 21 21 31 46 31 75v3785c0 29-10 54-31 75-20 20-45 31-75 31h-12119c-29 0-54-11-74-31-21-21-31-46-31-75v-3785c0-29 10-54 31-75z">
          <text:p/>
        </draw:path>
        <draw:path draw:style-name="gr2" draw:text-style-name="P2" draw:layer="layout" svg:width="12.252cm" svg:height="0.051cm" svg:x="13.621cm" svg:y="4.206cm" svg:viewBox="0 0 12253 52" svg:d="M12234 52c-1 0-1 0-1-1-16-15-35-23-57-23h-12119c-3 0-7 2-10 6l-47-16c17-11 36-18 57-18h12119c30 0 55 12 75 32 1 1 1 1 2 2z">
          <text:p/>
        </draw:path>
        <draw:path draw:style-name="gr2" draw:text-style-name="P2" draw:layer="layout" svg:width="12.252cm" svg:height="0.051cm" svg:x="13.621cm" svg:y="8.151cm" svg:viewBox="0 0 12253 52" svg:d="M47 18c3 4 7 6 10 6h12119c22 0 41-8 57-23 0-1 0-1 1-1l19 18c-1 1-1 1-2 2-20 21-45 32-75 32h-12119c-21 0-40-6-57-18z">
          <text:p/>
        </draw:path>
        <draw:path draw:style-name="gr2" draw:text-style-name="P2" draw:layer="layout" svg:width="0.049cm" svg:height="3.934cm" svg:x="25.853cm" svg:y="4.237cm" svg:viewBox="0 0 50 3935" svg:d="M0 3916c15-16 23-34 23-56v-3785c0-22-8-40-23-56l18-19c21 21 32 46 32 75v3785c0 29-11 54-32 75z">
          <text:p/>
        </draw:path>
        <draw:polygon draw:style-name="gr2" draw:text-style-name="P2" draw:layer="layout" svg:width="12.329cm" svg:height="3.996cm" svg:x="13.573cm" svg:y="4.206cm" svg:viewBox="0 0 12330 3997" draw:points="0,0 12330,0 12330,3997 0,3997">
          <text:p/>
        </draw:polygon>
        <draw:path draw:style-name="gr8" draw:text-style-name="P9" draw:layer="layout" svg:width="12.329cm" svg:height="4.048cm" svg:x="13.573cm" svg:y="8.413cm" svg:viewBox="0 0 12330 4049" svg:d="M31 31c20-20 45-31 74-31h12119c30 0 55 11 75 31 21 21 31 46 31 75v3838c0 29-10 54-31 74-20 21-45 31-75 31h-12119c-29 0-54-10-74-31-21-20-31-45-31-74v-3838c0-29 10-54 31-75z">
          <text:p/>
        </draw:path>
        <draw:path draw:style-name="gr2" draw:text-style-name="P2" draw:layer="layout" svg:width="12.252cm" svg:height="0.051cm" svg:x="13.621cm" svg:y="8.413cm" svg:viewBox="0 0 12253 52" svg:d="M12234 52c-1 0-1-1-1-1-16-16-35-24-57-24h-12119c-3 0-7 3-10 7l-47-17c17-11 36-17 57-17h12119c30 0 55 11 75 32 1 1 1 1 2 2z">
          <text:p/>
        </draw:path>
        <draw:path draw:style-name="gr2" draw:text-style-name="P2" draw:layer="layout" svg:width="12.252cm" svg:height="0.051cm" svg:x="13.621cm" svg:y="12.41cm" svg:viewBox="0 0 12253 52" svg:d="M47 20c3 4 7 6 10 6h12119c22 0 41-8 57-24 0-1 0-1 1-2l19 20c-1 0-1 1-2 1-20 21-45 31-75 31h-12119c-21 0-40-5-57-17z">
          <text:p/>
        </draw:path>
        <draw:path draw:style-name="gr2" draw:text-style-name="P2" draw:layer="layout" svg:width="0.049cm" svg:height="3.986cm" svg:x="25.853cm" svg:y="8.444cm" svg:viewBox="0 0 50 3987" svg:d="M0 3969c15-16 23-35 23-56v-3838c0-22-8-41-23-56l18-19c21 21 32 46 32 75v3838c0 29-11 54-32 74z">
          <text:p/>
        </draw:path>
        <draw:polygon draw:style-name="gr2" draw:text-style-name="P2" draw:layer="layout" svg:width="12.329cm" svg:height="4.048cm" svg:x="13.573cm" svg:y="8.413cm" svg:viewBox="0 0 12330 4049" draw:points="0,0 12330,0 12330,4049 0,4049">
          <text:p/>
        </draw:polygon>
        <draw:path draw:style-name="gr8" draw:text-style-name="P9" draw:layer="layout" svg:width="12.329cm" svg:height="3.995cm" svg:x="13.573cm" svg:y="12.673cm" svg:viewBox="0 0 12330 3996" svg:d="M31 31c20-21 45-31 74-31h12119c30 0 55 10 75 31 21 21 31 46 31 75v3784c0 30-10 55-31 75-20 21-45 31-75 31h-12119c-29 0-54-10-74-31-21-20-31-45-31-75v-3784c0-29 10-54 31-75z">
          <text:p/>
        </draw:path>
        <draw:polygon draw:style-name="gr2" draw:text-style-name="P2" draw:layer="layout" svg:width="12.329cm" svg:height="0.066cm" svg:x="13.573cm" svg:y="12.673cm" svg:viewBox="0 0 12330 67" draw:points="12267,67 0,67 0,0 12330,0 12330,3">
          <text:p/>
        </draw:polygon>
        <draw:path draw:style-name="gr2" draw:text-style-name="P2" draw:layer="layout" svg:width="12.252cm" svg:height="0.051cm" svg:x="13.621cm" svg:y="16.617cm" svg:viewBox="0 0 12253 52" svg:d="M47 19c3 4 7 6 10 6h12119c22 0 41-8 57-23 0-1 0-1 1-2l19 19c-1 0-1 1-2 1-20 22-45 32-75 32h-12119c-21 0-40-5-57-18z">
          <text:p/>
        </draw:path>
        <draw:path draw:style-name="gr2" draw:text-style-name="P2" draw:layer="layout" svg:width="0.049cm" svg:height="3.933cm" svg:x="25.853cm" svg:y="12.704cm" svg:viewBox="0 0 50 3934" svg:d="M0 3916c15-16 23-35 23-57v-3784c0-22-8-41-23-56l18-19c21 21 32 46 32 75v3784c0 30-11 55-32 75z">
          <text:p/>
        </draw:path>
        <draw:polygon draw:style-name="gr2" draw:text-style-name="P2" draw:layer="layout" svg:width="12.329cm" svg:height="3.995cm" svg:x="13.573cm" svg:y="12.673cm" svg:viewBox="0 0 12330 3996" draw:points="0,0 12330,0 12330,3996 0,3996">
          <text:p/>
        </draw:polygon>
        <draw:frame draw:style-name="gr18" draw:text-style-name="P19" draw:layer="layout" svg:width="2.658cm" svg:height="0.539cm" svg:x="1.46cm" svg:y="15.624cm">
          <draw:text-box>
            <text:p text:style-name="P3"><text:span text:style-name="T17">module map</text:span></text:p>
          </draw:text-box>
        </draw:frame>
        <draw:path draw:style-name="gr17" draw:text-style-name="P18" draw:layer="layout" svg:width="0.159cm" svg:height="0.159cm" svg:x="14.049cm" svg:y="5.529cm" svg:viewBox="0 0 160 160" svg:d="M160 81c0 10-2 20-6 30s-10 18-18 26c-7 7-16 13-25 17-10 4-21 6-32 6-10 0-20-2-30-6s-18-10-26-17c-7-8-13-16-17-26s-6-20-6-30c0-12 2-22 6-32 4-9 10-18 17-26 8-7 16-13 26-17s20-6 30-6c11 0 22 2 32 6 9 4 18 10 25 17 8 8 14 17 18 26 4 10 6 20 6 32z">
          <text:p/>
        </draw:path>
        <draw:frame draw:style-name="gr20" draw:text-style-name="P21" draw:layer="layout" svg:width="7.116cm" svg:height="0.666cm" svg:x="14.097cm" svg:y="4.517cm">
          <draw:text-box>
            <text:p text:style-name="P3"><text:span text:style-name="T38">TESTABLE IN ISOLATION</text:span></text:p>
          </draw:text-box>
        </draw:frame>
        <draw:frame draw:style-name="gr18" draw:text-style-name="P19" draw:layer="layout" svg:width="11.429cm" svg:height="0.539cm" svg:x="14.53cm" svg:y="5.306cm">
          <draw:text-box>
            <text:p text:style-name="P3"><text:span text:style-name="T17">Every module exposes a Protocol; mock the port, test</text:span></text:p>
          </draw:text-box>
        </draw:frame>
        <draw:path draw:style-name="gr17" draw:text-style-name="P18" draw:layer="layout" svg:width="0.159cm" svg:height="0.159cm" svg:x="14.049cm" svg:y="6.799cm" svg:viewBox="0 0 160 160" svg:d="M160 81c0 10-2 20-6 30s-10 18-18 26c-7 7-16 13-25 17-10 4-21 6-32 6-10 0-20-2-30-6s-18-10-26-17c-7-8-13-16-17-26s-6-20-6-30c0-12 2-22 6-32 4-9 10-18 17-26 8-7 16-13 26-17s20-6 30-6c11 0 22 2 32 6 9 4 18 10 25 17 8 8 14 17 18 26 4 10 6 20 6 32z">
          <text:p/>
        </draw:path>
        <draw:frame draw:style-name="gr18" draw:text-style-name="P19" draw:layer="layout" svg:width="1.799cm" svg:height="0.539cm" svg:x="14.53cm" svg:y="5.914cm">
          <draw:text-box>
            <text:p text:style-name="P3"><text:span text:style-name="T17">the logic</text:span></text:p>
          </draw:text-box>
        </draw:frame>
        <draw:frame draw:style-name="gr18" draw:text-style-name="P19" draw:layer="layout" svg:width="10.704cm" svg:height="0.539cm" svg:x="14.53cm" svg:y="6.576cm">
          <draw:text-box>
            <text:p text:style-name="P3"><text:span text:style-name="T17">Integration tests verify contract compliance across</text:span></text:p>
          </draw:text-box>
        </draw:frame>
        <draw:frame draw:style-name="gr18" draw:text-style-name="P19" draw:layer="layout" svg:width="2.39cm" svg:height="0.539cm" svg:x="14.53cm" svg:y="7.211cm">
          <draw:text-box>
            <text:p text:style-name="P3"><text:span text:style-name="T17">boundaries</text:span></text:p>
          </draw:text-box>
        </draw:frame>
        <draw:path draw:style-name="gr17" draw:text-style-name="P18" draw:layer="layout" svg:width="0.159cm" svg:height="0.159cm" svg:x="14.049cm" svg:y="9.736cm" svg:viewBox="0 0 160 160" svg:d="M160 80c0 10-2 20-6 30s-10 18-18 26c-7 8-16 14-25 18-10 4-21 6-32 6-10 0-20-2-30-6s-18-10-26-18c-7-8-13-16-17-26s-6-20-6-30c0-11 2-21 6-31s10-18 17-26c8-7 16-13 26-17s20-6 30-6c11 0 22 2 32 6 9 4 18 10 25 17 8 8 14 16 18 26s6 20 6 31z">
          <text:p/>
        </draw:path>
        <draw:frame draw:style-name="gr20" draw:text-style-name="P21" draw:layer="layout" svg:width="6.094cm" svg:height="0.666cm" svg:x="14.097cm" svg:y="8.724cm">
          <draw:text-box>
            <text:p text:style-name="P3"><text:span text:style-name="T38">NO TIGHT COUPLING</text:span></text:p>
          </draw:text-box>
        </draw:frame>
        <draw:path draw:style-name="gr33" draw:text-style-name="P34" draw:layer="layout" svg:width="1.667cm" svg:height="0.609cm" svg:x="16.827cm" svg:y="9.498cm" svg:viewBox="0 0 1668 610" svg:d="M0 529v-450c0-10 2-20 6-30s10-18 17-26c8-7 16-13 26-17s20-6 30-6h1509c11 0 21 2 31 6s18 10 26 17c7 8 13 16 17 26s6 20 6 30v450c0 12-2 22-6 32-4 9-10 18-17 25-8 8-16 13-26 18-10 4-20 6-31 6h-1509c-10 0-20-2-30-6-10-5-18-10-26-18-7-7-13-16-17-25-4-10-6-20-6-32z">
          <text:p/>
        </draw:path>
        <draw:frame draw:style-name="gr18" draw:text-style-name="P19" draw:layer="layout" svg:width="2.604cm" svg:height="0.539cm" svg:x="14.53cm" svg:y="9.513cm">
          <draw:text-box>
            <text:p text:style-name="P3"><text:span text:style-name="T17">UI has zero </text:span></text:p>
          </draw:text-box>
        </draw:frame>
        <draw:frame draw:style-name="gr75" draw:text-style-name="P59" draw:layer="layout" svg:width="1.143cm" svg:height="0.463cm" svg:x="16.931cm" svg:y="9.572cm">
          <draw:text-box>
            <text:p text:style-name="P3"><text:span text:style-name="T58">import</text:span></text:p>
          </draw:text-box>
        </draw:frame>
        <draw:path draw:style-name="gr33" draw:text-style-name="P34" draw:layer="layout" svg:width="1.429cm" svg:height="0.609cm" svg:x="19.658cm" svg:y="9.498cm" svg:viewBox="0 0 1430 610" svg:d="M0 529v-450c0-10 2-20 6-30s10-18 17-26c8-7 16-13 26-17s20-6 30-6h1271c11 0 21 2 31 6s18 10 26 17c7 8 13 16 17 26s6 20 6 30v450c0 12-2 22-6 32-4 9-10 18-17 25-8 8-16 13-26 18-10 4-20 6-31 6h-1271c-10 0-20-2-30-6-10-5-18-10-26-18-7-7-13-16-17-25-4-10-6-20-6-32z">
          <text:p/>
        </draw:path>
        <draw:frame draw:style-name="gr18" draw:text-style-name="P19" draw:layer="layout" svg:width="1.235cm" svg:height="0.539cm" svg:x="18.507cm" svg:y="9.513cm">
          <draw:text-box>
            <text:p text:style-name="P3"><text:span text:style-name="T17"><text:s/>from </text:span></text:p>
          </draw:text-box>
        </draw:frame>
        <draw:frame draw:style-name="gr75" draw:text-style-name="P59" draw:layer="layout" svg:width="1.03cm" svg:height="0.463cm" svg:x="19.765cm" svg:y="9.572cm">
          <draw:text-box>
            <text:p text:style-name="P3"><text:span text:style-name="T58">agent</text:span></text:p>
          </draw:text-box>
        </draw:frame>
        <draw:path draw:style-name="gr17" draw:text-style-name="P18" draw:layer="layout" svg:width="0.159cm" svg:height="0.159cm" svg:x="14.049cm" svg:y="10.371cm" svg:viewBox="0 0 160 160" svg:d="M160 80c0 10-2 20-6 30s-10 18-18 27c-7 7-16 13-25 17-10 4-21 6-32 6-10 0-20-2-30-6s-18-10-26-17c-7-9-13-17-17-27s-6-20-6-30c0-11 2-21 6-31s10-18 17-26c8-7 16-13 26-17s20-6 30-6c11 0 22 2 32 6 9 4 18 10 25 17 8 8 14 16 18 26s6 20 6 31z">
          <text:p/>
        </draw:path>
        <draw:frame draw:style-name="gr18" draw:text-style-name="P19" draw:layer="layout" svg:width="1.719cm" svg:height="0.539cm" svg:x="21.096cm" svg:y="9.513cm">
          <draw:text-box>
            <text:p text:style-name="P3"><text:span text:style-name="T17"><text:s/>module</text:span></text:p>
          </draw:text-box>
        </draw:frame>
        <draw:path draw:style-name="gr33" draw:text-style-name="P34" draw:layer="layout" svg:width="1.666cm" svg:height="0.582cm" svg:x="18.018cm" svg:y="10.16cm" svg:viewBox="0 0 1667 583" svg:d="M0 503v-423c0-11 2-21 6-31 4-9 9-18 17-26 7-8 16-13 26-17 9-4 19-6 30-6h1509c11 0 21 2 30 6 10 4 19 9 26 17 8 8 13 17 17 26 4 10 6 20 6 31v423c0 11-2 21-6 31-4 9-9 18-17 25-7 8-16 13-26 18-9 4-19 6-30 6h-1509c-11 0-21-2-30-6-10-5-19-10-26-18-8-7-13-16-17-25-4-10-6-20-6-31z">
          <text:p/>
        </draw:path>
        <draw:frame draw:style-name="gr18" draw:text-style-name="P19" draw:layer="layout" svg:width="3.892cm" svg:height="0.539cm" svg:x="14.53cm" svg:y="10.148cm">
          <draw:text-box>
            <text:p text:style-name="P3"><text:span text:style-name="T17">Agents have zero </text:span></text:p>
          </draw:text-box>
        </draw:frame>
        <draw:frame draw:style-name="gr75" draw:text-style-name="P59" draw:layer="layout" svg:width="1.143cm" svg:height="0.463cm" svg:x="18.117cm" svg:y="10.233cm">
          <draw:text-box>
            <text:p text:style-name="P3"><text:span text:style-name="T58">import</text:span></text:p>
          </draw:text-box>
        </draw:frame>
        <draw:path draw:style-name="gr33" draw:text-style-name="P34" draw:layer="layout" svg:width="1.428cm" svg:height="0.582cm" svg:x="20.849cm" svg:y="10.16cm" svg:viewBox="0 0 1429 583" svg:d="M0 503v-423c0-11 2-21 6-31 4-9 9-18 17-26 7-8 16-13 26-17 9-4 20-6 30-6h1271c11 0 21 2 30 6 10 4 19 9 26 17 8 8 13 17 17 26 4 10 6 20 6 31v423c0 11-2 21-6 31-4 9-9 18-17 25-7 8-16 13-26 18-9 4-19 6-30 6h-1271c-10 0-21-2-30-6-10-5-19-10-26-18-8-7-13-16-17-25-4-10-6-20-6-31z">
          <text:p/>
        </draw:path>
        <draw:frame draw:style-name="gr18" draw:text-style-name="P19" draw:layer="layout" svg:width="1.235cm" svg:height="0.539cm" svg:x="19.693cm" svg:y="10.148cm">
          <draw:text-box>
            <text:p text:style-name="P3"><text:span text:style-name="T17"><text:s/>from </text:span></text:p>
          </draw:text-box>
        </draw:frame>
        <draw:frame draw:style-name="gr75" draw:text-style-name="P59" draw:layer="layout" svg:width="0.869cm" svg:height="0.463cm" svg:x="20.952cm" svg:y="10.233cm">
          <draw:text-box>
            <text:p text:style-name="P3"><text:span text:style-name="T58">tools</text:span></text:p>
          </draw:text-box>
        </draw:frame>
        <draw:path draw:style-name="gr33" draw:text-style-name="P34" draw:layer="layout" svg:width="2.408cm" svg:height="0.582cm" svg:x="22.912cm" svg:y="10.16cm" svg:viewBox="0 0 2409 583" svg:d="M0 503v-423c0-11 2-21 6-31 4-9 10-18 18-26 7-8 16-13 25-17 10-4 20-6 31-6h2249c10 0 20 2 30 6 11 4 19 9 27 17 7 8 13 17 17 26 4 10 6 20 6 31v423c0 11-2 21-6 31-4 9-10 18-17 25-8 8-16 13-27 18-10 4-20 6-30 6h-2249c-11 0-21-2-31-6-9-5-18-10-25-18-8-7-14-16-18-25-4-10-6-20-6-31z">
          <text:p/>
        </draw:path>
        <draw:frame draw:style-name="gr18" draw:text-style-name="P19" draw:layer="layout" svg:width="0.699cm" svg:height="0.539cm" svg:x="22.282cm" svg:y="10.148cm">
          <draw:text-box>
            <text:p text:style-name="P3"><text:span text:style-name="T17"><text:s/>or </text:span></text:p>
          </draw:text-box>
        </draw:frame>
        <draw:path draw:style-name="gr17" draw:text-style-name="P18" draw:layer="layout" svg:width="0.159cm" svg:height="0.158cm" svg:x="14.049cm" svg:y="11.033cm" svg:viewBox="0 0 160 159" svg:d="M160 79c0 10-2 21-6 31s-10 19-18 26c-7 8-16 13-25 17-10 4-21 6-32 6-10 0-20-2-30-6s-18-9-26-17c-7-7-13-16-17-26s-6-21-6-31c0-11 2-21 6-30 4-10 10-19 17-26 8-8 16-13 26-17s20-6 30-6c11 0 22 2 32 6 9 4 18 9 25 17 8 7 14 16 18 26 4 9 6 19 6 30z">
          <text:p/>
        </draw:path>
        <draw:frame draw:style-name="gr75" draw:text-style-name="P59" draw:layer="layout" svg:width="1.691cm" svg:height="0.463cm" svg:x="23.006cm" svg:y="10.233cm">
          <draw:text-box>
            <text:p text:style-name="P3"><text:span text:style-name="T58">providers</text:span></text:p>
          </draw:text-box>
        </draw:frame>
        <draw:path draw:style-name="gr17" draw:text-style-name="P18" draw:layer="layout" svg:width="0.159cm" svg:height="0.159cm" svg:x="14.049cm" svg:y="11.694cm" svg:viewBox="0 0 160 160" svg:d="M160 80c0 11-2 21-6 31s-10 18-18 26c-7 7-16 13-25 17-10 4-21 6-32 6-10 0-20-2-30-6s-18-10-26-17c-7-8-13-16-17-26s-6-20-6-31 2-21 6-31 10-18 17-26c8-7 16-13 26-17s20-6 30-6c11 0 22 2 32 6 9 4 18 10 25 17 8 8 14 16 18 26s6 20 6 31z">
          <text:p/>
        </draw:path>
        <draw:frame draw:style-name="gr18" draw:text-style-name="P19" draw:layer="layout" svg:width="11.24cm" svg:height="0.539cm" svg:x="14.53cm" svg:y="10.809cm">
          <draw:text-box>
            <text:p text:style-name="P3"><text:span text:style-name="T17">Compile-time safety via Protocol structural subtyping</text:span></text:p>
          </draw:text-box>
        </draw:frame>
        <draw:frame draw:style-name="gr18" draw:text-style-name="P19" draw:layer="layout" svg:width="11.592cm" svg:height="0.539cm" svg:x="14.53cm" svg:y="11.47cm">
          <draw:text-box>
            <text:p text:style-name="P3"><text:span text:style-name="T17">No dependencies on other modules, only on Protocols</text:span></text:p>
          </draw:text-box>
        </draw:frame>
        <draw:path draw:style-name="gr17" draw:text-style-name="P18" draw:layer="layout" svg:width="0.159cm" svg:height="0.159cm" svg:x="14.049cm" svg:y="13.996cm" svg:viewBox="0 0 160 160" svg:d="M160 79c0 11-2 21-6 31-4 9-10 18-18 25-7 8-16 15-25 19-10 4-21 6-32 6-10 0-20-2-30-6s-18-11-26-19c-7-7-13-16-17-25-4-10-6-20-6-31 0-10 2-20 6-30s10-18 17-26c8-7 16-13 26-17s20-6 30-6c11 0 22 2 32 6 9 4 18 10 25 17 8 8 14 16 18 26s6 20 6 30z">
          <text:p/>
        </draw:path>
        <draw:frame draw:style-name="gr20" draw:text-style-name="P21" draw:layer="layout" svg:width="7.644cm" svg:height="0.666cm" svg:x="14.097cm" svg:y="12.984cm">
          <draw:text-box>
            <text:p text:style-name="P3"><text:span text:style-name="T38">PARALLEL DEVELOPMENT</text:span></text:p>
          </draw:text-box>
        </draw:frame>
        <draw:frame draw:style-name="gr18" draw:text-style-name="P19" draw:layer="layout" svg:width="9.364cm" svg:height="0.539cm" svg:x="14.53cm" svg:y="13.772cm">
          <draw:text-box>
            <text:p text:style-name="P3"><text:span text:style-name="T17">UI team, agent team, and tooling team work</text:span></text:p>
          </draw:text-box>
        </draw:frame>
        <draw:path draw:style-name="gr17" draw:text-style-name="P18" draw:layer="layout" svg:width="0.159cm" svg:height="0.159cm" svg:x="14.049cm" svg:y="15.266cm" svg:viewBox="0 0 160 160" svg:d="M160 79c0 11-2 21-6 31-4 9-10 18-18 25-7 9-16 15-25 19-10 4-21 6-32 6-10 0-20-2-30-6s-18-10-26-19c-7-7-13-16-17-25-4-10-6-20-6-31 0-10 2-20 6-30s10-18 17-26c8-7 16-13 26-17s20-6 30-6c11 0 22 2 32 6 9 4 18 10 25 17 8 8 14 16 18 26s6 20 6 30z">
          <text:p/>
        </draw:path>
        <draw:frame draw:style-name="gr18" draw:text-style-name="P19" draw:layer="layout" svg:width="8.668cm" svg:height="0.539cm" svg:x="14.53cm" svg:y="14.407cm">
          <draw:text-box>
            <text:p text:style-name="P3"><text:span text:style-name="T17">independently behind protocol interfaces</text:span></text:p>
          </draw:text-box>
        </draw:frame>
        <draw:frame draw:style-name="gr18" draw:text-style-name="P19" draw:layer="layout" svg:width="10.169cm" svg:height="0.539cm" svg:x="14.53cm" svg:y="15.042cm">
          <draw:text-box>
            <text:p text:style-name="P3"><text:span text:style-name="T17">Contracts serve as the shared agreement — no</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7.327cm" svg:height="0.539cm" svg:x="14.53cm" svg:y="15.677cm">
          <draw:text-box>
            <text:p text:style-name="P3"><text:span text:style-name="T17">coordination overhead per change</text:span></text:p>
          </draw:text-box>
        </draw:frame>
        <draw:frame draw:style-name="gr7" draw:text-style-name="P8" draw:layer="layout" svg:width="0.412cm" svg:height="0.412cm" svg:x="25.617cm" svg:y="18.503cm">
          <draw:text-box>
            <text:p text:style-name="P3"><text:span text:style-name="T6">18</text:span></text:p>
          </draw:text-box>
        </draw:frame>
      </draw:page>
      <draw:page draw:name="page19"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14.382cm" svg:height="1.119cm" svg:x="5.512cm" svg:y="9.519cm">
          <draw:text-box>
            <text:p text:style-name="P3"><text:span text:style-name="T11">LAYER &amp; MODULE DEEP DIVE</text:span></text:p>
          </draw:text-box>
        </draw:frame>
        <draw:frame draw:style-name="gr15" draw:text-style-name="P16" draw:layer="layout" svg:width="4.122cm" svg:height="4.137cm" svg:x="10.98cm" svg:y="6.517cm">
          <draw:text-box>
            <text:p text:style-name="P3"><text:span text:style-name="T12">04</text:span></text:p>
          </draw:text-box>
        </draw:frame>
        <draw:polygon draw:style-name="gr6" draw:text-style-name="P7" draw:layer="layout" svg:width="0.714cm" svg:height="0.635cm" svg:x="25.479cm" svg:y="18.388cm" svg:viewBox="0 0 715 636" draw:points="0,0 715,0 715,636 0,636">
          <text:p/>
        </draw:polygon>
        <draw:frame draw:style-name="gr16" draw:text-style-name="P17" draw:layer="layout" svg:width="11.036cm" svg:height="0.827cm" svg:x="8.074cm" svg:y="11.077cm">
          <draw:text-box>
            <text:p text:style-name="P3"><text:span text:style-name="T13">From the TUI to the Tool Runtime</text:span></text:p>
          </draw:text-box>
        </draw:frame>
        <draw:frame draw:style-name="gr7" draw:text-style-name="P8" draw:layer="layout" svg:width="0.412cm" svg:height="0.412cm" svg:x="25.617cm" svg:y="18.503cm">
          <draw:text-box>
            <text:p text:style-name="P3"><text:span text:style-name="T6">19</text:span></text:p>
          </draw:text-box>
        </draw:frame>
      </draw:page>
      <draw:page draw:name="page20"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33cm" svg:height="5.318cm" svg:x="0.502cm" svg:y="7.752cm" svg:viewBox="0 0 12331 5319" svg:d="M31 31c21-21 46-31 75-31h12119c29 0 54 10 75 31 20 20 31 45 31 75v5107c0 29-11 54-31 75-21 21-46 31-75 31h-12119c-29 0-54-10-75-31-20-21-31-46-31-75v-5107c0-30 11-55 31-75z">
          <text:p/>
        </draw:path>
        <draw:path draw:style-name="gr2" draw:text-style-name="P2" draw:layer="layout" svg:width="12.252cm" svg:height="0.051cm" svg:x="0.55cm" svg:y="7.752cm" svg:viewBox="0 0 12253 52" svg:d="M12234 52c0-1 0-1-1-2-15-15-34-23-56-23h-12119c-4 0-7 2-10 6l-48-16c17-12 36-17 58-17h12119c29 0 54 10 75 32l1 1z">
          <text:p/>
        </draw:path>
        <draw:path draw:style-name="gr2" draw:text-style-name="P2" draw:layer="layout" svg:width="12.252cm" svg:height="0.051cm" svg:x="0.55cm" svg:y="13.019cm" svg:viewBox="0 0 12253 52" svg:d="M48 19c3 4 6 6 10 6h12119c22 0 41-7 56-24 1 0 1-1 1-1l19 20c0 0-1 0-1 1-21 21-46 31-75 31h-12119c-22 0-41-6-58-17z">
          <text:p/>
        </draw:path>
        <draw:path draw:style-name="gr2" draw:text-style-name="P2" draw:layer="layout" svg:width="0.05cm" svg:height="5.256cm" svg:x="12.782cm" svg:y="7.783cm" svg:viewBox="0 0 51 5257" svg:d="M0 5238c16-15 23-34 23-56v-5107c0-22-7-41-23-57l19-18c21 20 32 45 32 75v5107c0 29-11 54-32 75z">
          <text:p/>
        </draw:path>
        <draw:polygon draw:style-name="gr2" draw:text-style-name="P2" draw:layer="layout" svg:width="12.33cm" svg:height="5.318cm" svg:x="0.502cm" svg:y="7.752cm" svg:viewBox="0 0 12331 5319" draw:points="0,0 12331,0 12331,5319 0,5319">
          <text:p/>
        </draw:polygon>
        <draw:frame draw:style-name="gr9" draw:text-style-name="P10" draw:layer="layout" svg:width="8.275cm" svg:height="1.119cm" svg:x="8.945cm" svg:y="4.598cm">
          <draw:text-box>
            <text:p text:style-name="P3"><text:span text:style-name="T7">LAYER 1: UI &amp; UX</text:span></text:p>
          </draw:text-box>
        </draw:frame>
        <draw:frame draw:style-name="gr13" draw:text-style-name="P14" draw:layer="layout" svg:width="11.296cm" svg:height="0.454cm" svg:x="0.503cm" svg:y="6.696cm">
          <draw:text-box>
            <text:p text:style-name="P3"><text:span text:style-name="T35">What:</text:span><text:span text:style-name="T10"> Pure presentation layer on Textual. </text:span><text:span text:style-name="T59">Zero business logic.</text:span></text:p>
          </draw:text-box>
        </draw:frame>
        <draw:path draw:style-name="gr17" draw:text-style-name="P18" draw:layer="layout" svg:width="0.159cm" svg:height="0.158cm" svg:x="0.978cm" svg:y="9.075cm" svg:viewBox="0 0 160 159" svg:d="M160 80c0 11-2 21-6 30-4 10-10 19-17 26-7 8-16 13-26 17s-20 6-30 6c-11 0-21-2-31-6s-19-9-26-17c-8-7-13-16-17-26-5-9-7-19-7-30 0-10 2-21 7-30 4-10 9-19 17-26 7-8 16-13 26-18 10-4 20-6 31-6 10 0 20 2 30 6 10 5 19 10 26 18 7 7 13 16 17 26 4 9 6 20 6 30z">
          <text:p/>
        </draw:path>
        <draw:path draw:style-name="gr33" draw:text-style-name="P34" draw:layer="layout" svg:width="2.169cm" svg:height="0.582cm" svg:x="1.455cm" svg:y="8.863cm" svg:viewBox="0 0 2170 583" svg:d="M0 504v-425c0-10 2-20 6-30s10-18 17-26c7-7 16-13 26-17 9-4 20-6 30-6h2012c10 0 21 2 30 6 10 4 19 10 26 17 7 8 13 16 17 26s6 20 6 30v425c0 10-2 20-6 30s-10 18-17 26c-7 7-16 13-26 17-9 4-20 6-30 6h-2012c-10 0-21-2-30-6-10-4-19-10-26-17-7-8-13-16-17-26s-6-20-6-30z">
          <text:p/>
        </draw:path>
        <draw:frame draw:style-name="gr20" draw:text-style-name="P21" draw:layer="layout" svg:width="4.283cm" svg:height="0.666cm" svg:x="1.027cm" svg:y="8.063cm">
          <draw:text-box>
            <text:p text:style-name="P3"><text:span text:style-name="T38">KEY MODULES</text:span></text:p>
          </draw:text-box>
        </draw:frame>
        <draw:frame draw:style-name="gr75" draw:text-style-name="P59" draw:layer="layout" svg:width="1.851cm" svg:height="0.463cm" svg:x="1.562cm" svg:y="8.937cm">
          <draw:text-box>
            <text:p text:style-name="P3"><text:span text:style-name="T58">CorgeApp</text:span></text:p>
          </draw:text-box>
        </draw:frame>
        <draw:path draw:style-name="gr17" draw:text-style-name="P18" draw:layer="layout" svg:width="0.159cm" svg:height="0.159cm" svg:x="0.978cm" svg:y="9.736cm" svg:viewBox="0 0 160 160" svg:d="M160 80c0 10-2 20-6 30s-10 18-17 26-16 14-26 18-20 6-30 6c-11 0-21-2-31-6s-19-10-26-18c-8-8-13-16-17-26-5-10-7-20-7-30 0-11 2-21 7-31 4-10 9-18 17-26 7-7 16-13 26-17s20-6 31-6c10 0 20 2 30 6s19 10 26 17c7 8 13 16 17 26s6 20 6 31z">
          <text:p/>
        </draw:path>
        <draw:path draw:style-name="gr33" draw:text-style-name="P34" draw:layer="layout" svg:width="5.133cm" svg:height="0.609cm" svg:x="1.455cm" svg:y="9.498cm" svg:viewBox="0 0 5134 610" svg:d="M0 529v-450c0-10 2-20 6-30s10-18 17-26c7-7 16-13 26-17 9-4 20-6 30-6h4975c11 0 21 2 31 6 9 4 18 10 25 17 8 8 14 16 18 26s6 20 6 30v450c0 12-2 22-6 32-4 9-10 18-18 25-7 8-16 13-25 18-10 4-20 6-31 6h-4975c-10 0-21-2-30-6-10-5-19-10-26-18-7-7-13-16-17-25-4-10-6-20-6-32z">
          <text:p/>
        </draw:path>
        <draw:frame draw:style-name="gr18" draw:text-style-name="P19" draw:layer="layout" svg:width="4.24cm" svg:height="0.539cm" svg:x="3.629cm" svg:y="8.851cm">
          <draw:text-box>
            <text:p text:style-name="P3"><text:span text:style-name="T17"><text:s/>— Main application</text:span></text:p>
          </draw:text-box>
        </draw:frame>
        <draw:frame draw:style-name="gr75" draw:text-style-name="P59" draw:layer="layout" svg:width="3.882cm" svg:height="0.463cm" svg:x="1.562cm" svg:y="9.572cm">
          <draw:text-box>
            <text:p text:style-name="P3"><text:span text:style-name="T58">DirectorySelectorApp</text:span></text:p>
          </draw:text-box>
        </draw:frame>
        <draw:frame draw:style-name="gr18" draw:text-style-name="P19" draw:layer="layout" svg:width="4.857cm" svg:height="0.539cm" svg:x="6.576cm" svg:y="9.513cm">
          <draw:text-box>
            <text:p text:style-name="P3"><text:span text:style-name="T17"><text:s/>— Keyboard-first repo</text:span></text:p>
          </draw:text-box>
        </draw:frame>
        <draw:path draw:style-name="gr17" draw:text-style-name="P18" draw:layer="layout" svg:width="0.159cm" svg:height="0.159cm" svg:x="0.978cm" svg:y="11.006cm" svg:viewBox="0 0 160 160" svg:d="M160 80c0 10-2 20-6 30s-10 18-17 27c-7 7-16 13-26 17s-20 6-30 6c-11 0-21-2-31-6s-19-10-26-17c-8-9-13-17-17-27-5-10-7-20-7-30 0-11 2-21 7-31 4-10 9-18 17-26 7-7 16-13 26-17s20-6 31-6c10 0 20 2 30 6s19 10 26 17c7 8 13 16 17 26s6 20 6 31z">
          <text:p/>
        </draw:path>
        <draw:path draw:style-name="gr33" draw:text-style-name="P34" draw:layer="layout" svg:width="3.148cm" svg:height="0.609cm" svg:x="1.455cm" svg:y="10.768cm" svg:viewBox="0 0 3149 610" svg:d="M0 530v-451c0-10 2-20 6-30s10-18 17-26c7-7 16-13 26-17 9-4 20-6 30-6h2991c10 0 21 2 30 6 10 4 19 10 26 17 7 8 13 16 17 26s6 20 6 30v451c0 11-2 21-6 31-4 9-10 18-17 25-7 8-16 13-26 17-9 5-20 7-30 7h-2991c-10 0-21-2-30-6-10-4-19-10-26-18-7-7-13-16-17-25-4-10-6-20-6-31z">
          <text:p/>
        </draw:path>
        <draw:frame draw:style-name="gr18" draw:text-style-name="P19" draw:layer="layout" svg:width="1.289cm" svg:height="0.539cm" svg:x="1.46cm" svg:y="10.148cm">
          <draw:text-box>
            <text:p text:style-name="P3"><text:span text:style-name="T17">picker</text:span></text:p>
          </draw:text-box>
        </draw:frame>
        <draw:frame draw:style-name="gr75" draw:text-style-name="P59" draw:layer="layout" svg:width="2.695cm" svg:height="0.463cm" svg:x="1.562cm" svg:y="10.842cm">
          <draw:text-box>
            <text:p text:style-name="P3"><text:span text:style-name="T58">CanvasScreen</text:span></text:p>
          </draw:text-box>
        </draw:frame>
        <draw:path draw:style-name="gr17" draw:text-style-name="P18" draw:layer="layout" svg:width="0.159cm" svg:height="0.158cm" svg:x="0.978cm" svg:y="11.668cm" svg:viewBox="0 0 160 159" svg:d="M160 79c0 10-2 21-6 31s-10 19-17 26c-7 8-16 13-26 17s-20 6-30 6c-11 0-21-2-31-6s-19-9-26-17c-8-7-13-16-17-26-5-10-7-21-7-31 0-11 2-21 7-30 4-10 9-19 17-26 7-8 16-13 26-17s20-6 31-6c10 0 20 2 30 6s19 9 26 17c7 7 13 16 17 26 4 9 6 19 6 30z">
          <text:p/>
        </draw:path>
        <draw:path draw:style-name="gr33" draw:text-style-name="P34" draw:layer="layout" svg:width="5.371cm" svg:height="0.582cm" svg:x="1.455cm" svg:y="11.43cm" svg:viewBox="0 0 5372 583" svg:d="M0 503v-424c0-11 2-21 6-31 4-9 10-18 17-25 7-8 16-13 26-18 9-4 20-5 30-5h5213c11 0 21 2 31 6 9 4 18 9 26 17 7 7 13 16 17 25 4 10 6 20 6 31v424c0 11-2 21-6 31-4 9-10 18-17 25-8 8-17 13-26 18-10 4-20 6-31 6h-5213c-10 0-21-2-30-6-10-5-19-10-26-18-7-7-13-16-17-25-4-10-6-20-6-31z">
          <text:p/>
        </draw:path>
        <draw:frame draw:style-name="gr18" draw:text-style-name="P19" draw:layer="layout" svg:width="4.776cm" svg:height="0.539cm" svg:x="4.611cm" svg:y="10.783cm">
          <draw:text-box>
            <text:p text:style-name="P3"><text:span text:style-name="T17"><text:s/>— Sticky note canvas</text:span></text:p>
          </draw:text-box>
        </draw:frame>
        <draw:frame draw:style-name="gr75" draw:text-style-name="P59" draw:layer="layout" svg:width="3.813cm" svg:height="0.463cm" svg:x="1.562cm" svg:y="11.503cm">
          <draw:text-box>
            <text:p text:style-name="P3"><text:span text:style-name="T58">InteractiveDiffScreen</text:span></text:p>
          </draw:text-box>
        </draw:frame>
        <draw:path draw:style-name="gr17" draw:text-style-name="P18" draw:layer="layout" svg:width="0.159cm" svg:height="0.158cm" svg:x="0.978cm" svg:y="12.303cm" svg:viewBox="0 0 160 159" svg:d="M160 79c0 11-2 22-6 31-4 10-10 19-17 26-7 8-16 13-26 17s-20 6-30 6c-11 0-21-2-31-6s-19-9-26-17c-8-7-13-16-17-26-5-9-7-20-7-31s2-21 7-30c4-10 9-19 17-26 7-8 16-13 26-17s20-6 31-6c10 0 20 2 30 6s19 9 26 17c7 7 13 16 17 26 4 9 6 19 6 30z">
          <text:p/>
        </draw:path>
        <draw:path draw:style-name="gr33" draw:text-style-name="P34" draw:layer="layout" svg:width="3.413cm" svg:height="0.608cm" svg:x="1.455cm" svg:y="12.065cm" svg:viewBox="0 0 3414 609" svg:d="M0 530v-451c0-11 2-21 6-31 4-9 10-18 17-25 7-8 16-13 26-17 9-4 20-6 30-6h3255c11 0 21 1 31 5 10 5 18 10 26 18 7 7 13 16 17 25 4 10 6 20 6 31v451c0 10-2 20-6 30s-10 18-17 26c-8 7-16 13-26 17s-20 6-31 6h-3255c-10 0-21-2-30-6-10-4-19-10-26-17-7-8-13-16-17-26s-6-20-6-30z">
          <text:p/>
        </draw:path>
        <draw:frame draw:style-name="gr18" draw:text-style-name="P19" draw:layer="layout" svg:width="4.938cm" svg:height="0.539cm" svg:x="6.821cm" svg:y="11.444cm">
          <draw:text-box>
            <text:p text:style-name="P3"><text:span text:style-name="T17"><text:s/>— 4-context split pane</text:span></text:p>
          </draw:text-box>
        </draw:frame>
        <draw:frame draw:style-name="gr75" draw:text-style-name="P59" draw:layer="layout" svg:width="2.969cm" svg:height="0.463cm" svg:x="1.562cm" svg:y="12.138cm">
          <draw:text-box>
            <text:p text:style-name="P3"><text:span text:style-name="T58">MessageScreen</text:span></text:p>
          </draw:text-box>
        </draw:frame>
        <draw:path draw:style-name="gr33" draw:text-style-name="P34" draw:layer="layout" svg:width="3.413cm" svg:height="0.608cm" svg:x="5.212cm" svg:y="12.065cm" svg:viewBox="0 0 3414 609" svg:d="M0 530v-451c0-11 2-21 6-31 4-9 10-18 17-25 7-8 16-13 26-17s20-6 30-6h3256c10 0 20 1 30 5 10 5 18 10 26 18 7 7 13 16 17 25 4 10 6 20 6 31v451c0 10-2 20-6 30s-10 18-17 26c-8 7-16 13-26 17s-20 6-30 6h-3256c-10 0-20-2-30-6s-19-10-26-17c-7-8-13-16-17-26s-6-20-6-30z">
          <text:p/>
        </draw:path>
        <draw:frame draw:style-name="gr18" draw:text-style-name="P19" draw:layer="layout" svg:width="0.481cm" svg:height="0.539cm" svg:x="4.857cm" svg:y="12.079cm">
          <draw:text-box>
            <text:p text:style-name="P3"><text:span text:style-name="T17"><text:s/>/ </text:span></text:p>
          </draw:text-box>
        </draw:frame>
        <draw:path draw:style-name="gr8" draw:text-style-name="P9" draw:layer="layout" svg:width="12.329cm" svg:height="5.292cm" svg:x="13.573cm" svg:y="6.376cm" svg:viewBox="0 0 12330 5293" svg:d="M31 31c20-21 45-31 74-31h12119c30 0 55 10 75 31 21 21 31 46 31 75v5081c0 29-10 54-31 75-20 20-45 31-75 31h-12119c-29 0-54-11-74-31-21-21-31-46-31-75v-5081c0-29 10-54 31-75z">
          <text:p/>
        </draw:path>
        <draw:path draw:style-name="gr2" draw:text-style-name="P2" draw:layer="layout" svg:width="12.252cm" svg:height="0.051cm" svg:x="13.621cm" svg:y="6.376cm" svg:viewBox="0 0 12253 52" svg:d="M12234 52c-1 0-1-1-1-1-16-16-35-24-57-24h-12119c-3 0-7 2-10 7l-47-17c17-11 36-17 57-17h12119c30 0 55 10 75 32 1 0 1 1 2 1z">
          <text:p/>
        </draw:path>
        <draw:path draw:style-name="gr2" draw:text-style-name="P2" draw:layer="layout" svg:width="12.252cm" svg:height="0.051cm" svg:x="13.621cm" svg:y="11.617cm" svg:viewBox="0 0 12253 52" svg:d="M47 18c3 4 7 6 10 6h12119c22 0 41-8 57-23 0-1 0-1 1-1l19 18c-1 1-1 1-2 2-20 21-45 32-75 32h-12119c-21 0-40-6-57-18z">
          <text:p/>
        </draw:path>
        <draw:path draw:style-name="gr2" draw:text-style-name="P2" draw:layer="layout" svg:width="0.049cm" svg:height="5.23cm" svg:x="25.853cm" svg:y="6.407cm" svg:viewBox="0 0 50 5231" svg:d="M0 5212c15-16 23-34 23-56v-5081c0-22-8-41-23-56l18-19c21 21 32 46 32 75v5081c0 29-11 54-32 75z">
          <text:p/>
        </draw:path>
        <draw:polygon draw:style-name="gr2" draw:text-style-name="P2" draw:layer="layout" svg:width="12.329cm" svg:height="5.292cm" svg:x="13.573cm" svg:y="6.376cm" svg:viewBox="0 0 12330 5293" draw:points="0,0 12330,0 12330,5293 0,5293">
          <text:p/>
        </draw:polygon>
        <draw:frame draw:style-name="gr75" draw:text-style-name="P59" draw:layer="layout" svg:width="2.74cm" svg:height="0.463cm" svg:x="5.321cm" svg:y="12.138cm">
          <draw:text-box>
            <text:p text:style-name="P3"><text:span text:style-name="T58">ConfirmScreen</text:span></text:p>
          </draw:text-box>
        </draw:frame>
        <draw:path draw:style-name="gr17" draw:text-style-name="P18" draw:layer="layout" svg:width="0.159cm" svg:height="0.159cm" svg:x="14.049cm" svg:y="7.699cm" svg:viewBox="0 0 160 160" svg:d="M160 79c0 11-2 21-6 31-4 9-10 19-18 26-7 8-16 13-25 18-10 4-21 6-32 6-10 0-20-2-30-6-10-5-18-10-26-18-7-7-13-17-17-26-4-10-6-20-6-31 0-10 2-20 6-30s10-18 17-26c8-7 16-13 26-17s20-6 30-6c11 0 22 2 32 6 9 4 18 10 25 17 8 8 14 16 18 26s6 20 6 30z">
          <text:p/>
        </draw:path>
        <draw:frame draw:style-name="gr20" draw:text-style-name="P21" draw:layer="layout" svg:width="5.963cm" svg:height="0.666cm" svg:x="14.097cm" svg:y="6.687cm">
          <draw:text-box>
            <text:p text:style-name="P3"><text:span text:style-name="T38">DESIGN PRINCIPLES</text:span></text:p>
          </draw:text-box>
        </draw:frame>
        <draw:path draw:style-name="gr17" draw:text-style-name="P18" draw:layer="layout" svg:width="0.159cm" svg:height="0.159cm" svg:x="14.049cm" svg:y="8.334cm" svg:viewBox="0 0 160 160" svg:d="M160 79c0 11-2 21-6 31s-10 19-18 26c-7 8-16 13-25 18-10 4-21 6-32 6-10 0-20-2-30-6-10-5-18-10-26-18-7-7-13-16-17-26s-6-20-6-31c0-10 2-20 6-30s10-18 17-26c8-7 16-13 26-17s20-6 30-6c11 0 22 2 32 6 9 4 18 10 25 17 8 8 14 16 18 26s6 20 6 30z">
          <text:p/>
        </draw:path>
        <draw:path draw:style-name="gr33" draw:text-style-name="P34" draw:layer="layout" svg:width="1.693cm" svg:height="0.608cm" svg:x="14.525cm" svg:y="8.096cm" svg:viewBox="0 0 1694 609" svg:d="M0 530v-451c0-10 2-21 6-30 4-10 10-19 17-26 8-7 16-13 26-17s20-6 30-6h1536c11 0 21 2 30 6 10 4 19 10 26 17 8 7 13 16 17 26 4 9 6 20 6 30v451c0 10-2 21-6 30-4 10-9 19-17 26-7 7-16 13-26 17-9 4-19 6-30 6h-1536c-10 0-20-2-30-6s-18-10-26-17c-7-7-13-16-17-26-4-9-6-20-6-30z">
          <text:p/>
        </draw:path>
        <draw:frame draw:style-name="gr18" draw:text-style-name="P19" draw:layer="layout" svg:width="7.674cm" svg:height="0.539cm" svg:x="14.53cm" svg:y="7.475cm">
          <draw:text-box>
            <text:p text:style-name="P3"><text:span text:style-name="T17">Keyboard-first: auto-focus on mount</text:span></text:p>
          </draw:text-box>
        </draw:frame>
        <draw:frame draw:style-name="gr75" draw:text-style-name="P59" draw:layer="layout" svg:width="1.177cm" svg:height="0.463cm" svg:x="14.632cm" svg:y="8.169cm">
          <draw:text-box>
            <text:p text:style-name="P3"><text:span text:style-name="T58">Ctrl+D</text:span></text:p>
          </draw:text-box>
        </draw:frame>
        <draw:path draw:style-name="gr33" draw:text-style-name="P34" draw:layer="layout" svg:width="1.667cm" svg:height="0.608cm" svg:x="18.891cm" svg:y="8.096cm" svg:viewBox="0 0 1668 609" svg:d="M0 530v-451c0-10 2-21 6-30 4-10 10-19 17-26s16-13 26-17c9-4 20-6 30-6h1509c11 0 21 2 31 6 9 4 18 10 25 17 8 7 14 16 18 26 4 9 6 20 6 30v451c0 10-2 21-6 30-4 10-10 19-18 26-7 7-16 13-25 17-10 4-20 6-31 6h-1509c-10 0-21-2-30-6-10-4-19-10-26-17s-13-16-17-26c-4-9-6-20-6-30z">
          <text:p/>
        </draw:path>
        <draw:frame draw:style-name="gr18" draw:text-style-name="P19" draw:layer="layout" svg:width="2.933cm" svg:height="0.539cm" svg:x="16.208cm" svg:y="8.11cm">
          <draw:text-box>
            <text:p text:style-name="P3"><text:span text:style-name="T17"><text:s/>= diﬀ toggle, </text:span></text:p>
          </draw:text-box>
        </draw:frame>
        <draw:frame draw:style-name="gr75" draw:text-style-name="P59" draw:layer="layout" svg:width="1.154cm" svg:height="0.463cm" svg:x="18.983cm" svg:y="8.169cm">
          <draw:text-box>
            <text:p text:style-name="P3"><text:span text:style-name="T58">Ctrl+A</text:span></text:p>
          </draw:text-box>
        </draw:frame>
        <draw:path draw:style-name="gr33" draw:text-style-name="P34" draw:layer="layout" svg:width="1.694cm" svg:height="0.608cm" svg:x="22.859cm" svg:y="8.096cm" svg:viewBox="0 0 1695 609" svg:d="M0 530v-451c0-10 3-21 7-30 4-10 9-19 17-26 7-7 16-13 25-17 10-4 20-6 31-6h1534c11 0 21 2 31 6s18 10 26 17c7 7 13 16 17 26 5 9 7 20 7 30v451c0 10-2 21-7 30-4 10-10 19-17 26-8 7-16 13-26 17s-20 6-31 6h-1534c-11 0-21-2-31-6-9-4-18-10-25-17-8-7-13-16-17-26-4-9-7-20-7-30z">
          <text:p/>
        </draw:path>
        <draw:frame draw:style-name="gr18" draw:text-style-name="P19" draw:layer="layout" svg:width="2.564cm" svg:height="0.539cm" svg:x="20.559cm" svg:y="8.11cm">
          <draw:text-box>
            <text:p text:style-name="P3"><text:span text:style-name="T17"><text:s/>= approve, </text:span></text:p>
          </draw:text-box>
        </draw:frame>
        <draw:frame draw:style-name="gr75" draw:text-style-name="P59" draw:layer="layout" svg:width="1.372cm" svg:height="0.463cm" svg:x="22.974cm" svg:y="8.169cm">
          <draw:text-box>
            <text:p text:style-name="P3"><text:span text:style-name="T58">Escape</text:span></text:p>
          </draw:text-box>
        </draw:frame>
        <draw:frame draw:style-name="gr18" draw:text-style-name="P19" draw:layer="layout" svg:width="0.481cm" svg:height="0.539cm" svg:x="24.55cm" svg:y="8.11cm">
          <draw:text-box>
            <text:p text:style-name="P3"><text:span text:style-name="T17"><text:s/>=</text:span></text:p>
          </draw:text-box>
        </draw:frame>
        <draw:path draw:style-name="gr17" draw:text-style-name="P18" draw:layer="layout" svg:width="0.159cm" svg:height="0.159cm" svg:x="14.049cm" svg:y="9.604cm" svg:viewBox="0 0 160 160" svg:d="M160 79c0 11-2 21-6 31s-10 19-18 26c-7 8-16 13-25 18-10 4-21 6-32 6-10 0-20-2-30-6-10-5-18-10-26-18-7-7-13-16-17-26s-6-20-6-31c0-10 2-20 6-30s10-18 17-26c8-7 16-13 26-17s20-6 30-6c11 0 22 2 32 6 9 4 18 10 25 17 8 8 14 16 18 26s6 20 6 30z">
          <text:p/>
        </draw:path>
        <draw:path draw:style-name="gr33" draw:text-style-name="P34" draw:layer="layout" svg:width="4.63cm" svg:height="0.582cm" svg:x="14.525cm" svg:y="9.392cm" svg:viewBox="0 0 4631 583" svg:d="M0 504v-424c0-11 2-21 6-31s10-18 17-26c8-7 16-13 26-17s20-6 30-6h4473c10 0 21 2 30 6 10 4 19 10 26 17 8 8 13 16 17 26s6 20 6 31v424c0 10-2 21-6 30-4 10-9 19-17 26-7 7-16 13-26 17-9 4-20 6-30 6h-4473c-10 0-20-2-30-6s-18-10-26-17c-7-7-13-16-17-26-4-9-6-20-6-30z">
          <text:p/>
        </draw:path>
        <draw:frame draw:style-name="gr18" draw:text-style-name="P19" draw:layer="layout" svg:width="1.182cm" svg:height="0.539cm" svg:x="14.53cm" svg:y="8.745cm">
          <draw:text-box>
            <text:p text:style-name="P3"><text:span text:style-name="T17">reject</text:span></text:p>
          </draw:text-box>
        </draw:frame>
        <draw:frame draw:style-name="gr75" draw:text-style-name="P59" draw:layer="layout" svg:width="3.808cm" svg:height="0.463cm" svg:x="14.632cm" svg:y="9.466cm">
          <draw:text-box>
            <text:p text:style-name="P3"><text:span text:style-name="T58">@work(thread=True)</text:span></text:p>
          </draw:text-box>
        </draw:frame>
        <draw:frame draw:style-name="gr18" draw:text-style-name="P19" draw:layer="layout" svg:width="6.279cm" svg:height="0.539cm" svg:x="19.155cm" svg:y="9.38cm">
          <draw:text-box>
            <text:p text:style-name="P3"><text:span text:style-name="T17"><text:s/>keeps TUI responsive during</text:span></text:p>
          </draw:text-box>
        </draw:frame>
        <draw:path draw:style-name="gr17" draw:text-style-name="P18" draw:layer="layout" svg:width="0.159cm" svg:height="0.159cm" svg:x="14.049cm" svg:y="10.9cm" svg:viewBox="0 0 160 160" svg:d="M160 80c0 11-2 21-6 31s-10 18-18 26c-7 7-16 13-25 17-10 4-21 6-32 6-10 0-20-2-30-6s-18-10-26-17c-7-8-13-16-17-26s-6-20-6-31 2-21 6-31c4-9 10-18 17-25 8-8 16-14 26-18s20-6 30-6c11 0 22 2 32 6 9 4 18 10 25 18 8 7 14 16 18 25 4 10 6 20 6 31z">
          <text:p/>
        </draw:path>
        <draw:frame draw:style-name="gr18" draw:text-style-name="P19" draw:layer="layout" svg:width="2.04cm" svg:height="0.539cm" svg:x="14.53cm" svg:y="10.015cm">
          <draw:text-box>
            <text:p text:style-name="P3"><text:span text:style-name="T17">LLM calls</text:span></text:p>
          </draw:text-box>
        </draw:frame>
        <draw:path draw:style-name="gr76" draw:text-style-name="P60" draw:layer="layout" svg:width="12.2cm" svg:height="3.869cm" svg:x="13.013cm" svg:y="11.455cm" svg:viewBox="0 0 12201 3870" svg:d="M586 530v2541c0 22 8 41 23 56 16 16 35 23 56 23h10876c22 0 40-7 56-23 15-15 23-34 23-56v-2541c0-22-8-41-23-56-16-16-34-23-56-23h-10876c-21 0-40 7-56 23-15 15-23 34-23 56zM0 0h12201v3870h-12201z">
          <text:p/>
        </draw:path>
        <draw:path draw:style-name="gr77" draw:text-style-name="P61" draw:layer="layout" svg:width="11.086cm" svg:height="2.752cm" svg:x="13.573cm" svg:y="11.879cm" svg:viewBox="0 0 11087 2753" svg:d="M0 2647v-2541c0-14 2-27 8-40 5-13 13-25 23-35s21-17 34-23c13-5 26-8 40-8h10876c14 0 27 3 40 8 13 6 25 13 35 23s17 22 23 35c5 13 8 26 8 40v2541c0 14-3 28-8 41-6 13-13 24-23 34s-22 17-35 23c-13 5-26 8-40 8h-10876c-14 0-27-3-40-8-13-6-24-13-34-23s-18-21-23-34c-6-13-8-27-8-41z">
          <text:p/>
        </draw:path>
        <draw:frame draw:style-name="gr18" draw:text-style-name="P19" draw:layer="layout" svg:width="8.586cm" svg:height="0.539cm" svg:x="14.53cm" svg:y="10.677cm">
          <draw:text-box>
            <text:p text:style-name="P3"><text:span text:style-name="T17">Swappable: UI is a view, not a controller</text:span></text:p>
          </draw:text-box>
        </draw:frame>
        <draw:frame draw:style-name="gr78" draw:text-style-name="P43" draw:layer="layout" svg:width="5.094cm" svg:height="0.378cm" svg:x="13.806cm" svg:y="12.081cm">
          <draw:text-box>
            <text:p text:style-name="P3"><text:span text:style-name="T60"># CliUi implements UiPort protocol</text:span></text:p>
          </draw:text-box>
        </draw:frame>
        <draw:frame draw:style-name="gr78" draw:text-style-name="P43" draw:layer="layout" svg:width="1.656cm" svg:height="0.378cm" svg:x="13.806cm" svg:y="12.478cm">
          <draw:text-box>
            <text:p text:style-name="P3"><text:span text:style-name="T60">class CliUi:</text:span></text:p>
          </draw:text-box>
        </draw:frame>
        <draw:frame draw:style-name="gr78" draw:text-style-name="P43" draw:layer="layout" svg:width="5.653cm" svg:height="0.378cm" svg:x="13.806cm" svg:y="12.875cm">
          <draw:text-box>
            <text:p text:style-name="P3"><text:span text:style-name="T60"><text:s text:c="4"/>def request_approval(self, request):</text:span></text:p>
          </draw:text-box>
        </draw:frame>
        <draw:frame draw:style-name="gr78" draw:text-style-name="P43" draw:layer="layout" svg:width="5.969cm" svg:height="0.378cm" svg:x="13.806cm" svg:y="13.271cm">
          <draw:text-box>
            <text:p text:style-name="P3"><text:span text:style-name="T60"><text:s text:c="8"/>return self._app.push_screen_wait(</text:span></text:p>
          </draw:text-box>
        </draw:frame>
        <draw:frame draw:style-name="gr78" draw:text-style-name="P43" draw:layer="layout" svg:width="4.332cm" svg:height="0.378cm" svg:x="13.806cm" svg:y="13.668cm">
          <draw:text-box>
            <text:p text:style-name="P3"><text:span text:style-name="T60"><text:s text:c="12"/>InteractiveDiffScreen(</text:span></text:p>
          </draw:text-box>
        </draw:frame>
        <draw:polygon draw:style-name="gr6" draw:text-style-name="P7" draw:layer="layout" svg:width="0.714cm" svg:height="0.635cm" svg:x="25.479cm" svg:y="18.388cm" svg:viewBox="0 0 715 636" draw:points="0,0 715,0 715,636 0,636">
          <text:p/>
        </draw:polygon>
        <draw:frame draw:style-name="gr78" draw:text-style-name="P43" draw:layer="layout" svg:width="5.899cm" svg:height="0.378cm" svg:x="13.806cm" svg:y="14.065cm">
          <draw:text-box>
            <text:p text:style-name="P3"><text:span text:style-name="T60"><text:s text:c="16"/>title="Approval Required", ...))</text:span></text:p>
          </draw:text-box>
        </draw:frame>
        <draw:frame draw:style-name="gr7" draw:text-style-name="P8" draw:layer="layout" svg:width="0.412cm" svg:height="0.412cm" svg:x="25.617cm" svg:y="18.503cm">
          <draw:text-box>
            <text:p text:style-name="P3"><text:span text:style-name="T6">20</text:span></text:p>
          </draw:text-box>
        </draw:frame>
      </draw:page>
      <draw:page draw:name="page21"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24.659cm" svg:height="4.049cm" svg:x="0.502cm" svg:y="8.598cm" svg:viewBox="0 0 24660 4050" svg:d="M31 31c21-20 46-31 75-31h24449c29 0 54 11 74 31 21 21 31 46 31 75v3838c0 29-10 54-31 75-20 20-45 31-74 31h-24449c-29 0-54-11-75-31-20-21-31-46-31-75v-3838c0-29 11-54 31-75z">
          <text:p/>
        </draw:path>
        <draw:path draw:style-name="gr2" draw:text-style-name="P2" draw:layer="layout" svg:width="24.582cm" svg:height="0.052cm" svg:x="0.55cm" svg:y="8.598cm" svg:viewBox="0 0 24583 53" svg:d="M24564 53c0-1-1-1-1-2-16-16-35-24-56-24h-24449c-4 0-7 2-10 6l-48-16c17-11 36-17 58-17h24449c29 0 54 11 74 31 1 1 1 1 2 2z">
          <text:p/>
        </draw:path>
        <draw:path draw:style-name="gr2" draw:text-style-name="P2" draw:layer="layout" svg:width="24.582cm" svg:height="0.051cm" svg:x="0.55cm" svg:y="12.596cm" svg:viewBox="0 0 24583 52" svg:d="M48 18c3 4 6 6 10 6h24449c21 0 40-8 56-23 0-1 1-1 1-1l19 18c-1 1-1 1-2 2-20 21-45 32-74 32h-24449c-22 0-41-6-58-17z">
          <text:p/>
        </draw:path>
        <draw:path draw:style-name="gr2" draw:text-style-name="P2" draw:layer="layout" svg:width="0.049cm" svg:height="3.987cm" svg:x="25.112cm" svg:y="8.629cm" svg:viewBox="0 0 50 3988" svg:d="M0 3969c16-16 24-34 24-56v-3838c0-22-8-40-24-56l19-19c21 21 31 46 31 75v3838c0 29-10 54-31 75z">
          <text:p/>
        </draw:path>
        <draw:polygon draw:style-name="gr2" draw:text-style-name="P2" draw:layer="layout" svg:width="24.659cm" svg:height="4.049cm" svg:x="0.502cm" svg:y="8.598cm" svg:viewBox="0 0 24660 4050" draw:points="0,0 24660,0 24660,4050 0,4050">
          <text:p/>
        </draw:polygon>
        <draw:path draw:style-name="gr33" draw:text-style-name="P34" draw:layer="layout" svg:width="2.249cm" svg:height="0.503cm" svg:x="6.482cm" svg:y="7.54cm" svg:viewBox="0 0 2250 504" svg:d="M0 424v-344c0-11 2-21 6-31s10-18 17-26c7-7 16-13 26-17s20-6 30-6h2091c11 0 21 2 31 6 9 4 18 10 26 17 7 8 13 16 17 26s6 20 6 31v344c0 11-2 21-6 31-4 9-10 18-17 26-8 7-17 13-26 17-10 4-20 6-31 6h-2091c-10 0-20-2-30-6s-19-10-26-17c-7-8-13-17-17-26-4-10-6-20-6-31z">
          <text:p/>
        </draw:path>
        <draw:frame draw:style-name="gr9" draw:text-style-name="P10" draw:layer="layout" svg:width="22.375cm" svg:height="1.119cm" svg:x="1.386cm" svg:y="5.445cm">
          <draw:text-box>
            <text:p text:style-name="P3"><text:span text:style-name="T7">CANVASSCREEN &amp; STICKY NOTE VALIDATION</text:span></text:p>
          </draw:text-box>
        </draw:frame>
        <draw:frame draw:style-name="gr79" draw:text-style-name="P62" draw:layer="layout" svg:width="1.899cm" svg:height="0.386cm" svg:x="6.562cm" svg:y="7.588cm">
          <draw:text-box>
            <text:p text:style-name="P3"><text:span text:style-name="T61">@node.&lt;id&gt;</text:span></text:p>
          </draw:text-box>
        </draw:frame>
        <draw:frame draw:style-name="gr13" draw:text-style-name="P14" draw:layer="layout" svg:width="11.32cm" svg:height="0.454cm" svg:x="8.725cm" svg:y="7.542cm">
          <draw:text-box>
            <text:p text:style-name="P3"><text:span text:style-name="T10"><text:s/>references validate against the knowledge graph </text:span><text:span text:style-name="T35">as you type</text:span><text:span text:style-name="T10">.</text:span></text:p>
          </draw:text-box>
        </draw:frame>
        <draw:path draw:style-name="gr17" draw:text-style-name="P18" draw:layer="layout" svg:width="0.159cm" svg:height="0.159cm" svg:x="0.978cm" svg:y="9.921cm" svg:viewBox="0 0 160 160" svg:d="M160 80c0 10-2 20-6 30-4 11-10 19-17 27-7 7-16 13-26 17s-20 6-30 6c-11 0-21-2-31-6s-19-10-26-17c-8-8-13-16-17-27-5-10-7-20-7-30 0-11 2-21 7-31 4-9 9-18 17-25 7-8 16-14 26-18s20-6 31-6c10 0 20 2 30 6s19 10 26 18c7 7 13 16 17 25 4 10 6 20 6 31z">
          <text:p/>
        </draw:path>
        <draw:frame draw:style-name="gr20" draw:text-style-name="P21" draw:layer="layout" svg:width="4.415cm" svg:height="0.666cm" svg:x="1.027cm" svg:y="8.909cm">
          <draw:text-box>
            <text:p text:style-name="P3"><text:span text:style-name="T38">KEY BEHAVIOR</text:span></text:p>
          </draw:text-box>
        </draw:frame>
        <draw:path draw:style-name="gr17" draw:text-style-name="P18" draw:layer="layout" svg:width="0.159cm" svg:height="0.159cm" svg:x="0.978cm" svg:y="10.556cm" svg:viewBox="0 0 160 160" svg:d="M160 80c0 10-2 20-6 31-4 10-10 18-17 26-7 7-16 13-26 17s-20 6-30 6c-11 0-21-2-31-6s-19-10-26-17c-8-8-13-16-17-26-5-11-7-21-7-31 0-11 2-21 7-31 4-9 9-18 17-25 7-8 16-14 26-18s20-6 31-6c10 0 20 2 30 6s19 10 26 18c7 7 13 16 17 25 4 10 6 20 6 31z">
          <text:p/>
        </draw:path>
        <draw:frame draw:style-name="gr18" draw:text-style-name="P19" draw:layer="layout" svg:width="11.857cm" svg:height="0.539cm" svg:x="1.46cm" svg:y="9.698cm">
          <draw:text-box>
            <text:p text:style-name="P3"><text:span text:style-name="T17">Validation is </text:span><text:span text:style-name="T16">debounced</text:span><text:span text:style-name="T17"> — fires after user stops typing</text:span></text:p>
          </draw:text-box>
        </draw:frame>
        <draw:path draw:style-name="gr17" draw:text-style-name="P18" draw:layer="layout" svg:width="0.159cm" svg:height="0.159cm" svg:x="0.978cm" svg:y="11.218cm" svg:viewBox="0 0 160 160" svg:d="M160 80c0 11-2 21-6 31-4 9-10 18-17 25-7 8-16 13-26 18-10 4-20 6-30 6-11 0-21-2-31-7-10-4-19-9-26-17-8-7-13-16-17-25-5-10-7-20-7-31s2-21 7-31c4-10 9-19 17-26 7-7 16-13 26-17s20-6 31-6c10 0 20 2 30 6s19 10 26 17 13 16 17 26 6 20 6 31z">
          <text:p/>
        </draw:path>
        <draw:frame draw:style-name="gr18" draw:text-style-name="P19" draw:layer="layout" svg:width="7.084cm" svg:height="0.539cm" svg:x="1.46cm" svg:y="10.333cm">
          <draw:text-box>
            <text:p text:style-name="P3"><text:span text:style-name="T17">Valid reference: accepted silently</text:span></text:p>
          </draw:text-box>
        </draw:frame>
        <draw:path draw:style-name="gr17" draw:text-style-name="P18" draw:layer="layout" svg:width="0.159cm" svg:height="0.159cm" svg:x="0.978cm" svg:y="11.853cm" svg:viewBox="0 0 160 160" svg:d="M160 80c0 11-2 21-6 31-4 9-10 18-17 25-7 8-16 13-26 17s-20 7-30 7c-11 0-21-3-31-7s-19-9-26-17c-8-7-13-16-17-25-5-10-7-20-7-31s2-21 7-31c4-10 9-19 17-26 7-7 16-13 26-17s20-6 31-6c10 0 20 2 30 6s19 10 26 17 13 16 17 26 6 20 6 31z">
          <text:p/>
        </draw:path>
        <draw:frame draw:style-name="gr18" draw:text-style-name="P19" draw:layer="layout" svg:width="8.29cm" svg:height="0.539cm" svg:x="1.46cm" svg:y="10.994cm">
          <draw:text-box>
            <text:p text:style-name="P3"><text:span text:style-name="T17">Invalid reference: visible error indicator</text:span></text:p>
          </draw:text-box>
        </draw:frame>
        <draw:frame draw:style-name="gr18" draw:text-style-name="P19" draw:layer="layout" svg:width="11.535cm" svg:height="0.539cm" svg:x="1.46cm" svg:y="11.629cm">
          <draw:text-box>
            <text:p text:style-name="P3"><text:span text:style-name="T17">Unresolved stickies </text:span><text:span text:style-name="T16">block spec phase advancement</text:span></text:p>
          </draw:text-box>
        </draw:frame>
        <draw:polygon draw:style-name="gr6" draw:text-style-name="P7" draw:layer="layout" svg:width="0.714cm" svg:height="0.635cm" svg:x="25.479cm" svg:y="18.388cm" svg:viewBox="0 0 715 636" draw:points="0,0 715,0 715,636 0,636">
          <text:p/>
        </draw:polygon>
        <draw:frame draw:style-name="gr7" draw:text-style-name="P8" draw:layer="layout" svg:width="13.88cm" svg:height="0.412cm" svg:x="6.431cm" svg:y="12.867cm">
          <draw:text-box>
            <text:p text:style-name="P3"><text:span text:style-name="T36">Turns the canvas from a text dump into a </text:span><text:span text:style-name="T54">live knowledge graph-aware scratchpad</text:span><text:span text:style-name="T36">.</text:span></text:p>
          </draw:text-box>
        </draw:frame>
        <draw:frame draw:style-name="gr7" draw:text-style-name="P8" draw:layer="layout" svg:width="0.412cm" svg:height="0.412cm" svg:x="25.617cm" svg:y="18.503cm">
          <draw:text-box>
            <text:p text:style-name="P3"><text:span text:style-name="T6">21</text:span></text:p>
          </draw:text-box>
        </draw:frame>
      </draw:page>
      <draw:page draw:name="page22" draw:style-name="dp1" draw:master-page-name="master-page3">
        <draw:polygon draw:style-name="gr1" draw:text-style-name="P1" draw:layer="layout" svg:width="26.405cm" svg:height="19.235cm" svg:x="0cm" svg:y="0cm" svg:viewBox="0 0 26406 19236" draw:points="0,0 26406,0 26406,19236 0,19236">
          <text:p/>
        </draw:polygon>
        <draw:polygon draw:style-name="gr2" draw:text-style-name="P2" draw:layer="layout" svg:width="5.001cm" svg:height="0.82cm" svg:x="0.502cm" svg:y="8.281cm" svg:viewBox="0 0 5002 821" draw:points="0,0 5002,0 5002,821 0,821">
          <text:p/>
        </draw:polygon>
        <draw:polygon draw:style-name="gr2" draw:text-style-name="P2" draw:layer="layout" svg:width="4.551cm" svg:height="0.82cm" svg:x="5.503cm" svg:y="8.281cm" svg:viewBox="0 0 4552 821" draw:points="0,0 4552,0 4552,821 0,821">
          <text:p/>
        </draw:polygon>
        <draw:polygon draw:style-name="gr2" draw:text-style-name="P2" draw:layer="layout" svg:width="7.567cm" svg:height="0.82cm" svg:x="10.054cm" svg:y="8.281cm" svg:viewBox="0 0 7568 821" draw:points="0,0 7568,0 7568,821 0,821">
          <text:p/>
        </draw:polygon>
        <draw:polygon draw:style-name="gr2" draw:text-style-name="P2" draw:layer="layout" svg:width="3.439cm" svg:height="0.82cm" svg:x="17.621cm" svg:y="8.281cm" svg:viewBox="0 0 3440 821" draw:points="0,0 3440,0 3440,821 0,821">
          <text:p/>
        </draw:polygon>
        <draw:polygon draw:style-name="gr2" draw:text-style-name="P2" draw:layer="layout" svg:width="4.842cm" svg:height="0.82cm" svg:x="21.06cm" svg:y="8.281cm" svg:viewBox="0 0 4843 821" draw:points="0,0 4843,0 4843,821 0,821">
          <text:p/>
        </draw:polygon>
        <draw:polygon draw:style-name="gr30" draw:text-style-name="P31" draw:layer="layout" svg:width="5.001cm" svg:height="0.794cm" svg:x="0.502cm" svg:y="9.868cm" svg:viewBox="0 0 5002 795" draw:points="0,0 5002,0 5002,795 0,795">
          <text:p/>
        </draw:polygon>
        <draw:polygon draw:style-name="gr30" draw:text-style-name="P31" draw:layer="layout" svg:width="4.551cm" svg:height="0.794cm" svg:x="5.503cm" svg:y="9.868cm" svg:viewBox="0 0 4552 795" draw:points="0,0 4552,0 4552,795 0,795">
          <text:p/>
        </draw:polygon>
        <draw:polygon draw:style-name="gr30" draw:text-style-name="P31" draw:layer="layout" svg:width="7.567cm" svg:height="0.794cm" svg:x="10.054cm" svg:y="9.868cm" svg:viewBox="0 0 7568 795" draw:points="0,0 7568,0 7568,795 0,795">
          <text:p/>
        </draw:polygon>
        <draw:polygon draw:style-name="gr30" draw:text-style-name="P31" draw:layer="layout" svg:width="3.439cm" svg:height="0.794cm" svg:x="17.621cm" svg:y="9.868cm" svg:viewBox="0 0 3440 795" draw:points="0,0 3440,0 3440,795 0,795">
          <text:p/>
        </draw:polygon>
        <draw:polygon draw:style-name="gr30" draw:text-style-name="P31" draw:layer="layout" svg:width="4.842cm" svg:height="0.794cm" svg:x="21.06cm" svg:y="9.868cm" svg:viewBox="0 0 4843 795" draw:points="0,0 4843,0 4843,795 0,795">
          <text:p/>
        </draw:polygon>
        <draw:polygon draw:style-name="gr30" draw:text-style-name="P31" draw:layer="layout" svg:width="5.001cm" svg:height="0.767cm" svg:x="0.502cm" svg:y="11.43cm" svg:viewBox="0 0 5002 768" draw:points="0,0 5002,0 5002,768 0,768">
          <text:p/>
        </draw:polygon>
        <draw:polygon draw:style-name="gr30" draw:text-style-name="P31" draw:layer="layout" svg:width="4.551cm" svg:height="0.767cm" svg:x="5.503cm" svg:y="11.43cm" svg:viewBox="0 0 4552 768" draw:points="0,0 4552,0 4552,768 0,768">
          <text:p/>
        </draw:polygon>
        <draw:polygon draw:style-name="gr30" draw:text-style-name="P31" draw:layer="layout" svg:width="7.567cm" svg:height="0.767cm" svg:x="10.054cm" svg:y="11.43cm" svg:viewBox="0 0 7568 768" draw:points="0,0 7568,0 7568,768 0,768">
          <text:p/>
        </draw:polygon>
        <draw:polygon draw:style-name="gr30" draw:text-style-name="P31" draw:layer="layout" svg:width="3.439cm" svg:height="0.767cm" svg:x="17.621cm" svg:y="11.43cm" svg:viewBox="0 0 3440 768" draw:points="0,0 3440,0 3440,768 0,768">
          <text:p/>
        </draw:polygon>
        <draw:polygon draw:style-name="gr30" draw:text-style-name="P31" draw:layer="layout" svg:width="4.842cm" svg:height="0.767cm" svg:x="21.06cm" svg:y="11.43cm" svg:viewBox="0 0 4843 768" draw:points="0,0 4843,0 4843,768 0,768">
          <text:p/>
        </draw:polygon>
        <draw:polygon draw:style-name="gr1" draw:text-style-name="P1" draw:layer="layout" svg:width="5.001cm" svg:height="0.026cm" svg:x="0.502cm" svg:y="9.075cm" svg:viewBox="0 0 5002 27" draw:points="0,0 5002,0 5002,27 0,27">
          <text:p/>
        </draw:polygon>
        <draw:polygon draw:style-name="gr1" draw:text-style-name="P1" draw:layer="layout" svg:width="4.551cm" svg:height="0.026cm" svg:x="5.503cm" svg:y="9.075cm" svg:viewBox="0 0 4552 27" draw:points="0,0 4552,0 4552,27 0,27">
          <text:p/>
        </draw:polygon>
        <draw:polygon draw:style-name="gr1" draw:text-style-name="P1" draw:layer="layout" svg:width="7.567cm" svg:height="0.026cm" svg:x="10.054cm" svg:y="9.075cm" svg:viewBox="0 0 7568 27" draw:points="0,0 7568,0 7568,27 0,27">
          <text:p/>
        </draw:polygon>
        <draw:polygon draw:style-name="gr1" draw:text-style-name="P1" draw:layer="layout" svg:width="3.439cm" svg:height="0.026cm" svg:x="17.621cm" svg:y="9.075cm" svg:viewBox="0 0 3440 27" draw:points="0,0 3440,0 3440,27 0,27">
          <text:p/>
        </draw:polygon>
        <draw:polygon draw:style-name="gr1" draw:text-style-name="P1" draw:layer="layout" svg:width="4.842cm" svg:height="0.026cm" svg:x="21.06cm" svg:y="9.075cm" svg:viewBox="0 0 4843 27" draw:points="0,0 4843,0 4843,27 0,27">
          <text:p/>
        </draw:polygon>
        <draw:polygon draw:style-name="gr31" draw:text-style-name="P32" draw:layer="layout" svg:width="5.001cm" svg:height="0.027cm" svg:x="0.502cm" svg:y="9.868cm" svg:viewBox="0 0 5002 28" draw:points="0,0 5002,0 5002,28 0,28">
          <text:p/>
        </draw:polygon>
        <draw:polygon draw:style-name="gr31" draw:text-style-name="P32" draw:layer="layout" svg:width="4.551cm" svg:height="0.027cm" svg:x="5.503cm" svg:y="9.868cm" svg:viewBox="0 0 4552 28" draw:points="0,0 4552,0 4552,28 0,28">
          <text:p/>
        </draw:polygon>
        <draw:polygon draw:style-name="gr31" draw:text-style-name="P32" draw:layer="layout" svg:width="7.567cm" svg:height="0.027cm" svg:x="10.054cm" svg:y="9.868cm" svg:viewBox="0 0 7568 28" draw:points="0,0 7568,0 7568,28 0,28">
          <text:p/>
        </draw:polygon>
        <draw:polygon draw:style-name="gr31" draw:text-style-name="P32" draw:layer="layout" svg:width="3.439cm" svg:height="0.027cm" svg:x="17.621cm" svg:y="9.868cm" svg:viewBox="0 0 3440 28" draw:points="0,0 3440,0 3440,28 0,28">
          <text:p/>
        </draw:polygon>
        <draw:polygon draw:style-name="gr31" draw:text-style-name="P32" draw:layer="layout" svg:width="4.842cm" svg:height="0.027cm" svg:x="21.06cm" svg:y="9.868cm" svg:viewBox="0 0 4843 28" draw:points="0,0 4843,0 4843,28 0,28">
          <text:p/>
        </draw:polygon>
        <draw:polygon draw:style-name="gr31" draw:text-style-name="P32" draw:layer="layout" svg:width="5.001cm" svg:height="0.026cm" svg:x="0.502cm" svg:y="10.636cm" svg:viewBox="0 0 5002 27" draw:points="0,0 5002,0 5002,27 0,27">
          <text:p/>
        </draw:polygon>
        <draw:polygon draw:style-name="gr31" draw:text-style-name="P32" draw:layer="layout" svg:width="4.551cm" svg:height="0.026cm" svg:x="5.503cm" svg:y="10.636cm" svg:viewBox="0 0 4552 27" draw:points="0,0 4552,0 4552,27 0,27">
          <text:p/>
        </draw:polygon>
        <draw:polygon draw:style-name="gr31" draw:text-style-name="P32" draw:layer="layout" svg:width="7.567cm" svg:height="0.026cm" svg:x="10.054cm" svg:y="10.636cm" svg:viewBox="0 0 7568 27" draw:points="0,0 7568,0 7568,27 0,27">
          <text:p/>
        </draw:polygon>
        <draw:polygon draw:style-name="gr31" draw:text-style-name="P32" draw:layer="layout" svg:width="3.439cm" svg:height="0.026cm" svg:x="17.621cm" svg:y="10.636cm" svg:viewBox="0 0 3440 27" draw:points="0,0 3440,0 3440,27 0,27">
          <text:p/>
        </draw:polygon>
        <draw:polygon draw:style-name="gr31" draw:text-style-name="P32" draw:layer="layout" svg:width="4.842cm" svg:height="0.026cm" svg:x="21.06cm" svg:y="10.636cm" svg:viewBox="0 0 4843 27" draw:points="0,0 4843,0 4843,27 0,27">
          <text:p/>
        </draw:polygon>
        <draw:polygon draw:style-name="gr31" draw:text-style-name="P32" draw:layer="layout" svg:width="5.001cm" svg:height="0.026cm" svg:x="0.502cm" svg:y="11.43cm" svg:viewBox="0 0 5002 27" draw:points="0,0 5002,0 5002,27 0,27">
          <text:p/>
        </draw:polygon>
        <draw:polygon draw:style-name="gr31" draw:text-style-name="P32" draw:layer="layout" svg:width="4.551cm" svg:height="0.026cm" svg:x="5.503cm" svg:y="11.43cm" svg:viewBox="0 0 4552 27" draw:points="0,0 4552,0 4552,27 0,27">
          <text:p/>
        </draw:polygon>
        <draw:polygon draw:style-name="gr31" draw:text-style-name="P32" draw:layer="layout" svg:width="7.567cm" svg:height="0.026cm" svg:x="10.054cm" svg:y="11.43cm" svg:viewBox="0 0 7568 27" draw:points="0,0 7568,0 7568,27 0,27">
          <text:p/>
        </draw:polygon>
        <draw:polygon draw:style-name="gr31" draw:text-style-name="P32" draw:layer="layout" svg:width="3.439cm" svg:height="0.026cm" svg:x="17.621cm" svg:y="11.43cm" svg:viewBox="0 0 3440 27" draw:points="0,0 3440,0 3440,27 0,27">
          <text:p/>
        </draw:polygon>
        <draw:polygon draw:style-name="gr31" draw:text-style-name="P32" draw:layer="layout" svg:width="4.842cm" svg:height="0.026cm" svg:x="21.06cm" svg:y="11.43cm" svg:viewBox="0 0 4843 27" draw:points="0,0 4843,0 4843,27 0,27">
          <text:p/>
        </draw:polygon>
        <draw:frame draw:style-name="gr9" draw:text-style-name="P10" draw:layer="layout" svg:width="23.538cm" svg:height="1.119cm" svg:x="0.888cm" svg:y="5.524cm">
          <draw:text-box>
            <text:p text:style-name="P3"><text:span text:style-name="T7">INTERACTIVEDIFFSCREEN — 4 CONTEXTS, ONE</text:span></text:p>
          </draw:text-box>
        </draw:frame>
        <draw:frame draw:style-name="gr9" draw:text-style-name="P10" draw:layer="layout" svg:width="6.496cm" svg:height="1.119cm" svg:x="9.716cm" svg:y="6.715cm">
          <draw:text-box>
            <text:p text:style-name="P3"><text:span text:style-name="T7">COMPONENT</text:span></text:p>
          </draw:text-box>
        </draw:frame>
        <draw:frame draw:style-name="gr5" draw:text-style-name="P6" draw:layer="layout" svg:width="1.657cm" svg:height="0.496cm" svg:x="0.68cm" svg:y="8.382cm">
          <draw:text-box>
            <text:p text:style-name="P3"><text:span text:style-name="T30">Context</text:span></text:p>
          </draw:text-box>
        </draw:frame>
        <draw:frame draw:style-name="gr5" draw:text-style-name="P6" draw:layer="layout" svg:width="2.003cm" svg:height="0.496cm" svg:x="5.673cm" svg:y="8.382cm">
          <draw:text-box>
            <text:p text:style-name="P3"><text:span text:style-name="T30">Left Pane</text:span></text:p>
          </draw:text-box>
        </draw:frame>
        <draw:frame draw:style-name="gr5" draw:text-style-name="P6" draw:layer="layout" svg:width="2.323cm" svg:height="0.496cm" svg:x="10.231cm" svg:y="8.382cm">
          <draw:text-box>
            <text:p text:style-name="P3"><text:span text:style-name="T30">Right Pane</text:span></text:p>
          </draw:text-box>
        </draw:frame>
        <draw:frame draw:style-name="gr5" draw:text-style-name="P6" draw:layer="layout" svg:width="2.496cm" svg:height="0.496cm" svg:x="17.789cm" svg:y="8.382cm">
          <draw:text-box>
            <text:p text:style-name="P3"><text:span text:style-name="T30">Read-Only?</text:span></text:p>
          </draw:text-box>
        </draw:frame>
        <draw:frame draw:style-name="gr5" draw:text-style-name="P6" draw:layer="layout" svg:width="1.348cm" svg:height="0.496cm" svg:x="21.239cm" svg:y="8.382cm">
          <draw:text-box>
            <text:p text:style-name="P3"><text:span text:style-name="T30">Ctrl+D</text:span></text:p>
          </draw:text-box>
        </draw:frame>
        <draw:frame draw:style-name="gr5" draw:text-style-name="P6" draw:layer="layout" svg:width="3.997cm" svg:height="0.496cm" svg:x="0.68cm" svg:y="9.176cm">
          <draw:text-box>
            <text:p text:style-name="P3"><text:span text:style-name="T27">Argumentation Diﬀ</text:span></text:p>
          </draw:text-box>
        </draw:frame>
        <draw:frame draw:style-name="gr5" draw:text-style-name="P6" draw:layer="layout" svg:width="3.263cm" svg:height="0.496cm" svg:x="5.673cm" svg:y="9.176cm">
          <draw:text-box>
            <text:p text:style-name="P3"><text:span text:style-name="T15">Raw canvas text</text:span></text:p>
          </draw:text-box>
        </draw:frame>
        <draw:path draw:style-name="gr33" draw:text-style-name="P34" draw:layer="layout" svg:width="1.534cm" svg:height="0.529cm" svg:x="14.393cm" svg:y="9.181cm" svg:viewBox="0 0 1535 530" svg:d="M0 450v-370c0-12 2-22 6-32 4-9 10-18 17-25 8-8 16-13 26-17s20-6 30-6h1377c11 0 21 2 30 6 10 4 19 9 26 17 8 7 13 16 17 25 4 10 6 20 6 32v370c0 11-2 21-6 31-4 9-9 18-17 25-7 8-16 14-26 18-9 4-19 6-30 6h-1377c-10 0-20-2-30-6s-18-10-26-18c-7-7-13-16-17-25-4-10-6-20-6-31z">
          <text:p/>
        </draw:path>
        <draw:frame draw:style-name="gr5" draw:text-style-name="P6" draw:layer="layout" svg:width="4.474cm" svg:height="0.496cm" svg:x="10.231cm" svg:y="9.176cm">
          <draw:text-box>
            <text:p text:style-name="P3"><text:span text:style-name="T15">Concretized spec with </text:span></text:p>
          </draw:text-box>
        </draw:frame>
        <draw:frame draw:style-name="gr34" draw:text-style-name="P35" draw:layer="layout" svg:width="1.112cm" svg:height="0.424cm" svg:x="14.48cm" svg:y="9.255cm">
          <draw:text-box>
            <text:p text:style-name="P3"><text:span text:style-name="T32">[GAP:]</text:span></text:p>
          </draw:text-box>
        </draw:frame>
        <draw:frame draw:style-name="gr5" draw:text-style-name="P6" draw:layer="layout" svg:width="2.547cm" svg:height="0.496cm" svg:x="17.789cm" svg:y="9.176cm">
          <draw:text-box>
            <text:p text:style-name="P3"><text:span text:style-name="T15">No (editable)</text:span></text:p>
          </draw:text-box>
        </draw:frame>
        <draw:frame draw:style-name="gr5" draw:text-style-name="P6" draw:layer="layout" svg:width="2.788cm" svg:height="0.496cm" svg:x="21.239cm" svg:y="9.176cm">
          <draw:text-box>
            <text:p text:style-name="P3"><text:span text:style-name="T15">Diﬀ vs canvas</text:span></text:p>
          </draw:text-box>
        </draw:frame>
        <draw:frame draw:style-name="gr5" draw:text-style-name="P6" draw:layer="layout" svg:width="3.509cm" svg:height="0.496cm" svg:x="0.68cm" svg:y="9.97cm">
          <draw:text-box>
            <text:p text:style-name="P3"><text:span text:style-name="T27">Tech Plan Editor</text:span></text:p>
          </draw:text-box>
        </draw:frame>
        <draw:frame draw:style-name="gr5" draw:text-style-name="P6" draw:layer="layout" svg:width="2.967cm" svg:height="0.496cm" svg:x="5.673cm" svg:y="9.97cm">
          <draw:text-box>
            <text:p text:style-name="P3"><text:span text:style-name="T15">Approved spec</text:span></text:p>
          </draw:text-box>
        </draw:frame>
        <draw:frame draw:style-name="gr5" draw:text-style-name="P6" draw:layer="layout" svg:width="4.375cm" svg:height="0.496cm" svg:x="10.231cm" svg:y="9.97cm">
          <draw:text-box>
            <text:p text:style-name="P3"><text:span text:style-name="T15">Draft architecture plan</text:span></text:p>
          </draw:text-box>
        </draw:frame>
        <draw:frame draw:style-name="gr5" draw:text-style-name="P6" draw:layer="layout" svg:width="2.547cm" svg:height="0.496cm" svg:x="17.789cm" svg:y="9.97cm">
          <draw:text-box>
            <text:p text:style-name="P3"><text:span text:style-name="T15">No (editable)</text:span></text:p>
          </draw:text-box>
        </draw:frame>
        <draw:frame draw:style-name="gr5" draw:text-style-name="P6" draw:layer="layout" svg:width="3.06cm" svg:height="0.496cm" svg:x="21.239cm" svg:y="9.97cm">
          <draw:text-box>
            <text:p text:style-name="P3"><text:span text:style-name="T15">Diﬀ vs previous</text:span></text:p>
          </draw:text-box>
        </draw:frame>
        <draw:frame draw:style-name="gr5" draw:text-style-name="P6" draw:layer="layout" svg:width="2.62cm" svg:height="0.496cm" svg:x="0.68cm" svg:y="10.737cm">
          <draw:text-box>
            <text:p text:style-name="P3"><text:span text:style-name="T27">Steps Editor</text:span></text:p>
          </draw:text-box>
        </draw:frame>
        <draw:frame draw:style-name="gr5" draw:text-style-name="P6" draw:layer="layout" svg:width="2.868cm" svg:height="0.496cm" svg:x="5.673cm" svg:y="10.737cm">
          <draw:text-box>
            <text:p text:style-name="P3"><text:span text:style-name="T15">Technical plan</text:span></text:p>
          </draw:text-box>
        </draw:frame>
        <draw:frame draw:style-name="gr5" draw:text-style-name="P6" draw:layer="layout" svg:width="4.424cm" svg:height="0.496cm" svg:x="10.231cm" svg:y="10.737cm">
          <draw:text-box>
            <text:p text:style-name="P3"><text:span text:style-name="T15">Ordered step checklist</text:span></text:p>
          </draw:text-box>
        </draw:frame>
        <draw:frame draw:style-name="gr5" draw:text-style-name="P6" draw:layer="layout" svg:width="2.547cm" svg:height="0.496cm" svg:x="17.789cm" svg:y="10.737cm">
          <draw:text-box>
            <text:p text:style-name="P3"><text:span text:style-name="T15">No (editable)</text:span></text:p>
          </draw:text-box>
        </draw:frame>
        <draw:frame draw:style-name="gr5" draw:text-style-name="P6" draw:layer="layout" svg:width="2.813cm" svg:height="0.496cm" svg:x="21.239cm" svg:y="10.737cm">
          <draw:text-box>
            <text:p text:style-name="P3"><text:span text:style-name="T15">Diﬀ vs original</text:span></text:p>
          </draw:text-box>
        </draw:frame>
        <draw:frame draw:style-name="gr5" draw:text-style-name="P6" draw:layer="layout" svg:width="3.88cm" svg:height="0.496cm" svg:x="0.68cm" svg:y="11.531cm">
          <draw:text-box>
            <text:p text:style-name="P3"><text:span text:style-name="T27">Approval Gateway</text:span></text:p>
          </draw:text-box>
        </draw:frame>
        <draw:frame draw:style-name="gr5" draw:text-style-name="P6" draw:layer="layout" svg:width="3.605cm" svg:height="0.496cm" svg:x="5.673cm" svg:y="11.531cm">
          <draw:text-box>
            <text:p text:style-name="P3"><text:span text:style-name="T15">Reason / code diﬀ</text:span></text:p>
          </draw:text-box>
        </draw:frame>
        <draw:frame draw:style-name="gr5" draw:text-style-name="P6" draw:layer="layout" svg:width="3.857cm" svg:height="0.496cm" svg:x="10.231cm" svg:y="11.531cm">
          <draw:text-box>
            <text:p text:style-name="P3"><text:span text:style-name="T15">Tool action payload</text:span></text:p>
          </draw:text-box>
        </draw:frame>
        <draw:frame draw:style-name="gr5" draw:text-style-name="P6" draw:layer="layout" svg:width="0.793cm" svg:height="0.496cm" svg:x="17.789cm" svg:y="11.531cm">
          <draw:text-box>
            <text:p text:style-name="P3"><text:span text:style-name="T27">Yes</text:span></text:p>
          </draw:text-box>
        </draw:frame>
        <draw:frame draw:style-name="gr5" draw:text-style-name="P6" draw:layer="layout" svg:width="3.827cm" svg:height="0.496cm" svg:x="21.239cm" svg:y="11.531cm">
          <draw:text-box>
            <text:p text:style-name="P3"><text:span text:style-name="T15">Toggle reason / diﬀ</text:span></text:p>
          </draw:text-box>
        </draw:frame>
        <draw:polygon draw:style-name="gr6" draw:text-style-name="P7" draw:layer="layout" svg:width="0.714cm" svg:height="0.635cm" svg:x="25.479cm" svg:y="18.388cm" svg:viewBox="0 0 715 636" draw:points="0,0 715,0 715,636 0,636">
          <text:p/>
        </draw:polygon>
        <draw:frame draw:style-name="gr13" draw:text-style-name="P14" draw:layer="layout" svg:width="8.247cm" svg:height="0.454cm" svg:x="9.3cm" svg:y="12.755cm">
          <draw:text-box>
            <text:p text:style-name="P3"><text:span text:style-name="T33">One parameterized component, infinite reuse.</text:span></text:p>
          </draw:text-box>
        </draw:frame>
        <draw:frame draw:style-name="gr7" draw:text-style-name="P8" draw:layer="layout" svg:width="0.412cm" svg:height="0.412cm" svg:x="25.617cm" svg:y="18.503cm">
          <draw:text-box>
            <text:p text:style-name="P3"><text:span text:style-name="T6">22</text:span></text:p>
          </draw:text-box>
        </draw:frame>
      </draw:page>
      <draw:page draw:name="page23"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17.265cm" svg:height="1.119cm" svg:x="4.171cm" svg:y="5.63cm">
          <draw:text-box>
            <text:p text:style-name="P3"><text:span text:style-name="T7">CONFIRMSCREEN &amp; TUI PATTERNS</text:span></text:p>
          </draw:text-box>
        </draw:frame>
        <draw:path draw:style-name="gr8" draw:text-style-name="P9" draw:layer="layout" svg:width="8.07cm" svg:height="3.519cm" svg:x="0.502cm" svg:y="8.625cm" svg:viewBox="0 0 8071 3520" svg:d="M31 31c21-21 46-31 75-31h7859c29 0 54 10 75 31s31 46 31 75v3308c0 29-10 54-31 75s-46 31-75 31h-7859c-29 0-54-10-75-31-20-21-31-46-31-75v-3308c0-29 11-54 31-75z">
          <text:p/>
        </draw:path>
        <draw:polygon draw:style-name="gr2" draw:text-style-name="P2" draw:layer="layout" svg:width="8.07cm" svg:height="0.066cm" svg:x="0.502cm" svg:y="8.625cm" svg:viewBox="0 0 8071 67" draw:points="8007,67 0,67 0,0 8071,0 8071,3">
          <text:p/>
        </draw:polygon>
        <draw:path draw:style-name="gr2" draw:text-style-name="P2" draw:layer="layout" svg:width="7.992cm" svg:height="0.051cm" svg:x="0.55cm" svg:y="12.093cm" svg:viewBox="0 0 7993 52" svg:d="M48 18c3 5 6 7 10 7h7859c22 0 41-8 56-24 1 0 1-1 2-1l18 19c0 0-1 0-1 2-21 21-46 31-75 31h-7859c-22 0-41-6-58-17z">
          <text:p/>
        </draw:path>
        <draw:polygon draw:style-name="gr2" draw:text-style-name="P2" draw:layer="layout" svg:width="8.07cm" svg:height="3.519cm" svg:x="0.502cm" svg:y="8.625cm" svg:viewBox="0 0 8071 3520" draw:points="0,0 8071,0 8071,3520 0,3520">
          <text:p/>
        </draw:polygon>
        <draw:polygon draw:style-name="gr2" draw:text-style-name="P2" draw:layer="layout" svg:width="8.07cm" svg:height="3.519cm" svg:x="0.502cm" svg:y="8.625cm" svg:viewBox="0 0 8071 3520" draw:points="0,0 8071,0 8071,3520 0,3520">
          <text:p/>
        </draw:polygon>
        <draw:frame draw:style-name="gr5" draw:text-style-name="P6" draw:layer="layout" svg:width="10.305cm" svg:height="0.496cm" svg:x="0.503cm" svg:y="7.297cm">
          <draw:text-box>
            <text:p text:style-name="P3"><text:span text:style-name="T15">A </text:span><text:span text:style-name="T27">15-line</text:span><text:span text:style-name="T15"> confirmation dialog reused in three places:</text:span></text:p>
          </draw:text-box>
        </draw:frame>
        <draw:frame draw:style-name="gr20" draw:text-style-name="P21" draw:layer="layout" svg:width="3.723cm" svg:height="0.666cm" svg:x="1.027cm" svg:y="8.936cm">
          <draw:text-box>
            <text:p text:style-name="P3"><text:span text:style-name="T38">1. SOCRATIC</text:span></text:p>
          </draw:text-box>
        </draw:frame>
        <draw:frame draw:style-name="gr20" draw:text-style-name="P21" draw:layer="layout" svg:width="3.526cm" svg:height="0.666cm" svg:x="1.027cm" svg:y="9.65cm">
          <draw:text-box>
            <text:p text:style-name="P3"><text:span text:style-name="T38">VALIDATION</text:span></text:p>
          </draw:text-box>
        </draw:frame>
        <draw:frame draw:style-name="gr7" draw:text-style-name="P8" draw:layer="layout" svg:width="6.512cm" svg:height="0.412cm" svg:x="1.027cm" svg:y="10.407cm">
          <draw:text-box>
            <text:p text:style-name="P3"><text:span text:style-name="T36">“Semantic gaps detected. Run clarifying</text:span></text:p>
          </draw:text-box>
        </draw:frame>
        <draw:frame draw:style-name="gr7" draw:text-style-name="P8" draw:layer="layout" svg:width="1.906cm" svg:height="0.412cm" svg:x="1.027cm" svg:y="10.883cm">
          <draw:text-box>
            <text:p text:style-name="P3"><text:span text:style-name="T36">questions?”</text:span></text:p>
          </draw:text-box>
        </draw:frame>
        <draw:path draw:style-name="gr8" draw:text-style-name="P9" draw:layer="layout" svg:width="8.096cm" svg:height="3.519cm" svg:x="9.154cm" svg:y="8.625cm" svg:viewBox="0 0 8097 3520" svg:d="M31 31c21-21 46-31 75-31h7886c29 0 54 10 74 31 21 21 31 46 31 75v3308c0 29-10 54-31 75-20 21-45 31-75 31h-7885c-29 0-54-10-75-31s-31-46-31-75v-3308c0-29 10-54 31-75z">
          <text:p/>
        </draw:path>
        <draw:polygon draw:style-name="gr2" draw:text-style-name="P2" draw:layer="layout" svg:width="8.096cm" svg:height="0.066cm" svg:x="9.154cm" svg:y="8.625cm" svg:viewBox="0 0 8097 67" draw:points="8034,67 0,67 0,0 8097,0 8097,3">
          <text:p/>
        </draw:polygon>
        <draw:path draw:style-name="gr2" draw:text-style-name="P2" draw:layer="layout" svg:width="8.019cm" svg:height="0.051cm" svg:x="9.202cm" svg:y="12.093cm" svg:viewBox="0 0 8020 52" svg:d="M47 18c4 5 7 7 11 7h7885c22 0 41-8 57-24l1-1 19 19c-1 0-1 0-2 2-20 21-45 31-75 31h-7885c-22 0-41-6-58-17z">
          <text:p/>
        </draw:path>
        <draw:path draw:style-name="gr2" draw:text-style-name="P2" draw:layer="layout" svg:width="0.049cm" svg:height="3.457cm" svg:x="17.201cm" svg:y="8.656cm" svg:viewBox="0 0 50 3458" svg:d="M0 3438c15-15 24-34 24-56v-3307c0-22-9-41-24-56l18-19c22 21 32 46 32 75v3307c0 29-10 54-32 76z">
          <text:p/>
        </draw:path>
        <draw:polygon draw:style-name="gr2" draw:text-style-name="P2" draw:layer="layout" svg:width="8.096cm" svg:height="3.519cm" svg:x="9.154cm" svg:y="8.625cm" svg:viewBox="0 0 8097 3520" draw:points="0,0 8097,0 8097,3520 0,3520">
          <text:p/>
        </draw:polygon>
        <draw:frame draw:style-name="gr78" draw:text-style-name="P43" draw:layer="layout" svg:width="3.905cm" svg:height="0.378cm" svg:x="1.027cm" svg:y="11.419cm">
          <draw:text-box>
            <text:p text:style-name="P3"><text:span text:style-name="T62">Yes → wizard · No → skip</text:span></text:p>
          </draw:text-box>
        </draw:frame>
        <draw:frame draw:style-name="gr20" draw:text-style-name="P21" draw:layer="layout" svg:width="5.667cm" svg:height="0.666cm" svg:x="9.69cm" svg:y="8.936cm">
          <draw:text-box>
            <text:p text:style-name="P3"><text:span text:style-name="T38">2. CLEAR BACKLOG</text:span></text:p>
          </draw:text-box>
        </draw:frame>
        <draw:frame draw:style-name="gr7" draw:text-style-name="P8" draw:layer="layout" svg:width="3.216cm" svg:height="0.412cm" svg:x="9.69cm" svg:y="9.692cm">
          <draw:text-box>
            <text:p text:style-name="P3"><text:span text:style-name="T36">“Permanently erase</text:span></text:p>
          </draw:text-box>
        </draw:frame>
        <draw:frame draw:style-name="gr7" draw:text-style-name="P8" draw:layer="layout" svg:width="4.26cm" svg:height="0.412cm" svg:x="9.69cm" svg:y="10.169cm">
          <draw:text-box>
            <text:p text:style-name="P3"><text:span text:style-name="T36">.agent/sticky_notes.json?”</text:span></text:p>
          </draw:text-box>
        </draw:frame>
        <draw:path draw:style-name="gr8" draw:text-style-name="P9" draw:layer="layout" svg:width="8.07cm" svg:height="3.519cm" svg:x="17.832cm" svg:y="8.625cm" svg:viewBox="0 0 8071 3520" svg:d="M31 31c21-21 46-31 75-31h7859c30 0 55 10 75 31 21 21 31 46 31 75v3308c0 29-10 54-31 75-20 21-45 31-75 31h-7859c-29 0-54-10-75-31-20-21-31-46-31-75v-3308c0-29 11-54 31-75z">
          <text:p/>
        </draw:path>
        <draw:polygon draw:style-name="gr2" draw:text-style-name="P2" draw:layer="layout" svg:width="8.07cm" svg:height="0.066cm" svg:x="17.832cm" svg:y="8.625cm" svg:viewBox="0 0 8071 67" draw:points="8008,67 0,67 0,0 8071,0 8071,3">
          <text:p/>
        </draw:polygon>
        <draw:path draw:style-name="gr2" draw:text-style-name="P2" draw:layer="layout" svg:width="7.993cm" svg:height="0.051cm" svg:x="17.88cm" svg:y="12.093cm" svg:viewBox="0 0 7994 52" svg:d="M48 18c3 5 6 7 10 7h7859c22 0 41-8 57-24 0 0 0-1 1-1l19 19c-1 0-1 0-2 2-20 21-45 31-75 31h-7859c-21 0-41-6-58-17z">
          <text:p/>
        </draw:path>
        <draw:path draw:style-name="gr2" draw:text-style-name="P2" draw:layer="layout" svg:width="0.049cm" svg:height="3.457cm" svg:x="25.853cm" svg:y="8.656cm" svg:viewBox="0 0 50 3458" svg:d="M0 3438c15-15 23-34 23-56v-3307c0-22-8-41-23-56l18-19c21 21 32 46 32 75v3307c0 29-11 54-32 76z">
          <text:p/>
        </draw:path>
        <draw:path draw:style-name="gr2" draw:text-style-name="P2" draw:layer="layout" svg:width="0.096cm" svg:height="3.487cm" svg:x="17.832cm" svg:y="8.641cm" svg:viewBox="0 0 97 3488" svg:d="M97 16c-3 4-6 10-8 18-6 15-8 34-8 57v3307c0 22 2 41 8 56 2 8 5 14 8 18l-48 16c-6-5-12-9-18-15-20-21-31-46-31-75v-3307c0-30 11-55 31-76 6-6 12-11 18-15z">
          <text:p/>
        </draw:path>
        <draw:frame draw:style-name="gr78" draw:text-style-name="P43" draw:layer="layout" svg:width="2.828cm" svg:height="0.378cm" svg:x="9.69cm" svg:y="10.705cm">
          <draw:text-box>
            <text:p text:style-name="P3"><text:span text:style-name="T62">Only Yes proceeds</text:span></text:p>
          </draw:text-box>
        </draw:frame>
        <draw:frame draw:style-name="gr20" draw:text-style-name="P21" draw:layer="layout" svg:width="4.448cm" svg:height="0.666cm" svg:x="18.355cm" svg:y="8.936cm">
          <draw:text-box>
            <text:p text:style-name="P3"><text:span text:style-name="T38">3. TOOL RETRY</text:span></text:p>
          </draw:text-box>
        </draw:frame>
        <draw:frame draw:style-name="gr7" draw:text-style-name="P8" draw:layer="layout" svg:width="6.286cm" svg:height="0.412cm" svg:x="18.355cm" svg:y="9.692cm">
          <draw:text-box>
            <text:p text:style-name="P3"><text:span text:style-name="T36">“Step failed. Retry after manual fixes?”</text:span></text:p>
          </draw:text-box>
        </draw:frame>
        <draw:path draw:style-name="gr76" draw:text-style-name="P60" draw:layer="layout" svg:width="23.918cm" svg:height="2.252cm" svg:x="0cm" svg:y="12.039cm" svg:viewBox="0 0 23919 2253" svg:d="M0 0h23919v2253h-23919zM529 529v926c0 22 7 41 23 56 15 16 34 24 56 24h22649c22 0 41-8 56-24 16-15 24-34 24-56v-926c0-22-8-40-24-56-15-15-34-23-56-23h-22649c-22 0-41 8-56 23-16 16-23 34-23 56z">
          <text:p/>
        </draw:path>
        <draw:path draw:style-name="gr77" draw:text-style-name="P61" draw:layer="layout" svg:width="22.86cm" svg:height="1.138cm" svg:x="0.502cm" svg:y="12.461cm" svg:viewBox="0 0 22861 1139" svg:d="M0 1033v-927c0-14 3-27 8-40 6-13 13-25 23-35s22-17 35-23c13-5 26-8 40-8h22649c14 0 28 3 41 8 13 6 24 13 34 23s18 22 23 35c6 13 8 26 8 40v927c0 14-2 28-8 41-5 13-13 24-23 34s-21 18-34 23-27 8-41 8h-22649c-14 0-27-3-40-8s-25-13-35-23-17-21-23-34c-5-13-8-27-8-41z">
          <text:p/>
        </draw:path>
        <draw:frame draw:style-name="gr78" draw:text-style-name="P43" draw:layer="layout" svg:width="3.98cm" svg:height="0.378cm" svg:x="18.355cm" svg:y="10.229cm">
          <draw:text-box>
            <text:p text:style-name="P3"><text:span text:style-name="T62">Yes re-runs · No suspends</text:span></text:p>
          </draw:text-box>
        </draw:frame>
        <draw:frame draw:style-name="gr78" draw:text-style-name="P43" draw:layer="layout" svg:width="7.995cm" svg:height="0.378cm" svg:x="0.736cm" svg:y="12.636cm">
          <draw:text-box>
            <text:p text:style-name="P3"><text:span text:style-name="T60"># Every screen auto-focuses primary widget on mount</text:span></text:p>
          </draw:text-box>
        </draw:frame>
        <draw:polygon draw:style-name="gr6" draw:text-style-name="P7" draw:layer="layout" svg:width="0.714cm" svg:height="0.635cm" svg:x="25.479cm" svg:y="18.388cm" svg:viewBox="0 0 715 636" draw:points="0,0 715,0 715,636 0,636">
          <text:p/>
        </draw:polygon>
        <draw:frame draw:style-name="gr78" draw:text-style-name="P43" draw:layer="layout" svg:width="7.335cm" svg:height="0.378cm" svg:x="0.736cm" svg:y="13.06cm">
          <draw:text-box>
            <text:p text:style-name="P3"><text:span text:style-name="T60"># Ctrl+A = approve, Escape = reject — consistent</text:span></text:p>
          </draw:text-box>
        </draw:frame>
        <draw:frame draw:style-name="gr7" draw:text-style-name="P8" draw:layer="layout" svg:width="0.412cm" svg:height="0.412cm" svg:x="25.617cm" svg:y="18.503cm">
          <draw:text-box>
            <text:p text:style-name="P3"><text:span text:style-name="T6">23</text:span></text:p>
          </draw:text-box>
        </draw:frame>
      </draw:page>
      <draw:page draw:name="page24"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12.715cm" svg:height="1.119cm" svg:x="6.407cm" svg:y="2.587cm">
          <draw:text-box>
            <text:p text:style-name="P3"><text:span text:style-name="T7">LAYER 2: MIDDLEWARE —</text:span></text:p>
          </draw:text-box>
        </draw:frame>
        <draw:path draw:style-name="gr8" draw:text-style-name="P9" draw:layer="layout" svg:width="12.33cm" svg:height="5.926cm" svg:x="0.502cm" svg:y="7.461cm" svg:viewBox="0 0 12331 5927" svg:d="M31 31c21-21 46-31 75-31h12119c29 0 54 10 75 31 20 20 31 45 31 75v5716c0 29-11 54-31 74-21 21-46 31-75 31h-12119c-29 0-54-10-75-31-20-20-31-45-31-74v-5716c0-30 11-55 31-75z">
          <text:p/>
        </draw:path>
        <draw:polygon draw:style-name="gr2" draw:text-style-name="P2" draw:layer="layout" svg:width="12.33cm" svg:height="0.066cm" svg:x="0.502cm" svg:y="7.461cm" svg:viewBox="0 0 12331 67" draw:points="12267,67 0,67 0,0 12331,0 12331,2">
          <text:p/>
        </draw:polygon>
        <draw:path draw:style-name="gr2" draw:text-style-name="P2" draw:layer="layout" svg:width="0.05cm" svg:height="5.864cm" svg:x="12.782cm" svg:y="7.492cm" svg:viewBox="0 0 51 5865" svg:d="M0 5847c16-16 23-34 23-56v-5716c0-22-7-41-23-57l19-18c21 20 32 45 32 75v5716c0 29-11 54-32 74z">
          <text:p/>
        </draw:path>
        <draw:polygon draw:style-name="gr2" draw:text-style-name="P2" draw:layer="layout" svg:width="12.33cm" svg:height="5.926cm" svg:x="0.502cm" svg:y="7.461cm" svg:viewBox="0 0 12331 5927" draw:points="0,0 12331,0 12331,5927 0,5927">
          <text:p/>
        </draw:polygon>
        <draw:frame draw:style-name="gr9" draw:text-style-name="P10" draw:layer="layout" svg:width="11.272cm" svg:height="1.119cm" svg:x="7.342cm" svg:y="3.778cm">
          <draw:text-box>
            <text:p text:style-name="P3"><text:span text:style-name="T7">SESSIONCONTROLLER</text:span></text:p>
          </draw:text-box>
        </draw:frame>
        <draw:frame draw:style-name="gr13" draw:text-style-name="P14" draw:layer="layout" svg:width="12.967cm" svg:height="0.454cm" svg:x="0.679cm" svg:y="5.875cm">
          <draw:text-box>
            <text:p text:style-name="P3"><text:span text:style-name="T35">What:</text:span><text:span text:style-name="T10"> The master state machine driving all 3 phases across 12 lifecycle</text:span></text:p>
          </draw:text-box>
        </draw:frame>
        <draw:frame draw:style-name="gr13" draw:text-style-name="P14" draw:layer="layout" svg:width="1.199cm" svg:height="0.454cm" svg:x="6.109cm" svg:y="6.431cm">
          <draw:text-box>
            <text:p text:style-name="P3"><text:span text:style-name="T10">states.</text:span></text:p>
          </draw:text-box>
        </draw:frame>
        <draw:path draw:style-name="gr17" draw:text-style-name="P18" draw:layer="layout" svg:width="0.159cm" svg:height="0.158cm" svg:x="0.978cm" svg:y="8.784cm" svg:viewBox="0 0 160 159" svg:d="M160 79c0 11-2 21-6 30-4 10-10 19-17 26-7 9-16 14-26 18s-20 6-30 6c-11 0-21-2-31-6s-19-9-26-18c-8-7-13-16-17-26-5-9-7-19-7-30s2-21 7-30c4-10 9-19 17-26 7-8 16-13 26-17s20-6 31-6c10 0 20 2 30 6s19 9 26 17c7 7 13 16 17 26 4 9 6 19 6 30z">
          <text:p/>
        </draw:path>
        <draw:frame draw:style-name="gr20" draw:text-style-name="P21" draw:layer="layout" svg:width="9.486cm" svg:height="0.666cm" svg:x="1.027cm" svg:y="7.772cm">
          <draw:text-box>
            <text:p text:style-name="P3"><text:span text:style-name="T38">TRANSITION TABLE (SIMPLIFIED)</text:span></text:p>
          </draw:text-box>
        </draw:frame>
        <draw:frame draw:style-name="gr18" draw:text-style-name="P19" draw:layer="layout" svg:width="9.119cm" svg:height="0.539cm" svg:x="1.46cm" svg:y="8.56cm">
          <draw:text-box>
            <text:p text:style-name="P3"><text:span text:style-name="T17">START → REPOSITORY_SELECTION →</text:span></text:p>
          </draw:text-box>
        </draw:frame>
        <draw:path draw:style-name="gr17" draw:text-style-name="P18" draw:layer="layout" svg:width="0.159cm" svg:height="0.158cm" svg:x="0.978cm" svg:y="10.054cm" svg:viewBox="0 0 160 159" svg:d="M160 79c0 11-2 21-6 30-4 10-10 19-17 26-7 8-16 14-26 18s-20 6-30 6c-11 0-21-2-31-6s-19-10-26-18c-8-7-13-16-17-26-5-9-7-19-7-30 0-10 2-21 7-30 4-10 9-19 17-26 7-8 16-13 26-17s20-6 31-6c10 0 20 2 30 6s19 9 26 17c7 7 13 16 17 26 4 9 6 20 6 30z">
          <text:p/>
        </draw:path>
        <draw:frame draw:style-name="gr18" draw:text-style-name="P19" draw:layer="layout" svg:width="5.795cm" svg:height="0.539cm" svg:x="1.46cm" svg:y="9.195cm">
          <draw:text-box>
            <text:p text:style-name="P3"><text:span text:style-name="T17">REPOSITORY_ANALYSIS</text:span></text:p>
          </draw:text-box>
        </draw:frame>
        <draw:path draw:style-name="gr17" draw:text-style-name="P18" draw:layer="layout" svg:width="0.159cm" svg:height="0.159cm" svg:x="0.978cm" svg:y="10.715cm" svg:viewBox="0 0 160 160" svg:d="M160 80c0 10-2 20-6 31-4 10-10 18-17 26-7 7-16 13-26 17s-20 6-30 6c-11 0-21-2-31-6s-19-10-26-17c-8-8-13-16-17-26-5-11-7-21-7-31 0-11 2-21 7-31 4-10 9-18 17-26 7-7 16-13 26-17s20-6 31-6c10 0 20 2 30 6s19 10 26 17c7 8 13 16 17 26s6 20 6 31z">
          <text:p/>
        </draw:path>
        <draw:frame draw:style-name="gr18" draw:text-style-name="P19" draw:layer="layout" svg:width="13.358cm" svg:height="0.539cm" svg:x="1.46cm" svg:y="9.83cm">
          <draw:text-box>
            <text:p text:style-name="P3"><text:span text:style-name="T17">SPEC_ENTRY → SPEC_VALIDATION → SPEC_APPROVAL</text:span></text:p>
          </draw:text-box>
        </draw:frame>
        <draw:frame draw:style-name="gr18" draw:text-style-name="P19" draw:layer="layout" svg:width="9.522cm" svg:height="0.539cm" svg:x="1.46cm" svg:y="10.491cm">
          <draw:text-box>
            <text:p text:style-name="P3"><text:span text:style-name="T17">PLAN_GENERATION → PLAN_REVIEW →</text:span></text:p>
          </draw:text-box>
        </draw:frame>
        <draw:path draw:style-name="gr17" draw:text-style-name="P18" draw:layer="layout" svg:width="0.159cm" svg:height="0.159cm" svg:x="0.978cm" svg:y="11.985cm" svg:viewBox="0 0 160 160" svg:d="M160 80c0 10-2 20-6 31-4 10-10 18-17 26-7 7-16 13-26 17s-20 6-30 6c-11 0-21-2-31-6s-19-10-26-17c-8-8-13-16-17-26-5-11-7-21-7-31 0-11 2-21 7-31 4-10 9-18 17-26 7-7 16-13 26-17s20-6 31-6c10 0 20 2 30 6s19 10 26 17c7 8 13 16 17 26s6 20 6 31z">
          <text:p/>
        </draw:path>
        <draw:frame draw:style-name="gr18" draw:text-style-name="P19" draw:layer="layout" svg:width="4.133cm" svg:height="0.539cm" svg:x="1.46cm" svg:y="11.126cm">
          <draw:text-box>
            <text:p text:style-name="P3"><text:span text:style-name="T17">PLAN_APPROVAL</text:span></text:p>
          </draw:text-box>
        </draw:frame>
        <draw:frame draw:style-name="gr18" draw:text-style-name="P19" draw:layer="layout" svg:width="13.06cm" svg:height="0.539cm" svg:x="1.46cm" svg:y="11.761cm">
          <draw:text-box>
            <text:p text:style-name="P3"><text:span text:style-name="T17">EXECUTION → VERIFICATION → COMPLETION_REVIEW</text:span></text:p>
          </draw:text-box>
        </draw:frame>
        <draw:frame draw:style-name="gr18" draw:text-style-name="P19" draw:layer="layout" svg:width="2.013cm" svg:height="0.539cm" svg:x="1.46cm" svg:y="12.396cm">
          <draw:text-box>
            <text:p text:style-name="P3"><text:span text:style-name="T17">→ DONE</text:span></text:p>
          </draw:text-box>
        </draw:frame>
        <draw:frame draw:style-name="gr7" draw:text-style-name="P8" draw:layer="layout" svg:width="12.284cm" svg:height="0.412cm" svg:x="0.972cm" svg:y="13.926cm">
          <draw:text-box>
            <text:p text:style-name="P3"><text:span text:style-name="T54">Backward navigation on rejection</text:span><text:span text:style-name="T36"> — guaranteed by centralized transition</text:span></text:p>
          </draw:text-box>
        </draw:frame>
        <draw:path draw:style-name="gr80" draw:text-style-name="P63" draw:layer="layout" svg:width="3.963cm" svg:height="1.321cm" svg:x="17.756cm" svg:y="5.644cm" svg:viewBox="0 0 3964 1322" svg:d="M3964 661c0 22-3 43-10 65-6 21-16 43-28 64-13 21-29 42-47 63-19 21-41 41-66 61s-52 39-83 58c-31 20-64 38-100 56s-75 35-116 52-85 33-130 48c-46 15-94 30-145 44-50 13-102 26-156 38s-109 23-167 34c-57 10-115 19-175 27-60 9-121 16-183 22s-125 12-189 16-128 7-192 9c-65 3-130 4-195 4-64 0-129-1-194-4-64-2-129-5-192-9-64-4-127-10-189-16s-123-13-183-22c-60-8-118-17-176-27-57-11-112-22-166-34s-106-25-157-38c-50-14-98-29-144-44s-89-31-130-48-80-34-116-52-70-36-100-56c-31-19-58-38-83-58s-47-40-66-61c-20-21-35-42-48-63s-22-43-29-64c-6-22-9-43-9-65s3-43 9-65c7-21 16-43 29-64s28-42 48-63c19-20 41-41 66-61s52-39 83-58c30-19 64-38 100-57 36-18 75-35 116-52s84-33 130-48 94-30 144-43c51-14 103-27 157-39s109-23 166-33c58-11 116-20 176-28s121-16 183-22 125-11 189-16c63-4 128-7 192-9 65-2 130-3 194-3 65 0 130 1 195 3 64 2 128 5 192 9 64 5 127 10 189 16s123 14 183 22 118 17 175 28c58 10 113 21 167 33s106 25 156 39c51 13 99 28 145 43 45 15 89 31 130 48s80 34 116 52c36 19 69 38 100 57s58 38 83 58 47 41 66 61c18 21 34 42 47 63 12 21 22 43 28 64 7 22 10 43 10 65z">
          <text:p/>
        </draw:path>
        <draw:path draw:style-name="gr81" draw:text-style-name="P26" draw:layer="layout" svg:width="3.963cm" svg:height="1.321cm" svg:x="17.756cm" svg:y="5.644cm" svg:viewBox="0 0 3964 1322" svg:d="M3964 661c0 22-3 43-10 65-6 21-16 43-28 64-13 21-29 42-47 63-19 21-41 41-66 61s-52 39-83 58c-31 20-64 38-100 56s-75 35-116 52-85 33-130 48c-46 15-94 30-145 44-50 13-102 26-156 38s-109 23-167 34c-57 10-115 19-175 27-60 9-121 16-183 22s-125 12-189 16-128 7-192 9c-65 3-130 4-195 4-64 0-129-1-194-4-64-2-129-5-192-9-64-4-127-10-189-16s-123-13-183-22c-60-8-118-17-176-27-57-11-112-22-166-34s-106-25-157-38c-50-14-98-29-144-44s-89-31-130-48-80-34-116-52-70-36-100-56c-31-19-58-38-83-58s-47-40-66-61c-20-21-35-42-48-63s-22-43-29-64c-6-22-9-43-9-65s3-43 9-65c7-21 16-43 29-64s28-42 48-63c19-20 41-41 66-61s52-39 83-58c30-19 64-38 100-57 36-18 75-35 116-52s84-33 130-48 94-30 144-43c51-14 103-27 157-39s109-23 166-33c58-11 116-20 176-28s121-16 183-22 125-11 189-16c63-4 128-7 192-9 65-2 130-3 194-3 65 0 130 1 195 3 64 2 128 5 192 9 64 5 127 10 189 16s123 14 183 22 118 17 175 28c58 10 113 21 167 33s106 25 156 39c51 13 99 28 145 43 45 15 89 31 130 48s80 34 116 52c36 19 69 38 100 57s58 38 83 58 47 41 66 61c18 21 34 42 47 63 12 21 22 43 28 64 7 22 10 43 10 65z">
          <text:p/>
        </draw:path>
        <draw:frame draw:style-name="gr7" draw:text-style-name="P8" draw:layer="layout" svg:width="0.903cm" svg:height="0.412cm" svg:x="6.226cm" svg:y="14.402cm">
          <draw:text-box>
            <text:p text:style-name="P3"><text:span text:style-name="T36">table.</text:span></text:p>
          </draw:text-box>
        </draw:frame>
        <draw:line draw:style-name="gr81" draw:text-style-name="P26" draw:layer="layout" svg:x1="19.737cm" svg:y1="6.965cm" svg:x2="19.737cm" svg:y2="7.625cm">
          <text:p/>
        </draw:line>
        <draw:polygon draw:style-name="gr2" draw:text-style-name="P2" draw:layer="layout" svg:width="0.397cm" svg:height="0.397cm" svg:x="19.539cm" svg:y="7.268cm" svg:viewBox="0 0 398 398" draw:points="398,0 199,398 0,0">
          <text:p/>
        </draw:polygon>
        <draw:path draw:style-name="gr31" draw:text-style-name="P32" draw:layer="layout" svg:width="4.843cm" svg:height="1.321cm" svg:x="17.316cm" svg:y="7.625cm" svg:viewBox="0 0 4844 1322" svg:d="M4844 661c0 21-4 43-11 64-8 22-20 43-35 64-16 22-35 43-58 63-23 21-50 41-80 61s-64 40-102 60c-37 19-78 38-123 56-44 18-91 35-141 52-51 16-104 32-160 48-56 15-115 29-176 43-62 14-125 27-191 39s-134 23-204 33-142 20-215 28-148 15-224 22c-75 6-152 11-230 15-78 5-156 8-235 10s-158 3-238 3c-79 0-158-1-237-3s-157-5-235-10c-78-4-155-9-231-15-76-7-150-14-223-22-74-8-145-18-215-28s-138-21-204-33-130-25-191-39-120-28-176-43c-56-16-109-32-160-48-50-17-97-34-141-52s-85-37-122-56c-38-20-72-40-102-60s-57-40-80-61c-23-20-42-41-58-63-15-21-27-42-35-64-8-21-11-43-11-64 0-22 3-44 11-65 8-22 20-43 35-64 16-21 35-42 58-63s50-41 80-61 64-40 102-59c37-19 78-37 122-55s91-36 141-52c51-17 104-33 160-48 56-16 115-30 176-44s125-27 191-39 134-23 204-33 141-19 215-28c73-8 147-15 223-21 76-7 153-12 231-16s156-8 235-10 158-3 237-3c80 0 159 1 238 3s157 6 235 10 155 9 230 16c76 6 151 13 224 21 73 9 145 18 215 28s138 21 204 33 129 25 191 39c61 14 120 28 176 44 56 15 109 31 159 48 51 16 98 34 142 52 45 18 86 36 123 55 38 19 72 39 102 59s57 40 80 61 42 42 58 63c15 21 27 42 35 64 7 21 11 43 11 65z">
          <text:p/>
        </draw:path>
        <draw:path draw:style-name="gr81" draw:text-style-name="P26" draw:layer="layout" svg:width="4.843cm" svg:height="1.321cm" svg:x="17.316cm" svg:y="7.625cm" svg:viewBox="0 0 4844 1322" svg:d="M4844 661c0 21-4 43-11 64-8 22-20 43-35 64-16 22-35 43-58 63-23 21-50 41-80 61s-64 40-102 60c-37 19-78 38-123 56-44 18-91 35-141 52-51 16-104 32-160 48-56 15-115 29-176 43-62 14-125 27-191 39s-134 23-204 33-142 20-215 28-148 15-224 22c-75 6-152 11-230 15-78 5-156 8-235 10s-158 3-238 3c-79 0-158-1-237-3s-157-5-235-10c-78-4-155-9-231-15-76-7-150-14-223-22-74-8-145-18-215-28s-138-21-204-33-130-25-191-39-120-28-176-43c-56-16-109-32-160-48-50-17-97-34-141-52s-85-37-122-56c-38-20-72-40-102-60s-57-40-80-61c-23-20-42-41-58-63-15-21-27-42-35-64-8-21-11-43-11-64 0-22 3-44 11-65 8-22 20-43 35-64 16-21 35-42 58-63s50-41 80-61 64-40 102-59c37-19 78-37 122-55s91-36 141-52c51-17 104-33 160-48 56-16 115-30 176-44s125-27 191-39 134-23 204-33 141-19 215-28c73-8 147-15 223-21 76-7 153-12 231-16s156-8 235-10 158-3 237-3c80 0 159 1 238 3s157 6 235 10 155 9 230 16c76 6 151 13 224 21 73 9 145 18 215 28s138 21 204 33 129 25 191 39c61 14 120 28 176 44 56 15 109 31 159 48 51 16 98 34 142 52 45 18 86 36 123 55 38 19 72 39 102 59s57 40 80 61 42 42 58 63c15 21 27 42 35 64 7 21 11 43 11 65z">
          <text:p/>
        </draw:path>
        <draw:frame draw:style-name="gr82" draw:text-style-name="P64" draw:layer="layout" svg:width="1.328cm" svg:height="0.446cm" svg:x="19.201cm" svg:y="6.166cm">
          <draw:text-box>
            <text:p text:style-name="P3"><text:span text:style-name="T63">START</text:span></text:p>
          </draw:text-box>
        </draw:frame>
        <draw:line draw:style-name="gr81" draw:text-style-name="P26" draw:layer="layout" svg:x1="19.737cm" svg:y1="8.946cm" svg:x2="19.737cm" svg:y2="9.607cm">
          <text:p/>
        </draw:line>
        <draw:polygon draw:style-name="gr2" draw:text-style-name="P2" draw:layer="layout" svg:width="0.397cm" svg:height="0.396cm" svg:x="19.539cm" svg:y="9.25cm" svg:viewBox="0 0 398 397" draw:points="398,0 199,397 0,0">
          <text:p/>
        </draw:polygon>
        <draw:path draw:style-name="gr21" draw:text-style-name="P22" draw:layer="layout" svg:width="2.664cm" svg:height="5.108cm" svg:x="14.872cm" svg:y="8.484cm" svg:viewBox="0 0 2665 5109" svg:d="M2665 44h-176v-44h176zM2356 44h-177v-44h177zM2047 44h-176v-44h176zM1739 44h-176v-44h176zM1431 44h-176v-44h176zM1123 44h-177v-44h177zM814 44h-176v-44h176zM506 44h-176v-44h176zM198 44h-176v-44h176zM44 154v176h-44v-176zM44 462v176h-44v-176zM44 770v176h-44v-176zM44 1079v176h-44v-176zM44 1387v176h-44v-176zM44 1695v176h-44v-176zM44 2003v176h-44v-176zM44 2311v177h-44v-177zM44 2620v176h-44v-176zM44 2928v176h-44v-176zM44 3236v176h-44v-176zM44 3544v177h-44v-177zM44 3853v176h-44v-176zM44 4161v177h-44v-177zM44 4470v176h-44v-176zM44 4778v176h-44v-176zM22 5065h176v44h-176zM330 5065h176v44h-176zM638 5065h176v44h-176zM946 5065h177v44h-177zM1255 5065h176v44h-176zM1563 5065h176v44h-176zM1871 5065h176v44h-176zM2179 5065h177v44h-177z">
          <text:p/>
        </draw:path>
        <draw:frame draw:style-name="gr82" draw:text-style-name="P64" draw:layer="layout" svg:width="1.086cm" svg:height="0.446cm" svg:x="19.292cm" svg:y="8.147cm">
          <draw:text-box>
            <text:p text:style-name="P3"><text:span text:style-name="T63">SPEC</text:span></text:p>
          </draw:text-box>
        </draw:frame>
        <draw:path draw:style-name="gr31" draw:text-style-name="P32" draw:layer="layout" svg:width="4.843cm" svg:height="1.321cm" svg:x="17.316cm" svg:y="9.607cm" svg:viewBox="0 0 4844 1322" svg:d="M4844 661c0 22-4 43-11 65-8 21-20 43-35 64-16 21-35 42-58 63s-50 41-80 61-64 39-102 58c-37 20-78 38-123 56-44 18-91 35-141 52-51 17-104 33-160 48s-115 30-176 44c-62 13-125 26-191 38s-134 23-204 34c-70 10-142 19-215 27-73 9-148 16-224 22-75 6-152 12-230 16s-156 7-235 9c-79 3-158 4-238 4-79 0-158-1-237-4-79-2-157-5-235-9s-155-10-231-16-150-13-223-22c-74-8-145-17-215-27-70-11-138-22-204-34s-130-25-191-38c-61-14-120-29-176-44s-109-31-160-48c-50-17-97-34-141-52s-85-36-122-56c-38-19-72-38-102-58s-57-40-80-61-42-42-58-63c-15-21-27-43-35-64-8-22-11-43-11-65s3-43 11-65c8-21 20-43 35-64 16-21 35-42 58-63 23-20 50-41 80-61s64-39 102-58c37-19 78-38 122-56 44-19 91-36 141-53 51-17 104-33 160-48s115-30 176-43c61-14 125-27 191-39s134-23 204-33c70-11 141-20 215-28 73-8 147-16 223-22s153-12 231-16 156-7 235-9 158-3 237-3c80 0 159 1 238 3s157 5 235 9 155 10 230 16c76 6 151 14 224 22s145 17 215 28c70 10 138 21 204 33s129 25 191 39c61 13 120 28 176 43s109 31 159 48c51 17 98 34 142 53 45 18 86 37 123 56 38 19 72 38 102 58s57 41 80 61c23 21 42 42 58 63 15 21 27 43 35 64 7 22 11 43 11 65z">
          <text:p/>
        </draw:path>
        <draw:path draw:style-name="gr81" draw:text-style-name="P26" draw:layer="layout" svg:width="4.843cm" svg:height="1.321cm" svg:x="17.316cm" svg:y="9.607cm" svg:viewBox="0 0 4844 1322" svg:d="M4844 661c0 22-4 43-11 65-8 21-20 43-35 64-16 21-35 42-58 63s-50 41-80 61-64 39-102 58c-37 20-78 38-123 56-44 18-91 35-141 52-51 17-104 33-160 48s-115 30-176 44c-62 13-125 26-191 38s-134 23-204 34c-70 10-142 19-215 27-73 9-148 16-224 22-75 6-152 12-230 16s-156 7-235 9c-79 3-158 4-238 4-79 0-158-1-237-4-79-2-157-5-235-9s-155-10-231-16-150-13-223-22c-74-8-145-17-215-27-70-11-138-22-204-34s-130-25-191-38c-61-14-120-29-176-44s-109-31-160-48c-50-17-97-34-141-52s-85-36-122-56c-38-19-72-38-102-58s-57-40-80-61-42-42-58-63c-15-21-27-43-35-64-8-22-11-43-11-65s3-43 11-65c8-21 20-43 35-64 16-21 35-42 58-63 23-20 50-41 80-61s64-39 102-58c37-19 78-38 122-56 44-19 91-36 141-53 51-17 104-33 160-48s115-30 176-43c61-14 125-27 191-39s134-23 204-33c70-11 141-20 215-28 73-8 147-16 223-22s153-12 231-16 156-7 235-9 158-3 237-3c80 0 159 1 238 3s157 5 235 9 155 10 230 16c76 6 151 14 224 22s145 17 215 28c70 10 138 21 204 33s129 25 191 39c61 13 120 28 176 43s109 31 159 48c51 17 98 34 142 53 45 18 86 37 123 56 38 19 72 38 102 58s57 41 80 61c23 21 42 42 58 63 15 21 27 43 35 64 7 22 11 43 11 65z">
          <text:p/>
        </draw:path>
        <draw:frame draw:style-name="gr83" draw:text-style-name="P65" draw:layer="layout" svg:width="0.878cm" svg:height="0.344cm" draw:transform="rotate (1.5707963267949) translate (14.175cm 11.236cm)">
          <draw:text-box>
            <text:p text:style-name="P3"><text:span text:style-name="T64">Reject</text:span></text:p>
          </draw:text-box>
        </draw:frame>
        <draw:line draw:style-name="gr81" draw:text-style-name="P26" draw:layer="layout" svg:x1="19.737cm" svg:y1="10.928cm" svg:x2="19.737cm" svg:y2="11.588cm">
          <text:p/>
        </draw:line>
        <draw:polygon draw:style-name="gr2" draw:text-style-name="P2" draw:layer="layout" svg:width="0.397cm" svg:height="0.397cm" svg:x="19.539cm" svg:y="11.231cm" svg:viewBox="0 0 398 398" draw:points="398,0 199,398 0,0">
          <text:p/>
        </draw:polygon>
        <draw:path draw:style-name="gr12" draw:text-style-name="P13" draw:layer="layout" svg:width="4.843cm" svg:height="1.321cm" svg:x="17.316cm" svg:y="11.588cm" svg:viewBox="0 0 4844 1322" svg:d="M4844 661c0 21-4 43-11 64-8 22-20 43-35 64-16 22-35 43-58 63-23 21-50 41-80 61s-64 41-102 60c-37 19-78 38-123 56-44 17-91 35-141 52-51 16-104 32-160 48-56 15-115 29-176 43-62 14-125 27-191 39s-134 23-204 33-142 19-215 28c-73 8-148 15-224 22-75 6-152 11-230 15-78 5-156 8-235 10s-158 3-238 3c-79 0-158-1-237-3s-157-5-235-10c-78-4-155-9-231-15-76-7-150-14-223-22-74-9-145-18-215-28s-138-21-204-33-130-25-191-39-120-28-176-43c-56-16-109-32-160-48-50-17-97-35-141-52-44-18-85-37-122-56-38-19-72-40-102-60s-57-40-80-61c-23-20-42-41-58-63-15-21-27-42-35-64-8-21-11-43-11-64 0-22 3-44 11-65 8-22 20-43 35-64 16-22 35-42 58-63s50-41 80-61 64-40 102-59c37-19 78-37 122-55s91-36 141-52c51-17 104-33 160-48 56-16 115-30 176-44s125-27 191-39 134-23 204-33 141-19 215-28c73-8 147-15 223-21 76-7 153-12 231-16s156-8 235-10 158-3 237-3c80 0 159 1 238 3s157 6 235 10 155 9 230 16c76 6 151 13 224 21 73 9 145 18 215 28s138 21 204 33 129 25 191 39c61 14 120 28 176 44 56 15 109 31 159 48 51 16 98 34 142 52 45 18 86 36 123 55 38 19 72 39 102 59s57 40 80 61 42 41 58 63c15 21 27 42 35 64 7 21 11 43 11 65z">
          <text:p/>
        </draw:path>
        <draw:path draw:style-name="gr81" draw:text-style-name="P26" draw:layer="layout" svg:width="4.843cm" svg:height="1.321cm" svg:x="17.316cm" svg:y="11.588cm" svg:viewBox="0 0 4844 1322" svg:d="M4844 661c0 21-4 43-11 64-8 22-20 43-35 64-16 22-35 43-58 63-23 21-50 41-80 61s-64 41-102 60c-37 19-78 38-123 56-44 17-91 35-141 52-51 16-104 32-160 48-56 15-115 29-176 43-62 14-125 27-191 39s-134 23-204 33-142 19-215 28c-73 8-148 15-224 22-75 6-152 11-230 15-78 5-156 8-235 10s-158 3-238 3c-79 0-158-1-237-3s-157-5-235-10c-78-4-155-9-231-15-76-7-150-14-223-22-74-9-145-18-215-28s-138-21-204-33-130-25-191-39-120-28-176-43c-56-16-109-32-160-48-50-17-97-35-141-52-44-18-85-37-122-56-38-19-72-40-102-60s-57-40-80-61c-23-20-42-41-58-63-15-21-27-42-35-64-8-21-11-43-11-64 0-22 3-44 11-65 8-22 20-43 35-64 16-22 35-42 58-63s50-41 80-61 64-40 102-59c37-19 78-37 122-55s91-36 141-52c51-17 104-33 160-48 56-16 115-30 176-44s125-27 191-39 134-23 204-33 141-19 215-28c73-8 147-15 223-21 76-7 153-12 231-16s156-8 235-10 158-3 237-3c80 0 159 1 238 3s157 6 235 10 155 9 230 16c76 6 151 13 224 21 73 9 145 18 215 28s138 21 204 33 129 25 191 39c61 14 120 28 176 44 56 15 109 31 159 48 51 16 98 34 142 52 45 18 86 36 123 55 38 19 72 39 102 59s57 40 80 61 42 41 58 63c15 21 27 42 35 64 7 21 11 43 11 65z">
          <text:p/>
        </draw:path>
        <draw:frame draw:style-name="gr82" draw:text-style-name="P64" draw:layer="layout" svg:width="1.085cm" svg:height="0.446cm" svg:x="19.281cm" svg:y="10.129cm">
          <draw:text-box>
            <text:p text:style-name="P3"><text:span text:style-name="T63">PLAN</text:span></text:p>
          </draw:text-box>
        </draw:frame>
        <draw:line draw:style-name="gr81" draw:text-style-name="P26" draw:layer="layout" svg:x1="19.737cm" svg:y1="12.909cm" svg:x2="19.737cm" svg:y2="13.57cm">
          <text:p/>
        </draw:line>
        <draw:polygon draw:style-name="gr2" draw:text-style-name="P2" draw:layer="layout" svg:width="0.397cm" svg:height="0.396cm" svg:x="19.539cm" svg:y="13.213cm" svg:viewBox="0 0 398 397" draw:points="398,0 199,397 0,0">
          <text:p/>
        </draw:polygon>
        <draw:path draw:style-name="gr84" draw:text-style-name="P66" draw:layer="layout" svg:width="3.963cm" svg:height="1.321cm" svg:x="17.756cm" svg:y="13.57cm" svg:viewBox="0 0 3964 1322" svg:d="M3964 661c0 22-3 43-10 65-6 21-16 43-28 64-13 21-29 42-47 63-19 20-41 41-66 61s-52 39-83 58-64 38-100 56-75 35-116 52-85 33-130 48c-46 15-94 30-145 44-50 13-102 26-156 38s-109 23-167 34c-57 10-115 19-175 27-60 9-121 16-183 22s-125 12-189 16-128 7-192 9c-65 2-130 4-195 4-64 0-129-2-194-4-64-2-129-5-192-9-64-4-127-10-189-16s-123-13-183-22c-60-8-118-17-176-27-57-11-112-22-166-34s-106-25-157-38c-50-14-98-29-144-44s-89-31-130-48-80-34-116-52-70-37-100-56c-31-19-58-38-83-58s-47-41-66-61c-20-21-35-42-48-63s-22-43-29-64c-6-22-9-43-9-65s3-43 9-65c7-21 16-43 29-64s28-42 48-63c19-20 41-41 66-61s52-39 83-58c30-19 64-38 100-56 36-19 75-36 116-53s84-33 130-48 94-30 144-44c51-13 103-26 157-38s109-23 166-33c58-11 116-20 176-28s121-16 183-22 125-12 189-16c63-4 128-7 192-9 65-2 130-3 194-3 65 0 130 1 195 3 64 2 128 5 192 9s127 10 189 16 123 14 183 22 118 17 175 28c58 10 113 21 167 33s106 25 156 38c51 14 99 29 145 44 45 15 89 31 130 48s80 34 116 53c36 18 69 37 100 56s58 38 83 58 47 41 66 61c18 21 34 42 47 63 12 21 22 43 28 64 7 22 10 43 10 65z">
          <text:p/>
        </draw:path>
        <draw:path draw:style-name="gr85" draw:text-style-name="P26" draw:layer="layout" svg:width="3.963cm" svg:height="1.321cm" svg:x="17.756cm" svg:y="13.57cm" svg:viewBox="0 0 3964 1322" svg:d="M3964 661c0 22-3 43-10 65-6 21-16 43-28 64-13 21-29 42-47 63-19 20-41 41-66 61s-52 39-83 58-64 38-100 56-75 35-116 52-85 33-130 48c-46 15-94 30-145 44-50 13-102 26-156 38s-109 23-167 34c-57 10-115 19-175 27-60 9-121 16-183 22s-125 12-189 16-128 7-192 9c-65 2-130 4-195 4-64 0-129-2-194-4-64-2-129-5-192-9-64-4-127-10-189-16s-123-13-183-22c-60-8-118-17-176-27-57-11-112-22-166-34s-106-25-157-38c-50-14-98-29-144-44s-89-31-130-48-80-34-116-52-70-37-100-56c-31-19-58-38-83-58s-47-41-66-61c-20-21-35-42-48-63s-22-43-29-64c-6-22-9-43-9-65s3-43 9-65c7-21 16-43 29-64s28-42 48-63c19-20 41-41 66-61s52-39 83-58c30-19 64-38 100-56 36-19 75-36 116-53s84-33 130-48 94-30 144-44c51-13 103-26 157-38s109-23 166-33c58-11 116-20 176-28s121-16 183-22 125-12 189-16c63-4 128-7 192-9 65-2 130-3 194-3 65 0 130 1 195 3 64 2 128 5 192 9s127 10 189 16 123 14 183 22 118 17 175 28c58 10 113 21 167 33s106 25 156 38c51 14 99 29 145 44 45 15 89 31 130 48s80 34 116 53c36 18 69 37 100 56s58 38 83 58 47 41 66 61c18 21 34 42 47 63 12 21 22 43 28 64 7 22 10 43 10 65z">
          <text:p/>
        </draw:path>
        <draw:frame draw:style-name="gr82" draw:text-style-name="P64" draw:layer="layout" svg:width="2.324cm" svg:height="0.446cm" svg:x="18.75cm" svg:y="12.11cm">
          <draw:text-box>
            <text:p text:style-name="P3"><text:span text:style-name="T63">EXECUTION</text:span></text:p>
          </draw:text-box>
        </draw:frame>
        <draw:line draw:style-name="gr81" draw:text-style-name="P26" draw:layer="layout" svg:x1="19.737cm" svg:y1="14.891cm" svg:x2="19.737cm" svg:y2="15.551cm">
          <text:p/>
        </draw:line>
        <draw:polygon draw:style-name="gr2" draw:text-style-name="P2" draw:layer="layout" svg:width="0.397cm" svg:height="0.397cm" svg:x="19.539cm" svg:y="15.194cm" svg:viewBox="0 0 398 398" draw:points="398,0 199,398 0,0">
          <text:p/>
        </draw:polygon>
        <draw:path draw:style-name="gr86" draw:text-style-name="P67" draw:layer="layout" svg:width="3.083cm" svg:height="1.145cm" svg:x="18.196cm" svg:y="15.639cm" svg:viewBox="0 0 3084 1146" svg:d="M3084 573c0 18-3 37-8 56-5 18-12 37-22 55-10 19-22 37-37 55-14 18-31 35-51 53-19 17-41 34-64 50-24 17-50 33-78 49-28 15-58 30-90 45s-66 29-102 42c-36 14-73 26-112 38s-79 23-121 33c-42 11-86 21-130 29-45 9-90 17-137 24-46 8-94 14-142 19-49 6-97 10-147 14s-100 6-151 8c-50 2-100 3-151 3-50 0-100-1-151-3-50-2-100-4-149-8-50-4-99-8-147-14-48-5-96-11-142-19-47-7-93-15-137-24-45-8-88-18-130-29-42-10-82-21-121-33s-77-24-112-38c-36-13-70-27-102-42s-62-30-90-45c-28-16-54-32-78-49-24-16-45-33-64-50-20-18-37-35-51-53-15-18-27-36-37-55-10-18-17-37-22-55-5-19-8-38-8-56 0-19 3-38 8-57 5-18 12-37 22-55 10-19 22-37 37-55 14-18 31-35 51-53 19-17 40-34 64-50 24-17 50-33 78-49 28-15 58-30 90-45 32-14 66-28 102-41 35-14 73-26 112-38s79-23 121-33c42-11 85-20 130-29 44-9 90-17 137-24 46-8 94-14 142-19 48-6 97-10 147-14 49-4 99-6 149-8 51-2 101-3 151-3 51 0 101 1 151 3 51 2 101 4 151 8s98 8 147 14c48 5 96 11 142 19 47 7 92 15 137 24 44 9 88 18 130 29 42 10 82 21 121 33s76 24 112 38c36 13 70 27 102 41 32 15 62 30 90 45 28 16 54 32 78 49 23 16 45 33 64 50 20 18 37 35 51 53 15 18 27 36 37 55 10 18 17 37 22 55 5 19 8 38 8 57z">
          <text:p/>
        </draw:path>
        <draw:path draw:style-name="gr87" draw:text-style-name="P26" draw:layer="layout" svg:width="3.083cm" svg:height="1.145cm" svg:x="18.196cm" svg:y="15.639cm" svg:viewBox="0 0 3084 1146" svg:d="M3084 573c0 18-3 37-8 56-5 18-12 37-22 55-10 19-22 37-37 55-14 18-31 35-51 53-19 17-41 34-64 50-24 17-50 33-78 49-28 15-58 30-90 45s-66 29-102 42c-36 14-73 26-112 38s-79 23-121 33c-42 11-86 21-130 29-45 9-90 17-137 24-46 8-94 14-142 19-49 6-97 10-147 14s-100 6-151 8c-50 2-100 3-151 3-50 0-100-1-151-3-50-2-100-4-149-8-50-4-99-8-147-14-48-5-96-11-142-19-47-7-93-15-137-24-45-8-88-18-130-29-42-10-82-21-121-33s-77-24-112-38c-36-13-70-27-102-42s-62-30-90-45c-28-16-54-32-78-49-24-16-45-33-64-50-20-18-37-35-51-53-15-18-27-36-37-55-10-18-17-37-22-55-5-19-8-38-8-56 0-19 3-38 8-57 5-18 12-37 22-55 10-19 22-37 37-55 14-18 31-35 51-53 19-17 40-34 64-50 24-17 50-33 78-49 28-15 58-30 90-45 32-14 66-28 102-41 35-14 73-26 112-38s79-23 121-33c42-11 85-20 130-29 44-9 90-17 137-24 46-8 94-14 142-19 48-6 97-10 147-14 49-4 99-6 149-8 51-2 101-3 151-3 51 0 101 1 151 3 51 2 101 4 151 8s98 8 147 14c48 5 96 11 142 19 47 7 92 15 137 24 44 9 88 18 130 29 42 10 82 21 121 33s76 24 112 38c36 13 70 27 102 41 32 15 62 30 90 45 28 16 54 32 78 49 23 16 45 33 64 50 20 18 37 35 51 53 15 18 27 36 37 55 10 18 17 37 22 55 5 19 8 38 8 57z">
          <text:p/>
        </draw:path>
        <draw:frame draw:style-name="gr82" draw:text-style-name="P64" draw:layer="layout" svg:width="1.439cm" svg:height="0.446cm" svg:x="19.152cm" svg:y="14.092cm">
          <draw:text-box>
            <text:p text:style-name="P3"><text:span text:style-name="T63">VERIFY</text:span></text:p>
          </draw:text-box>
        </draw:frame>
        <draw:frame draw:style-name="gr82" draw:text-style-name="P64" draw:layer="layout" svg:width="1.152cm" svg:height="0.446cm" svg:x="19.244cm" svg:y="16.073cm">
          <draw:text-box>
            <text:p text:style-name="P3"><text:span text:style-name="T65">DONE</text:span></text:p>
          </draw:text-box>
        </draw:frame>
        <draw:polygon draw:style-name="gr6" draw:text-style-name="P7" draw:layer="layout" svg:width="0.714cm" svg:height="0.635cm" svg:x="25.479cm" svg:y="18.388cm" svg:viewBox="0 0 715 636" draw:points="0,0 715,0 715,636 0,636">
          <text:p/>
        </draw:polygon>
        <draw:frame draw:style-name="gr83" draw:text-style-name="P65" draw:layer="layout" svg:width="6.066cm" svg:height="0.344cm" svg:x="16.898cm" svg:y="16.946cm">
          <draw:text-box>
            <text:p text:style-name="P3"><text:span text:style-name="T66">State saved to .agent/ before each transition</text:span></text:p>
          </draw:text-box>
        </draw:frame>
        <draw:frame draw:style-name="gr7" draw:text-style-name="P8" draw:layer="layout" svg:width="0.412cm" svg:height="0.412cm" svg:x="25.617cm" svg:y="18.503cm">
          <draw:text-box>
            <text:p text:style-name="P3"><text:span text:style-name="T6">24</text:span></text:p>
          </draw:text-box>
        </draw:frame>
      </draw:page>
      <draw:page draw:name="page25"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912cm" svg:height="8.149cm" svg:x="0.502cm" svg:y="6.35cm" svg:viewBox="0 0 12913 8150" svg:d="M31 30c21-20 46-30 75-30h12701c29 0 54 10 75 30 21 21 31 46 31 75v7939c0 29-10 54-31 75-21 20-46 31-75 31h-12701c-29 0-54-11-75-31-20-21-31-46-31-75v-7939c0-29 11-54 31-75z">
          <text:p/>
        </draw:path>
        <draw:path draw:style-name="gr2" draw:text-style-name="P2" draw:layer="layout" svg:width="12.834cm" svg:height="0.051cm" svg:x="0.55cm" svg:y="6.35cm" svg:viewBox="0 0 12835 52" svg:d="M12816 52c0-2 0-2-1-3-15-15-34-23-56-23h-12701c-4 0-7 2-10 6l-48-16c17-11 36-16 58-16h12701c29 0 54 10 75 30 0 1 1 1 1 2z">
          <text:p/>
        </draw:path>
        <draw:path draw:style-name="gr2" draw:text-style-name="P2" draw:layer="layout" svg:width="12.834cm" svg:height="0.051cm" svg:x="0.55cm" svg:y="14.448cm" svg:viewBox="0 0 12835 52" svg:d="M48 19c3 4 6 6 10 6h12701c22 0 41-8 56-24 1 0 1-1 1-1l19 19c0 1-1 1-1 2-21 20-46 31-75 31h-12701c-22 0-41-6-58-17z">
          <text:p/>
        </draw:path>
        <draw:path draw:style-name="gr2" draw:text-style-name="P2" draw:layer="layout" svg:width="0.05cm" svg:height="8.088cm" svg:x="13.364cm" svg:y="6.38cm" svg:viewBox="0 0 51 8089" svg:d="M0 8070c16-16 23-34 23-56v-7939c0-22-7-40-23-56l19-19c22 21 32 46 32 75v7939c0 29-10 54-32 75z">
          <text:p/>
        </draw:path>
        <draw:polygon draw:style-name="gr21" draw:text-style-name="P22" draw:layer="layout" svg:width="12.912cm" svg:height="8.149cm" svg:x="0.502cm" svg:y="6.35cm" svg:viewBox="0 0 12913 8150" draw:points="0,0 12913,0 12913,8150 0,8150">
          <text:p/>
        </draw:polygon>
        <draw:frame draw:style-name="gr9" draw:text-style-name="P10" draw:layer="layout" svg:width="19.155cm" svg:height="1.119cm" svg:x="3.003cm" svg:y="4.598cm">
          <draw:text-box>
            <text:p text:style-name="P3"><text:span text:style-name="T7">APPROVALGATEWAY &amp; AUDIT LOGGER</text:span></text:p>
          </draw:text-box>
        </draw:frame>
        <draw:frame draw:style-name="gr20" draw:text-style-name="P21" draw:layer="layout" svg:width="6.161cm" svg:height="0.666cm" svg:x="1.101cm" svg:y="6.766cm">
          <draw:text-box>
            <text:p text:style-name="P3"><text:span text:style-name="T20">APPROVALGATEWAY</text:span></text:p>
          </draw:text-box>
        </draw:frame>
        <draw:path draw:style-name="gr8" draw:text-style-name="P9" draw:layer="layout" svg:width="11.747cm" svg:height="3.889cm" svg:x="14.155cm" svg:y="6.35cm" svg:viewBox="0 0 11748 3890" svg:d="M31 30c20-20 45-30 74-30h11537c30 0 55 10 75 30 21 21 31 46 31 75v3679c0 29-10 54-31 75-20 21-45 31-75 31h-11536c-30 0-55-10-75-31-21-21-31-46-31-75v-3679c0-29 10-54 31-75z">
          <text:p/>
        </draw:path>
        <draw:path draw:style-name="gr2" draw:text-style-name="P2" draw:layer="layout" svg:width="11.67cm" svg:height="0.051cm" svg:x="14.203cm" svg:y="6.35cm" svg:viewBox="0 0 11671 52" svg:d="M11652 52c-1-2-1-2-2-3-15-15-34-23-56-23h-11536c-4 0-8 2-11 6l-47-16c17-11 36-16 57-16h11537c30 0 55 10 75 30 1 1 1 1 2 2z">
          <text:p/>
        </draw:path>
        <draw:path draw:style-name="gr2" draw:text-style-name="P2" draw:layer="layout" svg:width="11.67cm" svg:height="0.051cm" svg:x="14.203cm" svg:y="10.188cm" svg:viewBox="0 0 11671 52" svg:d="M47 18c3 4 7 6 11 6h11536c22 0 41-7 56-23 1 0 1-1 2-1l19 19c-1 0-1 0-2 1-20 22-45 32-75 32h-11536c-22 0-41-6-58-18z">
          <text:p/>
        </draw:path>
        <draw:path draw:style-name="gr2" draw:text-style-name="P2" draw:layer="layout" svg:width="0.05cm" svg:height="3.828cm" svg:x="25.852cm" svg:y="6.38cm" svg:viewBox="0 0 51 3829" svg:d="M0 3810c16-15 24-34 24-56v-3679c0-22-8-40-24-56l19-19c21 21 32 46 32 75v3679c0 29-11 54-32 75z">
          <text:p/>
        </draw:path>
        <draw:polygon draw:style-name="gr2" draw:text-style-name="P2" draw:layer="layout" svg:width="11.747cm" svg:height="3.889cm" svg:x="14.155cm" svg:y="6.35cm" svg:viewBox="0 0 11748 3890" draw:points="0,0 11748,0 11748,3890 0,3890">
          <text:p/>
        </draw:polygon>
        <draw:path draw:style-name="gr8" draw:text-style-name="P9" draw:layer="layout" svg:width="11.747cm" svg:height="4.022cm" svg:x="14.155cm" svg:y="10.477cm" svg:viewBox="0 0 11748 4023" svg:d="M31 31c20-21 45-31 74-31h11537c30 0 55 10 75 31 21 21 31 46 31 75v3811c0 29-10 54-31 75-20 20-45 31-75 31h-11536c-30 0-55-11-75-31-21-21-31-46-31-75v-3811c0-29 10-54 31-75z">
          <text:p/>
        </draw:path>
        <draw:path draw:style-name="gr2" draw:text-style-name="P2" draw:layer="layout" svg:width="11.67cm" svg:height="0.051cm" svg:x="14.203cm" svg:y="10.477cm" svg:viewBox="0 0 11671 52" svg:d="M11652 52c-1 0-1-1-2-1-15-16-34-24-56-24h-11536c-4 0-8 3-11 7l-47-16c17-11 36-18 57-18h11537c30 0 55 11 75 32 1 0 1 1 2 1z">
          <text:p/>
        </draw:path>
        <draw:path draw:style-name="gr2" draw:text-style-name="P2" draw:layer="layout" svg:width="11.67cm" svg:height="0.051cm" svg:x="14.203cm" svg:y="14.448cm" svg:viewBox="0 0 11671 52" svg:d="M47 19c3 4 7 6 11 6h11536c22 0 41-8 56-24 1 0 1-1 2-1l19 19c-1 1-1 1-2 2-20 20-45 31-75 31h-11536c-22 0-41-6-58-17z">
          <text:p/>
        </draw:path>
        <draw:path draw:style-name="gr2" draw:text-style-name="P2" draw:layer="layout" svg:width="0.05cm" svg:height="3.96cm" svg:x="25.852cm" svg:y="10.508cm" svg:viewBox="0 0 51 3961" svg:d="M0 3942c16-16 24-34 24-56v-3811c0-22-8-41-24-56l19-19c21 21 32 46 32 75v3811c0 29-11 54-32 75z">
          <text:p/>
        </draw:path>
        <draw:polygon draw:style-name="gr2" draw:text-style-name="P2" draw:layer="layout" svg:width="11.747cm" svg:height="4.022cm" svg:x="14.155cm" svg:y="10.477cm" svg:viewBox="0 0 11748 4023" draw:points="0,0 11748,0 11748,4023 0,4023">
          <text:p/>
        </draw:polygon>
        <draw:frame draw:style-name="gr7" draw:text-style-name="P8" draw:layer="layout" svg:width="9.993cm" svg:height="0.412cm" svg:x="1.101cm" svg:y="7.523cm">
          <draw:text-box>
            <text:p text:style-name="P3"><text:span text:style-name="T36">Single chokepoint for all code-modifying operations. </text:span><text:span text:style-name="T54">35 lines.</text:span></text:p>
          </draw:text-box>
        </draw:frame>
        <draw:frame draw:style-name="gr20" draw:text-style-name="P21" draw:layer="layout" svg:width="4.481cm" svg:height="0.666cm" svg:x="14.668cm" svg:y="6.66cm">
          <draw:text-box>
            <text:p text:style-name="P3"><text:span text:style-name="T38">AUDIT LOGGER</text:span></text:p>
          </draw:text-box>
        </draw:frame>
        <draw:path draw:style-name="gr17" draw:text-style-name="P18" draw:layer="layout" svg:width="0.159cm" svg:height="0.158cm" svg:x="14.631cm" svg:y="8.202cm" svg:viewBox="0 0 160 159" svg:d="M160 79c0 10-2 22-6 31-4 10-10 19-19 26-7 7-16 13-25 17-10 4-20 6-31 6-10 0-20-2-30-6s-18-10-26-17c-7-7-13-16-17-26-4-9-6-21-6-31 0-11 2-21 6-30 4-10 10-19 17-26 8-8 16-13 26-17s20-6 30-6c11 0 21 2 31 6 9 4 18 9 25 17 9 7 15 16 19 26 4 9 6 19 6 30z">
          <text:p/>
        </draw:path>
        <draw:frame draw:style-name="gr7" draw:text-style-name="P8" draw:layer="layout" svg:width="3.4cm" svg:height="0.412cm" svg:x="14.668cm" svg:y="7.417cm">
          <draw:text-box>
            <text:p text:style-name="P3"><text:span text:style-name="T36">Dual-stream logging:</text:span></text:p>
          </draw:text-box>
        </draw:frame>
        <draw:path draw:style-name="gr33" draw:text-style-name="P34" draw:layer="layout" svg:width="4.63cm" svg:height="0.609cm" svg:x="16.43cm" svg:y="7.963cm" svg:viewBox="0 0 4631 610" svg:d="M0 531v-451c0-11 2-21 6-31 4-9 10-18 17-25 8-8 16-14 26-18s20-6 30-6h4473c10 0 21 2 30 6 10 4 19 10 26 18 8 7 13 16 17 25 4 10 6 20 6 31v451c0 10-2 20-6 30s-9 18-17 26c-7 7-16 13-26 17-9 4-20 6-30 6h-4473c-10 0-20-2-30-6s-18-10-26-17c-7-8-13-16-17-26s-6-20-6-30z">
          <text:p/>
        </draw:path>
        <draw:frame draw:style-name="gr18" draw:text-style-name="P19" draw:layer="layout" svg:width="1.557cm" svg:height="0.539cm" svg:x="15.102cm" svg:y="7.978cm">
          <draw:text-box>
            <text:p text:style-name="P3"><text:span text:style-name="T16">Local:</text:span><text:span text:style-name="T17"> </text:span></text:p>
          </draw:text-box>
        </draw:frame>
        <draw:frame draw:style-name="gr75" draw:text-style-name="P59" draw:layer="layout" svg:width="3.107cm" svg:height="0.463cm" svg:x="16.532cm" svg:y="8.037cm">
          <draw:text-box>
            <text:p text:style-name="P3"><text:span text:style-name="T58">.agent/audit.jsonl</text:span></text:p>
          </draw:text-box>
        </draw:frame>
        <draw:path draw:style-name="gr17" draw:text-style-name="P18" draw:layer="layout" svg:width="0.159cm" svg:height="0.158cm" svg:x="14.631cm" svg:y="8.837cm" svg:viewBox="0 0 160 159" svg:d="M160 79c0 10-2 22-6 31-4 10-10 19-19 26-7 7-16 13-25 17-10 4-20 6-31 6-10 0-20-2-30-6s-18-10-26-17c-7-7-13-16-17-26-4-9-6-21-6-31 0-11 2-21 6-30 4-10 10-19 17-26 8-8 16-13 26-17s20-6 30-6c11 0 21 2 31 6 9 4 18 9 25 17 9 7 15 16 19 26 4 9 6 19 6 30z">
          <text:p/>
        </draw:path>
        <draw:frame draw:style-name="gr18" draw:text-style-name="P19" draw:layer="layout" svg:width="3.972cm" svg:height="0.539cm" svg:x="21.055cm" svg:y="7.978cm">
          <draw:text-box>
            <text:p text:style-name="P3"><text:span text:style-name="T17"><text:s/>— tool-level detail</text:span></text:p>
          </draw:text-box>
        </draw:frame>
        <draw:path draw:style-name="gr33" draw:text-style-name="P34" draw:layer="layout" svg:width="8.573cm" svg:height="0.582cm" svg:x="16.668cm" svg:y="8.625cm" svg:viewBox="0 0 8574 583" svg:d="M0 504v-425c0-10 2-20 6-30s10-18 17-26c8-7 17-13 26-17 10-4 20-6 31-6h8414c11 0 21 2 31 6 9 4 18 10 25 17 8 8 14 16 18 26s6 20 6 30v425c0 10-2 20-6 30s-10 18-18 26c-7 7-16 13-25 17-10 4-20 6-31 6h-8414c-11 0-21-2-31-6-9-4-18-10-26-17-7-8-13-16-17-26s-6-20-6-30z">
          <text:p/>
        </draw:path>
        <draw:frame draw:style-name="gr18" draw:text-style-name="P19" draw:layer="layout" svg:width="1.798cm" svg:height="0.539cm" svg:x="15.102cm" svg:y="8.613cm">
          <draw:text-box>
            <text:p text:style-name="P3"><text:span text:style-name="T16">Global:</text:span><text:span text:style-name="T17"> </text:span></text:p>
          </draw:text-box>
        </draw:frame>
        <draw:frame draw:style-name="gr75" draw:text-style-name="P59" draw:layer="layout" svg:width="5.994cm" svg:height="0.463cm" svg:x="16.777cm" svg:y="8.699cm">
          <draw:text-box>
            <text:p text:style-name="P3"><text:span text:style-name="T58">~/.config/corge/global_audit.jsonl</text:span></text:p>
          </draw:text-box>
        </draw:frame>
        <draw:frame draw:style-name="gr18" draw:text-style-name="P19" draw:layer="layout" svg:width="5.822cm" svg:height="0.539cm" svg:x="15.102cm" svg:y="9.248cm">
          <draw:text-box>
            <text:p text:style-name="P3"><text:span text:style-name="T17">— cross-project milestones</text:span></text:p>
          </draw:text-box>
        </draw:frame>
        <draw:path draw:style-name="gr17" draw:text-style-name="P18" draw:layer="layout" svg:width="0.159cm" svg:height="0.159cm" svg:x="14.631cm" svg:y="11.773cm" svg:viewBox="0 0 160 160" svg:d="M160 80c0 10-2 20-6 30s-10 18-19 26c-7 7-16 13-25 17-10 5-20 7-31 7-10 0-20-2-30-7-10-4-18-10-26-17-7-8-13-16-17-26s-6-20-6-30c0-11 2-21 6-31 4-9 10-18 17-25 8-8 16-14 26-18s20-6 30-6c11 0 21 2 31 6 9 4 18 10 25 18 9 7 15 16 19 25 4 10 6 20 6 31z">
          <text:p/>
        </draw:path>
        <draw:frame draw:style-name="gr20" draw:text-style-name="P21" draw:layer="layout" svg:width="8.201cm" svg:height="0.666cm" svg:x="14.668cm" svg:y="10.761cm">
          <draw:text-box>
            <text:p text:style-name="P3"><text:span text:style-name="T38">SAFETY BY CONSTRUCTION</text:span></text:p>
          </draw:text-box>
        </draw:frame>
        <draw:path draw:style-name="gr17" draw:text-style-name="P18" draw:layer="layout" svg:width="0.159cm" svg:height="0.159cm" svg:x="14.631cm" svg:y="12.435cm" svg:viewBox="0 0 160 160" svg:d="M160 79c0 11-2 21-6 31-4 9-10 19-19 26-7 8-16 14-25 18-10 4-20 6-31 6-10 0-20-2-30-6s-18-10-26-18c-7-7-13-17-17-26-4-10-6-20-6-31 0-10 2-20 6-30s10-18 17-26c8-7 16-13 26-17s20-6 30-6c11 0 21 2 31 6 9 4 18 10 25 17 9 8 15 16 19 26s6 20 6 30z">
          <text:p/>
        </draw:path>
        <draw:frame draw:style-name="gr18" draw:text-style-name="P19" draw:layer="layout" svg:width="4.375cm" svg:height="0.539cm" svg:x="15.102cm" svg:y="11.55cm">
          <draw:text-box>
            <text:p text:style-name="P3"><text:span text:style-name="T17">Read auto-approves</text:span></text:p>
          </draw:text-box>
        </draw:frame>
        <draw:path draw:style-name="gr17" draw:text-style-name="P18" draw:layer="layout" svg:width="0.159cm" svg:height="0.159cm" svg:x="14.631cm" svg:y="13.07cm" svg:viewBox="0 0 160 160" svg:d="M160 79c0 11-2 21-6 31-4 9-10 19-19 26-7 8-16 14-25 18-10 4-20 6-31 6-10 0-20-2-30-6s-18-10-26-18c-7-7-13-17-17-26-4-10-6-20-6-31 0-10 2-20 6-30s10-18 17-26c8-7 16-13 26-17s20-6 30-6c11 0 21 2 31 6 9 4 18 10 25 17 9 8 15 16 19 26s6 20 6 30z">
          <text:p/>
        </draw:path>
        <draw:frame draw:style-name="gr18" draw:text-style-name="P19" draw:layer="layout" svg:width="8.961cm" svg:height="0.539cm" svg:x="15.102cm" svg:y="12.211cm">
          <draw:text-box>
            <text:p text:style-name="P3"><text:span text:style-name="T17">Write/Edit/Bash blocks for human consent</text:span></text:p>
          </draw:text-box>
        </draw:frame>
        <draw:path draw:style-name="gr33" draw:text-style-name="P34" draw:layer="layout" svg:width="1.693cm" svg:height="0.582cm" svg:x="16.007cm" svg:y="12.858cm" svg:viewBox="0 0 1694 583" svg:d="M0 504v-424c0-11 2-21 6-31s10-18 17-26c7-7 16-13 26-17s20-6 31-6h1535c10 0 20 2 30 6s18 10 26 17c7 8 13 16 17 26s6 20 6 31v424c0 10-2 21-6 30-4 10-10 19-17 26-8 7-16 13-26 17s-20 6-30 6h-1535c-11 0-21-2-31-6s-19-10-26-17-13-16-17-26c-4-9-6-20-6-30z">
          <text:p/>
        </draw:path>
        <draw:frame draw:style-name="gr18" draw:text-style-name="P19" draw:layer="layout" svg:width="1.021cm" svg:height="0.539cm" svg:x="15.102cm" svg:y="12.846cm">
          <draw:text-box>
            <text:p text:style-name="P3"><text:span text:style-name="T17">Live </text:span></text:p>
          </draw:text-box>
        </draw:frame>
        <draw:frame draw:style-name="gr75" draw:text-style-name="P59" draw:layer="layout" svg:width="1.177cm" svg:height="0.463cm" svg:x="16.114cm" svg:y="12.932cm">
          <draw:text-box>
            <text:p text:style-name="P3"><text:span text:style-name="T58">Ctrl+D</text:span></text:p>
          </draw:text-box>
        </draw:frame>
        <draw:path draw:style-name="gr17" draw:text-style-name="P18" draw:layer="layout" svg:width="0.159cm" svg:height="0.159cm" svg:x="14.631cm" svg:y="13.731cm" svg:viewBox="0 0 160 160" svg:d="M160 80c0 10-2 21-6 31s-10 18-19 26c-7 7-16 13-25 17-10 4-20 6-31 6-10 0-20-2-30-6s-18-10-26-17c-7-8-13-16-17-26s-6-21-6-31c0-11 2-21 6-31 4-9 10-18 17-25 8-8 16-14 26-18s20-6 30-6c11 0 21 2 31 6 9 4 18 10 25 18 9 7 15 16 19 25 4 10 6 20 6 31z">
          <text:p/>
        </draw:path>
        <draw:frame draw:style-name="gr18" draw:text-style-name="P19" draw:layer="layout" svg:width="6.058cm" svg:height="0.539cm" svg:x="17.69cm" svg:y="12.846cm">
          <draw:text-box>
            <text:p text:style-name="P3"><text:span text:style-name="T17"><text:s/>code diﬀs before any action</text:span></text:p>
          </draw:text-box>
        </draw:frame>
        <draw:path draw:style-name="gr76" draw:text-style-name="P60" draw:layer="layout" svg:width="11.701cm" svg:height="3.895cm" svg:x="0.55cm" svg:y="7.67cm" svg:viewBox="0 0 11702 3896" svg:d="M587 532v2567c0 22 8 41 23 56 16 16 35 23 57 23h10372c22 0 41-7 56-23 16-15 24-34 24-56v-2567c0-22-8-41-24-57-15-15-34-23-56-23h-10372c-22 0-41 8-57 23-15 16-23 35-23 57zM0 0h11702v3896h-11702z">
          <text:p/>
        </draw:path>
        <draw:path draw:style-name="gr77" draw:text-style-name="P61" draw:layer="layout" svg:width="10.583cm" svg:height="2.778cm" svg:x="1.111cm" svg:y="8.096cm" svg:viewBox="0 0 10584 2779" svg:d="M0 2673v-2567c0-14 2-28 8-41 5-13 13-24 23-34s21-18 34-23c13-6 27-8 41-8h10372c14 0 28 2 41 8 13 5 24 13 34 23s18 21 23 34 8 27 8 41v2567c0 14-3 27-8 40s-13 25-23 35-21 17-34 23c-13 5-27 8-41 8h-10372c-14 0-28-3-41-8-13-6-24-13-34-23s-18-22-23-35c-6-13-8-26-8-40z">
          <text:p/>
        </draw:path>
        <draw:frame draw:style-name="gr18" draw:text-style-name="P19" draw:layer="layout" svg:width="5.34cm" svg:height="0.539cm" svg:x="15.102cm" svg:y="13.508cm">
          <draw:text-box>
            <text:p text:style-name="P3"><text:span text:style-name="T17">Every decision is audited</text:span></text:p>
          </draw:text-box>
        </draw:frame>
        <draw:frame draw:style-name="gr88" draw:text-style-name="P68" draw:layer="layout" svg:width="3.181cm" svg:height="0.332cm" svg:x="1.308cm" svg:y="8.251cm">
          <draw:text-box>
            <text:p text:style-name="P3"><text:span text:style-name="T67">class ApprovalGateway:</text:span></text:p>
          </draw:text-box>
        </draw:frame>
        <draw:frame draw:style-name="gr88" draw:text-style-name="P68" draw:layer="layout" svg:width="6.516cm" svg:height="0.332cm" svg:x="1.308cm" svg:y="8.595cm">
          <draw:text-box>
            <text:p text:style-name="P3"><text:span text:style-name="T67"><text:s text:c="4"/>def approve(self, request) .&gt; ApprovalDecision:</text:span></text:p>
          </draw:text-box>
        </draw:frame>
        <draw:frame draw:style-name="gr88" draw:text-style-name="P68" draw:layer="layout" svg:width="5.561cm" svg:height="0.332cm" svg:x="1.308cm" svg:y="8.939cm">
          <draw:text-box>
            <text:p text:style-name="P3"><text:span text:style-name="T67"><text:s text:c="8"/>if request.action .= ToolAction.READ:</text:span></text:p>
          </draw:text-box>
        </draw:frame>
        <draw:frame draw:style-name="gr88" draw:text-style-name="P68" draw:layer="layout" svg:width="3.493cm" svg:height="0.332cm" svg:x="1.308cm" svg:y="9.31cm">
          <draw:text-box>
            <text:p text:style-name="P3"><text:span text:style-name="T67"><text:s text:c="12"/>return APPROVED</text:span></text:p>
          </draw:text-box>
        </draw:frame>
        <draw:frame draw:style-name="gr88" draw:text-style-name="P68" draw:layer="layout" svg:width="6.583cm" svg:height="0.332cm" svg:x="1.308cm" svg:y="9.654cm">
          <draw:text-box>
            <text:p text:style-name="P3"><text:span text:style-name="T67"><text:s text:c="8"/>decision = self._ui.request_approval(request)</text:span></text:p>
          </draw:text-box>
        </draw:frame>
        <draw:frame draw:style-name="gr88" draw:text-style-name="P68" draw:layer="layout" svg:width="7.662cm" svg:height="0.332cm" svg:x="1.308cm" svg:y="10.024cm">
          <draw:text-box>
            <text:p text:style-name="P3"><text:span text:style-name="T67"><text:s text:c="8"/>self._audit_logger.record_approval(request, decision)</text:span></text:p>
          </draw:text-box>
        </draw:frame>
        <draw:polygon draw:style-name="gr6" draw:text-style-name="P7" draw:layer="layout" svg:width="0.714cm" svg:height="0.635cm" svg:x="25.479cm" svg:y="18.388cm" svg:viewBox="0 0 715 636" draw:points="0,0 715,0 715,636 0,636">
          <text:p/>
        </draw:polygon>
        <draw:frame draw:style-name="gr88" draw:text-style-name="P68" draw:layer="layout" svg:width="2.604cm" svg:height="0.332cm" svg:x="1.308cm" svg:y="10.368cm">
          <draw:text-box>
            <text:p text:style-name="P3"><text:span text:style-name="T67"><text:s text:c="8"/>return decision</text:span></text:p>
          </draw:text-box>
        </draw:frame>
        <draw:frame draw:style-name="gr7" draw:text-style-name="P8" draw:layer="layout" svg:width="0.412cm" svg:height="0.412cm" svg:x="25.617cm" svg:y="18.503cm">
          <draw:text-box>
            <text:p text:style-name="P3"><text:span text:style-name="T6">25</text:span></text:p>
          </draw:text-box>
        </draw:frame>
      </draw:page>
      <draw:page draw:name="page26"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12.936cm" svg:height="1.119cm" svg:x="6.364cm" svg:y="2.614cm">
          <draw:text-box>
            <text:p text:style-name="P3"><text:span text:style-name="T7">SELF-IMPROVING AGENTS</text:span></text:p>
          </draw:text-box>
        </draw:frame>
        <draw:frame draw:style-name="gr13" draw:text-style-name="P14" draw:layer="layout" svg:width="26.227cm" svg:height="0.454cm" svg:x="0.503cm" svg:y="4.314cm">
          <draw:text-box>
            <text:p text:style-name="P3"><text:span text:style-name="T10">The system learns from every session. After each project, a </text:span><text:span text:style-name="T35">batch-phase heuristic updater</text:span><text:span text:style-name="T10"> analyzes the argumentation log and adjusts the spec</text:span></text:p>
          </draw:text-box>
        </draw:frame>
        <draw:path draw:style-name="gr8" draw:text-style-name="P9" draw:layer="layout" svg:width="12.33cm" svg:height="4.021cm" svg:x="0.502cm" svg:y="6.138cm" svg:viewBox="0 0 12331 4022" svg:d="M31 31c21-21 46-31 75-31h12119c29 0 54 10 75 31 20 20 31 45 31 75v3811c0 29-11 54-31 75-21 20-46 30-75 30h-12119c-29 0-54-10-75-30-20-21-31-46-31-75v-3811c0-30 11-55 31-75z">
          <text:p/>
        </draw:path>
        <draw:path draw:style-name="gr2" draw:text-style-name="P2" draw:layer="layout" svg:width="12.252cm" svg:height="0.051cm" svg:x="0.55cm" svg:y="6.138cm" svg:viewBox="0 0 12253 52" svg:d="M12234 52c0-1 0-1-1-1-15-16-34-24-56-24h-12119c-4 0-7 2-10 7l-48-16c17-13 36-18 58-18h12119c29 0 54 11 75 32l1 1z">
          <text:p/>
        </draw:path>
        <draw:path draw:style-name="gr2" draw:text-style-name="P2" draw:layer="layout" svg:width="12.252cm" svg:height="0.051cm" svg:x="0.55cm" svg:y="10.108cm" svg:viewBox="0 0 12253 52" svg:d="M48 20c3 4 6 6 10 6h12119c22 0 41-8 56-24 1-1 1-1 1-2l19 20c0 1-1 1-1 2-21 20-46 30-75 30h-12119c-22 0-41-5-58-16z">
          <text:p/>
        </draw:path>
        <draw:path draw:style-name="gr2" draw:text-style-name="P2" draw:layer="layout" svg:width="0.05cm" svg:height="3.96cm" svg:x="12.782cm" svg:y="6.169cm" svg:viewBox="0 0 51 3961" svg:d="M0 3942c16-16 23-34 23-56v-3811c0-22-7-41-23-56l19-19c21 20 32 45 32 75v3811c0 29-11 54-32 75z">
          <text:p/>
        </draw:path>
        <draw:polygon draw:style-name="gr2" draw:text-style-name="P2" draw:layer="layout" svg:width="12.33cm" svg:height="4.022cm" svg:x="0.502cm" svg:y="6.138cm" svg:viewBox="0 0 12331 4023" draw:points="0,0 12331,0 12331,4023 0,4023">
          <text:p/>
        </draw:polygon>
        <draw:path draw:style-name="gr8" draw:text-style-name="P9" draw:layer="layout" svg:width="12.33cm" svg:height="4.63cm" svg:x="0.502cm" svg:y="10.398cm" svg:viewBox="0 0 12331 4631" svg:d="M31 31c21-21 46-31 75-31h12119c29 0 54 10 75 31 20 20 31 45 31 74v4420c0 29-11 54-31 75-21 20-46 31-75 31h-12119c-29 0-54-11-75-31-20-21-31-46-31-75v-4420c0-29 11-54 31-74z">
          <text:p/>
        </draw:path>
        <draw:path draw:style-name="gr2" draw:text-style-name="P2" draw:layer="layout" svg:width="12.252cm" svg:height="0.051cm" svg:x="0.55cm" svg:y="10.398cm" svg:viewBox="0 0 12253 52" svg:d="M12234 52c0-1 0-1-1-2-15-15-34-24-56-24h-12119c-4 0-7 2-10 7l-48-16c17-12 36-17 58-17h12119c29 0 54 10 75 31l1 2z">
          <text:p/>
        </draw:path>
        <draw:path draw:style-name="gr2" draw:text-style-name="P2" draw:layer="layout" svg:width="12.252cm" svg:height="0.051cm" svg:x="0.55cm" svg:y="14.977cm" svg:viewBox="0 0 12253 52" svg:d="M48 18c3 4 6 6 10 6h12119c22 0 41-7 56-23 1 0 1-1 1-1l19 19c0 0-1 0-1 1-21 20-46 32-75 32h-12119c-22 0-41-6-58-18z">
          <text:p/>
        </draw:path>
        <draw:path draw:style-name="gr2" draw:text-style-name="P2" draw:layer="layout" svg:width="0.05cm" svg:height="4.568cm" svg:x="12.782cm" svg:y="10.429cm" svg:viewBox="0 0 51 4569" svg:d="M0 4550c16-15 23-34 23-56v-4420c0-21-7-40-23-56l19-18c21 20 32 45 32 74v4420c0 29-11 54-32 75z">
          <text:p/>
        </draw:path>
        <draw:polygon draw:style-name="gr2" draw:text-style-name="P2" draw:layer="layout" svg:width="12.33cm" svg:height="4.63cm" svg:x="0.502cm" svg:y="10.398cm" svg:viewBox="0 0 12331 4631" draw:points="0,0 12331,0 12331,4631 0,4631">
          <text:p/>
        </draw:polygon>
        <draw:frame draw:style-name="gr13" draw:text-style-name="P14" draw:layer="layout" svg:width="6.688cm" svg:height="0.454cm" svg:x="0.503cm" svg:y="4.87cm">
          <draw:text-box>
            <text:p text:style-name="P3"><text:span text:style-name="T10">wizard’s behavior for future sessions.</text:span></text:p>
          </draw:text-box>
        </draw:frame>
        <draw:path draw:style-name="gr17" draw:text-style-name="P18" draw:layer="layout" svg:width="0.159cm" svg:height="0.159cm" svg:x="0.978cm" svg:y="7.461cm" svg:viewBox="0 0 160 160" svg:d="M160 80c0 11-2 21-6 30-4 10-10 19-17 26-7 8-16 13-26 17s-20 6-30 7c-11-1-21-3-31-7s-19-9-26-17c-8-7-13-16-17-26-5-9-7-19-7-30 0-10 2-21 7-30 4-11 9-20 17-27 7-7 16-13 26-17s20-6 31-6c10 0 20 2 30 6s19 10 26 17 13 16 17 27c4 9 6 20 6 30z">
          <text:p/>
        </draw:path>
        <draw:frame draw:style-name="gr20" draw:text-style-name="P21" draw:layer="layout" svg:width="4.545cm" svg:height="0.666cm" svg:x="1.027cm" svg:y="6.449cm">
          <draw:text-box>
            <text:p text:style-name="P3"><text:span text:style-name="T38">HOW IT WORKS</text:span></text:p>
          </draw:text-box>
        </draw:frame>
        <draw:path draw:style-name="gr17" draw:text-style-name="P18" draw:layer="layout" svg:width="0.159cm" svg:height="0.159cm" svg:x="0.978cm" svg:y="8.096cm" svg:viewBox="0 0 160 160" svg:d="M160 80c0 11-2 21-6 30-4 10-10 19-17 26-7 8-16 13-26 17s-20 7-30 7c-11 0-21-3-31-7s-19-9-26-17c-8-7-13-16-17-26-5-9-7-19-7-30 0-10 2-21 7-30 4-11 9-20 17-27 7-7 16-13 26-17s20-6 31-6c10 0 20 2 30 6s19 10 26 17 13 16 17 27c4 9 6 20 6 30z">
          <text:p/>
        </draw:path>
        <draw:frame draw:style-name="gr18" draw:text-style-name="P19" draw:layer="layout" svg:width="8.505cm" svg:height="0.539cm" svg:x="1.46cm" svg:y="7.237cm">
          <draw:text-box>
            <text:p text:style-name="P3"><text:span text:style-name="T17">Records every Socratic Q&amp;A interaction</text:span></text:p>
          </draw:text-box>
        </draw:frame>
        <draw:path draw:style-name="gr17" draw:text-style-name="P18" draw:layer="layout" svg:width="0.159cm" svg:height="0.159cm" svg:x="0.978cm" svg:y="8.757cm" svg:viewBox="0 0 160 160" svg:d="M160 81c0 10-2 20-6 30s-10 18-17 26c-7 7-16 13-26 17s-20 6-30 6c-11 0-21-2-31-6s-19-10-26-17c-8-8-13-16-17-26-5-10-7-20-7-30 0-11 2-21 7-31 4-10 9-18 17-26 7-7 16-14 26-18s20-6 31-6c10 0 20 2 30 6s19 11 26 18c7 8 13 16 17 26s6 20 6 31z">
          <text:p/>
        </draw:path>
        <draw:frame draw:style-name="gr18" draw:text-style-name="P19" draw:layer="layout" svg:width="9.765cm" svg:height="0.539cm" svg:x="1.46cm" svg:y="7.872cm">
          <draw:text-box>
            <text:p text:style-name="P3"><text:span text:style-name="T17">Tracks which questions users override or skip</text:span></text:p>
          </draw:text-box>
        </draw:frame>
        <draw:path draw:style-name="gr17" draw:text-style-name="P18" draw:layer="layout" svg:width="0.159cm" svg:height="0.159cm" svg:x="0.978cm" svg:y="9.392cm" svg:viewBox="0 0 160 160" svg:d="M160 81c0 10-2 20-6 30s-10 18-17 26c-7 7-16 13-26 17s-20 6-30 6c-11 0-21-2-31-6s-19-10-26-17c-8-8-13-16-17-26-5-10-7-20-7-30 0-11 2-21 7-31 4-10 9-18 17-26 7-7 16-13 26-18 10-4 20-6 31-6 10 0 20 2 30 6 10 5 19 11 26 18 7 8 13 16 17 26s6 20 6 31z">
          <text:p/>
        </draw:path>
        <draw:frame draw:style-name="gr18" draw:text-style-name="P19" draw:layer="layout" svg:width="8.639cm" svg:height="0.539cm" svg:x="1.46cm" svg:y="8.534cm">
          <draw:text-box>
            <text:p text:style-name="P3"><text:span text:style-name="T17">Adjusts question priority for next session</text:span></text:p>
          </draw:text-box>
        </draw:frame>
        <draw:frame draw:style-name="gr18" draw:text-style-name="P19" draw:layer="layout" svg:width="7.647cm" svg:height="0.539cm" svg:x="1.46cm" svg:y="9.169cm">
          <draw:text-box>
            <text:p text:style-name="P3"><text:span text:style-name="T17">No manual tuning — self-calibrating</text:span></text:p>
          </draw:text-box>
        </draw:frame>
        <draw:path draw:style-name="gr17" draw:text-style-name="P18" draw:layer="layout" svg:width="0.159cm" svg:height="0.158cm" svg:x="0.978cm" svg:y="11.721cm" svg:viewBox="0 0 160 159" svg:d="M160 80c0 10-2 20-6 30s-10 19-17 26-16 13-26 17-20 6-30 6c-11 0-21-2-31-6s-19-10-26-17c-8-7-13-16-17-26-5-10-7-20-7-30 0-11 2-21 7-32 4-9 9-18 17-25 7-8 16-13 26-17s20-6 31-6c10 0 20 2 30 6s19 9 26 17c7 7 13 16 17 25 4 11 6 21 6 32z">
          <text:p/>
        </draw:path>
        <draw:frame draw:style-name="gr20" draw:text-style-name="P21" draw:layer="layout" svg:width="8.662cm" svg:height="0.666cm" svg:x="1.027cm" svg:y="10.708cm">
          <draw:text-box>
            <text:p text:style-name="P3"><text:span text:style-name="T38">ABANDONMENT PROTECTION</text:span></text:p>
          </draw:text-box>
        </draw:frame>
        <draw:frame draw:style-name="gr18" draw:text-style-name="P19" draw:layer="layout" svg:width="10.382cm" svg:height="0.539cm" svg:x="1.46cm" svg:y="11.497cm">
          <draw:text-box>
            <text:p text:style-name="P3"><text:span text:style-name="T17">If a user quits mid-spec, the system penalizes its</text:span></text:p>
          </draw:text-box>
        </draw:frame>
        <draw:path draw:style-name="gr17" draw:text-style-name="P18" draw:layer="layout" svg:width="0.159cm" svg:height="0.158cm" svg:x="0.978cm" svg:y="12.991cm" svg:viewBox="0 0 160 159" svg:d="M160 80c0 10-2 21-6 30-4 10-10 19-17 26s-16 13-26 17-20 6-30 6c-11 0-21-2-31-6s-19-10-26-17c-8-7-13-16-17-26-5-9-7-20-7-30 0-11 2-21 7-31 4-10 9-19 17-26 7-8 16-13 26-17s20-6 31-6c10 0 20 2 30 6s19 9 26 17c7 7 13 16 17 26s6 20 6 31z">
          <text:p/>
        </draw:path>
        <draw:frame draw:style-name="gr18" draw:text-style-name="P19" draw:layer="layout" svg:width="3.785cm" svg:height="0.539cm" svg:x="1.46cm" svg:y="12.105cm">
          <draw:text-box>
            <text:p text:style-name="P3"><text:span text:style-name="T17">engagement prior</text:span></text:p>
          </draw:text-box>
        </draw:frame>
        <draw:path draw:style-name="gr17" draw:text-style-name="P18" draw:layer="layout" svg:width="0.159cm" svg:height="0.158cm" svg:x="0.978cm" svg:y="13.626cm" svg:viewBox="0 0 160 159" svg:d="M160 80c0 10-2 21-6 30-4 10-10 19-17 26s-16 13-26 17-20 6-30 6c-11 0-21-2-31-6s-19-10-26-17c-8-7-13-16-17-26-5-9-7-20-7-30 0-11 2-21 7-31 4-10 9-19 17-26 7-8 16-13 26-17s20-6 31-6c10 0 20 2 30 6s19 9 26 17c7 7 13 16 17 26s6 20 6 31z">
          <text:p/>
        </draw:path>
        <draw:frame draw:style-name="gr18" draw:text-style-name="P19" draw:layer="layout" svg:width="8.425cm" svg:height="0.539cm" svg:x="1.46cm" svg:y="12.767cm">
          <draw:text-box>
            <text:p text:style-name="P3"><text:span text:style-name="T17">Prevents over-asking in future sessions</text:span></text:p>
          </draw:text-box>
        </draw:frame>
        <draw:frame draw:style-name="gr18" draw:text-style-name="P19" draw:layer="layout" svg:width="10.143cm" svg:height="0.539cm" svg:x="1.46cm" svg:y="13.402cm">
          <draw:text-box>
            <text:p text:style-name="P3"><text:span text:style-name="T17">Single bad session can only degrade the model</text:span></text:p>
          </draw:text-box>
        </draw:frame>
        <draw:path draw:style-name="gr8" draw:text-style-name="P9" draw:layer="layout" svg:width="12.329cm" svg:height="5.9cm" svg:x="13.573cm" svg:y="6.138cm" svg:viewBox="0 0 12330 5901" svg:d="M31 31c20-21 45-31 74-31h12119c30 0 55 10 75 31 21 20 31 45 31 75v5689c0 29-10 54-31 75-20 21-45 31-75 31h-12119c-29 0-54-10-74-31-21-21-31-46-31-75v-5689c0-30 10-55 31-75z">
          <text:p/>
        </draw:path>
        <draw:path draw:style-name="gr2" draw:text-style-name="P2" draw:layer="layout" svg:width="12.252cm" svg:height="0.051cm" svg:x="13.621cm" svg:y="6.138cm" svg:viewBox="0 0 12253 52" svg:d="M12234 52c-1-1-1-1-1-1-16-16-35-24-57-24h-12119c-3 0-7 2-10 7l-47-16c17-13 36-18 57-18h12119c30 0 55 11 75 32 1 0 1 1 2 1z">
          <text:p/>
        </draw:path>
        <draw:path draw:style-name="gr2" draw:text-style-name="P2" draw:layer="layout" svg:width="12.252cm" svg:height="0.051cm" svg:x="13.621cm" svg:y="11.987cm" svg:viewBox="0 0 12253 52" svg:d="M47 18c3 5 7 8 10 8h12119c22 0 41-9 57-25 0 0 0-1 1-1l19 19c-1 0-1 1-2 1-20 22-45 32-75 32h-12119c-21 0-40-6-57-17z">
          <text:p/>
        </draw:path>
        <draw:path draw:style-name="gr2" draw:text-style-name="P2" draw:layer="layout" svg:width="0.049cm" svg:height="5.838cm" svg:x="25.853cm" svg:y="6.169cm" svg:viewBox="0 0 50 5839" svg:d="M0 5820c15-15 23-34 23-56v-5689c0-22-8-41-23-56l18-19c21 20 32 45 32 75v5689c0 29-11 54-32 75z">
          <text:p/>
        </draw:path>
        <draw:polygon draw:style-name="gr2" draw:text-style-name="P2" draw:layer="layout" svg:width="12.329cm" svg:height="5.9cm" svg:x="13.573cm" svg:y="6.138cm" svg:viewBox="0 0 12330 5901" draw:points="0,0 12330,0 12330,5901 0,5901">
          <text:p/>
        </draw:polygon>
        <draw:path draw:style-name="gr8" draw:text-style-name="P9" draw:layer="layout" svg:width="12.329cm" svg:height="4.207cm" svg:x="13.573cm" svg:y="12.25cm" svg:viewBox="0 0 12330 4208" svg:d="M31 31c20-21 45-31 74-31h12119c30 0 55 10 75 31 21 20 31 45 31 75v3996c0 29-10 54-31 75-20 20-45 31-75 31h-12119c-29 0-54-11-74-31-21-21-31-46-31-75v-3996c0-30 10-55 31-75z">
          <text:p/>
        </draw:path>
        <draw:path draw:style-name="gr2" draw:text-style-name="P2" draw:layer="layout" svg:width="12.252cm" svg:height="0.051cm" svg:x="13.621cm" svg:y="12.25cm" svg:viewBox="0 0 12253 52" svg:d="M12234 52c-1-1-1-1-1-2-16-15-35-23-57-23h-12119c-3 0-7 2-10 6l-47-15c17-13 36-18 57-18h12119c30 0 55 10 75 32 1 0 1 1 2 1z">
          <text:p/>
        </draw:path>
        <draw:path draw:style-name="gr2" draw:text-style-name="P2" draw:layer="layout" svg:width="12.252cm" svg:height="0.051cm" svg:x="13.621cm" svg:y="16.406cm" svg:viewBox="0 0 12253 52" svg:d="M47 18c3 4 7 6 10 6h12119c22 0 41-8 57-23 0-1 0-1 1-1l19 18c-1 1-1 1-2 2-20 20-45 32-75 32h-12119c-21 0-40-6-57-18z">
          <text:p/>
        </draw:path>
        <draw:path draw:style-name="gr2" draw:text-style-name="P2" draw:layer="layout" svg:width="0.049cm" svg:height="4.145cm" svg:x="25.853cm" svg:y="12.281cm" svg:viewBox="0 0 50 4146" svg:d="M0 4127c15-16 23-34 23-56v-3996c0-22-8-41-23-57l18-18c21 20 32 45 32 75v3996c0 29-11 54-32 75z">
          <text:p/>
        </draw:path>
        <draw:polygon draw:style-name="gr19" draw:text-style-name="P20" draw:layer="layout" svg:width="12.329cm" svg:height="4.207cm" svg:x="13.573cm" svg:y="12.25cm" svg:viewBox="0 0 12330 4208" draw:points="0,0 12330,0 12330,4208 0,4208">
          <text:p/>
        </draw:polygon>
        <draw:frame draw:style-name="gr18" draw:text-style-name="P19" draw:layer="layout" svg:width="1.477cm" svg:height="0.539cm" svg:x="1.46cm" svg:y="14.037cm">
          <draw:text-box>
            <text:p text:style-name="P3"><text:span text:style-name="T17">slightly</text:span></text:p>
          </draw:text-box>
        </draw:frame>
        <draw:path draw:style-name="gr17" draw:text-style-name="P18" draw:layer="layout" svg:width="0.159cm" svg:height="0.159cm" svg:x="14.049cm" svg:y="7.461cm" svg:viewBox="0 0 160 160" svg:d="M160 80c0 11-2 21-6 30-4 10-10 19-18 26-7 8-16 13-25 17-10 4-21 6-32 7-10-1-20-3-30-7s-18-9-26-17c-7-7-13-16-17-26-4-9-6-19-6-30 0-10 2-21 6-30 4-11 10-20 17-27 8-7 16-13 26-17s20-6 30-6c11 0 22 2 32 6 9 4 18 10 25 17 8 7 14 16 18 27 4 9 6 20 6 30z">
          <text:p/>
        </draw:path>
        <draw:frame draw:style-name="gr20" draw:text-style-name="P21" draw:layer="layout" svg:width="10.605cm" svg:height="0.666cm" svg:x="14.097cm" svg:y="6.449cm">
          <draw:text-box>
            <text:p text:style-name="P3"><text:span text:style-name="T38">CONSERVATIVE DRIFT PROTECTION</text:span></text:p>
          </draw:text-box>
        </draw:frame>
        <draw:frame draw:style-name="gr18" draw:text-style-name="P19" draw:layer="layout" svg:width="11cm" svg:height="0.539cm" svg:x="14.53cm" svg:y="7.237cm">
          <draw:text-box>
            <text:p text:style-name="P3"><text:span text:style-name="T17">A single session can only shift behavior by a limited</text:span></text:p>
          </draw:text-box>
        </draw:frame>
        <draw:path draw:style-name="gr17" draw:text-style-name="P18" draw:layer="layout" svg:width="0.159cm" svg:height="0.159cm" svg:x="14.049cm" svg:y="8.731cm" svg:viewBox="0 0 160 160" svg:d="M160 80c0 11-2 21-6 30-4 10-10 19-18 26-7 8-16 13-25 17-10 4-21 6-32 7-10-1-20-3-30-7s-18-9-26-17c-7-7-13-16-17-26-4-9-6-19-6-30 0-10 2-21 6-30 4-10 10-20 17-27 8-7 16-13 26-17s20-6 30-6c11 0 22 2 32 6 9 4 18 10 25 17 8 7 14 17 18 27 4 9 6 20 6 30z">
          <text:p/>
        </draw:path>
        <draw:frame draw:style-name="gr18" draw:text-style-name="P19" draw:layer="layout" svg:width="1.612cm" svg:height="0.539cm" svg:x="14.53cm" svg:y="7.846cm">
          <draw:text-box>
            <text:p text:style-name="P3"><text:span text:style-name="T17">amount</text:span></text:p>
          </draw:text-box>
        </draw:frame>
        <draw:frame draw:style-name="gr18" draw:text-style-name="P19" draw:layer="layout" svg:width="11.402cm" svg:height="0.539cm" svg:x="14.53cm" svg:y="8.507cm">
          <draw:text-box>
            <text:p text:style-name="P3"><text:span text:style-name="T17">Overrides require multiple consistent sessions to shift</text:span></text:p>
          </draw:text-box>
        </draw:frame>
        <draw:path draw:style-name="gr17" draw:text-style-name="P18" draw:layer="layout" svg:width="0.159cm" svg:height="0.159cm" svg:x="14.049cm" svg:y="10.001cm" svg:viewBox="0 0 160 160" svg:d="M160 80c0 11-2 21-6 30-4 10-10 19-18 26-7 8-16 13-25 17-10 4-21 6-32 7-10-1-20-3-30-7s-18-9-26-17c-7-7-13-16-17-26-4-9-6-19-6-30 0-10 2-21 6-30 4-10 10-20 17-27 8-7 16-13 26-17s20-6 30-6c11 0 22 2 32 6 9 4 18 10 25 17 8 7 14 17 18 27 4 9 6 20 6 30z">
          <text:p/>
        </draw:path>
        <draw:frame draw:style-name="gr18" draw:text-style-name="P19" draw:layer="layout" svg:width="1.853cm" svg:height="0.539cm" svg:x="14.53cm" svg:y="9.116cm">
          <draw:text-box>
            <text:p text:style-name="P3"><text:span text:style-name="T17">behavior</text:span></text:p>
          </draw:text-box>
        </draw:frame>
        <draw:frame draw:style-name="gr18" draw:text-style-name="P19" draw:layer="layout" svg:width="11.214cm" svg:height="0.539cm" svg:x="14.53cm" svg:y="9.777cm">
          <draw:text-box>
            <text:p text:style-name="P3"><text:span text:style-name="T17">After 20 successful sessions with zero overrides, the</text:span></text:p>
          </draw:text-box>
        </draw:frame>
        <draw:frame draw:style-name="gr18" draw:text-style-name="P19" draw:layer="layout" svg:width="10.705cm" svg:height="0.539cm" svg:x="14.53cm" svg:y="10.412cm">
          <draw:text-box>
            <text:p text:style-name="P3"><text:span text:style-name="T17">wizard converges to a stable, minimal-intervention</text:span></text:p>
          </draw:text-box>
        </draw:frame>
        <draw:frame draw:style-name="gr18" draw:text-style-name="P19" draw:layer="layout" svg:width="1.827cm" svg:height="0.539cm" svg:x="14.53cm" svg:y="11.021cm">
          <draw:text-box>
            <text:p text:style-name="P3"><text:span text:style-name="T17">cadence</text:span></text:p>
          </draw:text-box>
        </draw:frame>
        <draw:path draw:style-name="gr17" draw:text-style-name="P18" draw:layer="layout" svg:width="0.159cm" svg:height="0.159cm" svg:x="14.128cm" svg:y="13.678cm" svg:viewBox="0 0 160 160" svg:d="M160 80c0 10-2 20-6 30s-10 19-17 26c-8 7-16 14-26 18s-20 6-30 6c-11 0-21-2-31-6-9-4-18-11-26-18-7-7-14-16-18-26s-6-20-6-30c0-11 2-21 6-31 4-9 11-18 18-25 8-8 17-14 26-18 10-4 20-6 31-6 10 0 20 2 30 6s18 10 26 18c7 7 13 16 17 25 4 10 6 20 6 31z">
          <text:p/>
        </draw:path>
        <draw:frame draw:style-name="gr20" draw:text-style-name="P21" draw:layer="layout" svg:width="4.646cm" svg:height="0.666cm" svg:x="14.171cm" svg:y="12.666cm">
          <draw:text-box>
            <text:p text:style-name="P3"><text:span text:style-name="T19">KEY TAKEAWAY</text:span></text:p>
          </draw:text-box>
        </draw:frame>
        <draw:frame draw:style-name="gr18" draw:text-style-name="P19" draw:layer="layout" svg:width="9.98cm" svg:height="0.539cm" svg:x="14.604cm" svg:y="13.455cm">
          <draw:text-box>
            <text:p text:style-name="P3"><text:span text:style-name="T17">The spec wizard gets </text:span><text:span text:style-name="T16">better over time</text:span><text:span text:style-name="T17"> without</text:span></text:p>
          </draw:text-box>
        </draw:frame>
        <draw:path draw:style-name="gr17" draw:text-style-name="P18" draw:layer="layout" svg:width="0.159cm" svg:height="0.159cm" svg:x="14.128cm" svg:y="14.948cm" svg:viewBox="0 0 160 160" svg:d="M160 80c0 10-2 20-6 30s-10 18-17 26c-8 8-16 14-26 18s-20 6-30 6c-11 0-21-2-31-6-9-4-18-10-26-18-7-8-14-16-18-26s-6-20-6-30c0-11 2-21 6-31 4-9 11-18 18-25 8-8 17-14 26-18 10-4 20-6 31-6 10 0 20 2 30 6s18 10 26 18c7 7 13 16 17 25 4 10 6 20 6 31z">
          <text:p/>
        </draw:path>
        <draw:frame draw:style-name="gr18" draw:text-style-name="P19" draw:layer="layout" svg:width="4.804cm" svg:height="0.539cm" svg:x="14.604cm" svg:y="14.09cm">
          <draw:text-box>
            <text:p text:style-name="P3"><text:span text:style-name="T17">human reconfiguration</text:span></text:p>
          </draw:text-box>
        </draw:frame>
        <draw:frame draw:style-name="gr18" draw:text-style-name="P19" draw:layer="layout" svg:width="9.016cm" svg:height="0.539cm" svg:x="14.604cm" svg:y="14.725cm">
          <draw:text-box>
            <text:p text:style-name="P3"><text:span text:style-name="T17">Self-improvement through usage data, not</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3.463cm" svg:height="0.539cm" svg:x="14.604cm" svg:y="15.36cm">
          <draw:text-box>
            <text:p text:style-name="P3"><text:span text:style-name="T17">hardcoded rules</text:span></text:p>
          </draw:text-box>
        </draw:frame>
        <draw:frame draw:style-name="gr7" draw:text-style-name="P8" draw:layer="layout" svg:width="0.412cm" svg:height="0.412cm" svg:x="25.617cm" svg:y="18.503cm">
          <draw:text-box>
            <text:p text:style-name="P3"><text:span text:style-name="T6">26</text:span></text:p>
          </draw:text-box>
        </draw:frame>
      </draw:page>
      <draw:page draw:name="page27"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8.229cm" svg:height="5.927cm" svg:x="0.502cm" svg:y="7.778cm" svg:viewBox="0 0 8230 5928" svg:d="M31 31c21-20 46-31 75-31h8018c29 0 54 11 75 31 20 21 31 46 31 75v5716c0 29-11 54-31 75-21 21-46 31-75 31h-8018c-29 0-54-10-75-31-20-21-31-46-31-75v-5716c0-29 11-54 31-75z">
          <text:p/>
        </draw:path>
        <draw:path draw:style-name="gr2" draw:text-style-name="P2" draw:layer="layout" svg:width="8.151cm" svg:height="0.051cm" svg:x="0.55cm" svg:y="7.778cm" svg:viewBox="0 0 8152 52" svg:d="M8133 52l-1-2c-15-16-34-23-56-23h-8018c-4 0-7 2-10 6l-48-16c17-11 36-17 58-17h8018c29 0 54 11 75 31 0 1 1 1 1 2z">
          <text:p/>
        </draw:path>
        <draw:path draw:style-name="gr2" draw:text-style-name="P2" draw:layer="layout" svg:width="8.151cm" svg:height="0.051cm" svg:x="0.55cm" svg:y="13.654cm" svg:viewBox="0 0 8152 52" svg:d="M48 18c3 4 6 6 10 6h8018c22 0 41-7 56-23l1-1 19 19c0 0-1 0-1 1-21 22-46 32-75 32h-8018c-22 0-41-6-58-18z">
          <text:p/>
        </draw:path>
        <draw:path draw:style-name="gr2" draw:text-style-name="P2" draw:layer="layout" svg:width="0.05cm" svg:height="5.865cm" svg:x="8.681cm" svg:y="7.809cm" svg:viewBox="0 0 51 5866" svg:d="M0 5847c16-15 24-34 24-56v-5716c0-22-8-41-24-56l20-19c20 21 31 46 31 75v5716c0 29-11 54-31 75z">
          <text:p/>
        </draw:path>
        <draw:polygon draw:style-name="gr2" draw:text-style-name="P2" draw:layer="layout" svg:width="8.229cm" svg:height="5.927cm" svg:x="0.502cm" svg:y="7.778cm" svg:viewBox="0 0 8230 5928" draw:points="0,0 8230,0 8230,5928 0,5928">
          <text:p/>
        </draw:polygon>
        <draw:frame draw:style-name="gr9" draw:text-style-name="P10" draw:layer="layout" svg:width="19.377cm" svg:height="1.119cm" svg:x="3.172cm" svg:y="6.027cm">
          <draw:text-box>
            <text:p text:style-name="P3"><text:span text:style-name="T7">LAYER 3: LOGIC — THE THREE AGENTS</text:span></text:p>
          </draw:text-box>
        </draw:frame>
        <draw:path draw:style-name="gr17" draw:text-style-name="P18" draw:layer="layout" svg:width="0.159cm" svg:height="0.159cm" svg:x="0.978cm" svg:y="9.101cm" svg:viewBox="0 0 160 160" svg:d="M160 80c0 10-2 20-6 30s-10 18-17 26-16 14-26 18-20 6-30 6c-11 0-21-2-31-6s-19-10-26-18c-8-8-13-16-17-26-5-10-7-20-7-30 0-11 2-21 7-31 4-10 9-18 17-26 7-7 16-13 26-17s20-6 31-6c10 0 20 2 30 6s19 10 26 17c7 8 13 16 17 26s6 20 6 31z">
          <text:p/>
        </draw:path>
        <draw:frame draw:style-name="gr20" draw:text-style-name="P21" draw:layer="layout" svg:width="6.753cm" svg:height="0.666cm" svg:x="1.027cm" svg:y="8.089cm">
          <draw:text-box>
            <text:p text:style-name="P3"><text:span text:style-name="T38">SPECIFICATION AGENT</text:span></text:p>
          </draw:text-box>
        </draw:frame>
        <draw:path draw:style-name="gr33" draw:text-style-name="P34" draw:layer="layout" svg:width="3.413cm" svg:height="0.609cm" svg:x="1.455cm" svg:y="9.498cm" svg:viewBox="0 0 3414 610" svg:d="M0 529v-450c0-10 2-20 6-30s10-18 17-26c7-7 16-13 26-17 9-4 20-6 30-6h3255c11 0 21 2 31 6s18 10 26 17c7 8 13 16 17 26s6 20 6 30v450c0 12-2 22-6 32-4 9-10 18-17 25-8 8-16 13-26 17-10 5-20 7-31 7h-3255c-10 0-21-2-30-7-10-4-19-9-26-17-7-7-13-16-17-25-4-10-6-20-6-32z">
          <text:p/>
        </draw:path>
        <draw:frame draw:style-name="gr18" draw:text-style-name="P19" draw:layer="layout" svg:width="5.527cm" svg:height="0.539cm" svg:x="1.46cm" svg:y="8.878cm">
          <draw:text-box>
            <text:p text:style-name="P3"><text:span text:style-name="T17">Canvas text → Structured</text:span></text:p>
          </draw:text-box>
        </draw:frame>
        <draw:path draw:style-name="gr17" draw:text-style-name="P18" draw:layer="layout" svg:width="0.159cm" svg:height="0.159cm" svg:x="0.978cm" svg:y="10.371cm" svg:viewBox="0 0 160 160" svg:d="M160 80c0 10-2 20-6 30s-10 18-17 27c-7 7-16 13-26 17s-20 6-30 6c-11 0-21-2-31-6s-19-10-26-17c-8-9-13-17-17-27-5-10-7-20-7-30 0-11 2-21 7-31 4-10 9-18 17-26 7-7 16-13 26-17s20-6 31-6c10 0 20 2 30 6s19 10 26 17c7 8 13 16 17 26s6 20 6 31z">
          <text:p/>
        </draw:path>
        <draw:frame draw:style-name="gr75" draw:text-style-name="P59" draw:layer="layout" svg:width="2.33cm" svg:height="0.463cm" svg:x="1.562cm" svg:y="9.572cm">
          <draw:text-box>
            <text:p text:style-name="P3"><text:span text:style-name="T58">Specification</text:span></text:p>
          </draw:text-box>
        </draw:frame>
        <draw:frame draw:style-name="gr18" draw:text-style-name="P19" draw:layer="layout" svg:width="5.662cm" svg:height="0.539cm" svg:x="1.46cm" svg:y="10.148cm">
          <draw:text-box>
            <text:p text:style-name="P3"><text:span text:style-name="T17">SchemaTailor: auto-detect</text:span></text:p>
          </draw:text-box>
        </draw:frame>
        <draw:path draw:style-name="gr17" draw:text-style-name="P18" draw:layer="layout" svg:width="0.159cm" svg:height="0.158cm" svg:x="0.978cm" svg:y="11.668cm" svg:viewBox="0 0 160 159" svg:d="M160 79c0 10-2 21-6 31s-10 19-17 26c-7 8-16 13-26 17s-20 6-30 6c-11 0-21-2-31-6s-19-9-26-17c-8-7-13-16-17-26-5-10-7-21-7-31s2-21 7-30c4-10 9-19 17-26 7-8 16-13 26-17s20-6 31-6c10 0 20 2 30 6s19 9 26 17c7 7 13 16 17 26 4 9 6 20 6 30z">
          <text:p/>
        </draw:path>
        <draw:frame draw:style-name="gr18" draw:text-style-name="P19" draw:layer="layout" svg:width="2.255cm" svg:height="0.539cm" svg:x="1.46cm" svg:y="10.783cm">
          <draw:text-box>
            <text:p text:style-name="P3"><text:span text:style-name="T17">framework</text:span></text:p>
          </draw:text-box>
        </draw:frame>
        <draw:path draw:style-name="gr17" draw:text-style-name="P18" draw:layer="layout" svg:width="0.159cm" svg:height="0.158cm" svg:x="0.978cm" svg:y="12.303cm" svg:viewBox="0 0 160 159" svg:d="M160 79c0 10-2 22-6 31-4 10-10 19-17 26s-16 13-26 17-20 6-30 6c-11 0-21-2-31-6s-19-10-26-17c-8-7-13-16-17-26-5-9-7-21-7-31 0-11 2-21 7-30 4-10 9-19 17-26 7-8 16-13 26-17s20-6 31-6c10 0 20 2 30 6s19 9 26 17c7 7 13 16 17 26 4 9 6 19 6 30z">
          <text:p/>
        </draw:path>
        <draw:frame draw:style-name="gr18" draw:text-style-name="P19" draw:layer="layout" svg:width="6.413cm" svg:height="0.539cm" svg:x="1.46cm" svg:y="11.444cm">
          <draw:text-box>
            <text:p text:style-name="P3"><text:span text:style-name="T17">Socratic Q&amp;A (opt-in, capped)</text:span></text:p>
          </draw:text-box>
        </draw:frame>
        <draw:path draw:style-name="gr33" draw:text-style-name="P34" draw:layer="layout" svg:width="3.149cm" svg:height="0.608cm" svg:x="2.698cm" svg:y="12.065cm" svg:viewBox="0 0 3150 609" svg:d="M0 530v-451c0-11 2-21 6-31 4-9 10-18 17-25 8-8 17-13 26-17 10-4 20-6 31-6h2990c11 0 21 2 31 6s18 9 26 17c7 7 13 16 17 25 4 10 6 20 6 31v451c0 10-2 20-6 30s-10 18-17 26c-8 7-16 13-26 17s-20 6-31 6h-2990c-11 0-21-2-31-6-9-4-18-10-26-17-7-8-13-16-17-26s-6-20-6-30z">
          <text:p/>
        </draw:path>
        <draw:frame draw:style-name="gr18" draw:text-style-name="P19" draw:layer="layout" svg:width="1.29cm" svg:height="0.539cm" svg:x="1.46cm" svg:y="12.079cm">
          <draw:text-box>
            <text:p text:style-name="P3"><text:span text:style-name="T17">Inline </text:span></text:p>
          </draw:text-box>
        </draw:frame>
        <draw:frame draw:style-name="gr75" draw:text-style-name="P59" draw:layer="layout" svg:width="2.33cm" svg:height="0.463cm" svg:x="2.791cm" svg:y="12.138cm">
          <draw:text-box>
            <text:p text:style-name="P3"><text:span text:style-name="T58">[GAP: Topic]</text:span></text:p>
          </draw:text-box>
        </draw:frame>
        <draw:path draw:style-name="gr8" draw:text-style-name="P9" draw:layer="layout" svg:width="8.202cm" svg:height="5.927cm" svg:x="9.101cm" svg:y="7.778cm" svg:viewBox="0 0 8203 5928" svg:d="M31 31c21-20 46-31 75-31h7992c29 0 54 11 74 31 21 21 31 46 31 75v5716c0 29-10 54-31 75-20 21-45 31-75 31h-7991c-29 0-54-10-75-31s-31-46-31-75v-5716c0-29 10-54 31-75z">
          <text:p/>
        </draw:path>
        <draw:path draw:style-name="gr2" draw:text-style-name="P2" draw:layer="layout" svg:width="8.125cm" svg:height="0.051cm" svg:x="9.149cm" svg:y="7.778cm" svg:viewBox="0 0 8126 52" svg:d="M8107 52c-1 0-1-2-1-2-16-16-35-23-57-23h-7991c-4 0-7 2-10 6l-48-16c17-11 36-17 58-17h7992c29 0 54 11 74 31 1 1 1 1 2 2z">
          <text:p/>
        </draw:path>
        <draw:path draw:style-name="gr2" draw:text-style-name="P2" draw:layer="layout" svg:width="8.125cm" svg:height="0.051cm" svg:x="9.149cm" svg:y="13.654cm" svg:viewBox="0 0 8126 52" svg:d="M48 18c3 4 6 6 10 6h7991c22 0 41-7 57-23 0 0 0-1 1-1l19 19c-1 0-1 0-2 1-20 22-45 32-75 32h-7991c-22 0-41-6-58-18z">
          <text:p/>
        </draw:path>
        <draw:polygon draw:style-name="gr2" draw:text-style-name="P2" draw:layer="layout" svg:width="8.202cm" svg:height="5.927cm" svg:x="9.101cm" svg:y="7.778cm" svg:viewBox="0 0 8203 5928" draw:points="0,0 8203,0 8203,5928 0,5928">
          <text:p/>
        </draw:polygon>
        <draw:polygon draw:style-name="gr2" draw:text-style-name="P2" draw:layer="layout" svg:width="8.202cm" svg:height="5.927cm" svg:x="9.101cm" svg:y="7.778cm" svg:viewBox="0 0 8203 5928" draw:points="0,0 8203,0 8203,5928 0,5928">
          <text:p/>
        </draw:polygon>
        <draw:frame draw:style-name="gr18" draw:text-style-name="P19" draw:layer="layout" svg:width="2.739cm" svg:height="0.539cm" svg:x="1.46cm" svg:y="12.714cm">
          <draw:text-box>
            <text:p text:style-name="P3"><text:span text:style-name="T17">placeholders</text:span></text:p>
          </draw:text-box>
        </draw:frame>
        <draw:path draw:style-name="gr17" draw:text-style-name="P18" draw:layer="layout" svg:width="0.159cm" svg:height="0.159cm" svg:x="9.577cm" svg:y="9.101cm" svg:viewBox="0 0 160 160" svg:d="M160 80c0 10-2 20-6 30s-10 18-18 26-16 14-26 18-20 6-30 6c-11 0-21-2-31-6-9-4-18-10-25-18-8-8-14-16-18-26s-6-20-6-30c0-11 2-21 6-31s10-18 18-26c7-7 16-13 25-17 10-4 20-6 31-6 10 0 20 2 30 6s18 10 26 17c8 8 14 16 18 26s6 20 6 31z">
          <text:p/>
        </draw:path>
        <draw:frame draw:style-name="gr20" draw:text-style-name="P21" draw:layer="layout" svg:width="5.238cm" svg:height="0.666cm" svg:x="9.616cm" svg:y="8.089cm">
          <draw:text-box>
            <text:p text:style-name="P3"><text:span text:style-name="T38">PLANNING AGENT</text:span></text:p>
          </draw:text-box>
        </draw:frame>
        <draw:path draw:style-name="gr33" draw:text-style-name="P34" draw:layer="layout" svg:width="3.387cm" svg:height="0.609cm" svg:x="11.535cm" svg:y="8.863cm" svg:viewBox="0 0 3388 610" svg:d="M0 529v-450c0-10 2-20 6-30s10-18 18-26c7-7 16-13 25-17 10-4 20-6 31-6h3229c10 0 20 2 30 6s18 10 26 17c7 8 13 16 17 26s6 20 6 30v450c0 11-2 21-6 31s-10 19-17 26c-8 8-16 13-26 17-10 5-20 7-30 7h-3229c-11 0-21-2-31-7-9-4-18-9-25-17-8-7-14-16-18-26s-6-20-6-31z">
          <text:p/>
        </draw:path>
        <draw:frame draw:style-name="gr18" draw:text-style-name="P19" draw:layer="layout" svg:width="1.853cm" svg:height="0.539cm" svg:x="10.05cm" svg:y="8.878cm">
          <draw:text-box>
            <text:p text:style-name="P3"><text:span text:style-name="T17">Spec → </text:span></text:p>
          </draw:text-box>
        </draw:frame>
        <draw:path draw:style-name="gr17" draw:text-style-name="P18" draw:layer="layout" svg:width="0.159cm" svg:height="0.158cm" svg:x="9.577cm" svg:y="9.763cm" svg:viewBox="0 0 160 159" svg:d="M160 79c0 10-2 21-6 30-4 11-10 20-18 27-8 8-16 13-26 17s-20 6-30 6c-11 0-21-2-31-6-9-4-18-9-25-17-8-7-14-16-18-27-4-9-6-20-6-30 0-11 2-21 6-30 4-10 10-19 18-26 7-8 16-13 25-17 10-4 20-6 31-6 10 0 20 2 30 6s18 9 26 17c8 7 14 16 18 26 4 9 6 19 6 30z">
          <text:p/>
        </draw:path>
        <draw:frame draw:style-name="gr75" draw:text-style-name="P59" draw:layer="layout" svg:width="2.581cm" svg:height="0.463cm" svg:x="11.625cm" svg:y="8.937cm">
          <draw:text-box>
            <text:p text:style-name="P3"><text:span text:style-name="T58">TechnicalPlan</text:span></text:p>
          </draw:text-box>
        </draw:frame>
        <draw:path draw:style-name="gr17" draw:text-style-name="P18" draw:layer="layout" svg:width="0.159cm" svg:height="0.158cm" svg:x="9.577cm" svg:y="10.398cm" svg:viewBox="0 0 160 159" svg:d="M160 79c0 10-2 21-6 31s-10 19-18 26c-8 8-16 13-26 17s-20 6-30 6c-11 0-21-2-31-6-9-4-18-9-25-17-8-7-14-16-18-26s-6-21-6-31c0-11 2-21 6-30 4-10 10-19 18-26 7-8 16-13 25-17 10-4 20-6 31-6 10 0 20 2 30 6s18 9 26 17c8 7 14 16 18 26 4 9 6 19 6 30z">
          <text:p/>
        </draw:path>
        <draw:path draw:style-name="gr33" draw:text-style-name="P34" draw:layer="layout" svg:width="3.651cm" svg:height="0.582cm" svg:x="10.054cm" svg:y="10.186cm" svg:viewBox="0 0 3652 583" svg:d="M0 503v-424c0-10 2-20 6-30s9-18 17-26c7-7 16-13 26-17 9-4 20-6 30-6h3494c10 0 20 2 30 6s18 10 26 17c7 8 13 16 17 26s6 20 6 30v424c0 10-2 20-6 30s-10 18-17 26c-8 7-16 13-26 17s-20 7-30 7h-3494c-10 0-21-3-30-7-10-4-19-10-26-17-8-8-13-16-17-26s-6-20-6-30z">
          <text:p/>
        </draw:path>
        <draw:frame draw:style-name="gr18" draw:text-style-name="P19" draw:layer="layout" svg:width="4.937cm" svg:height="0.539cm" svg:x="10.05cm" svg:y="9.539cm">
          <draw:text-box>
            <text:p text:style-name="P3"><text:span text:style-name="T17">Architecture markdown</text:span></text:p>
          </draw:text-box>
        </draw:frame>
        <draw:frame draw:style-name="gr75" draw:text-style-name="P59" draw:layer="layout" svg:width="2.833cm" svg:height="0.463cm" svg:x="10.152cm" svg:y="10.26cm">
          <draw:text-box>
            <text:p text:style-name="P3"><text:span text:style-name="T58">ProceduralStep</text:span></text:p>
          </draw:text-box>
        </draw:frame>
        <draw:frame draw:style-name="gr18" draw:text-style-name="P19" draw:layer="layout" svg:width="1.236cm" svg:height="0.539cm" svg:x="13.692cm" svg:y="10.174cm">
          <draw:text-box>
            <text:p text:style-name="P3"><text:span text:style-name="T17">s with</text:span></text:p>
          </draw:text-box>
        </draw:frame>
        <draw:path draw:style-name="gr17" draw:text-style-name="P18" draw:layer="layout" svg:width="0.159cm" svg:height="0.159cm" svg:x="9.577cm" svg:y="11.694cm" svg:viewBox="0 0 160 160" svg:d="M160 80c0 11-2 21-6 31s-10 18-18 26c-8 7-16 13-26 17s-20 6-30 6c-11 0-21-2-31-6-9-4-18-10-25-17-8-8-14-16-18-26s-6-20-6-31 2-21 6-31 10-18 18-26c7-7 16-13 25-17 10-4 20-6 31-6 10 0 20 2 30 6s18 10 26 17c8 8 14 16 18 26s6 20 6 31z">
          <text:p/>
        </draw:path>
        <draw:frame draw:style-name="gr18" draw:text-style-name="P19" draw:layer="layout" svg:width="2.979cm" svg:height="0.539cm" svg:x="10.05cm" svg:y="10.809cm">
          <draw:text-box>
            <text:p text:style-name="P3"><text:span text:style-name="T17">bracketed IDs</text:span></text:p>
          </draw:text-box>
        </draw:frame>
        <draw:frame draw:style-name="gr18" draw:text-style-name="P19" draw:layer="layout" svg:width="6.736cm" svg:height="0.539cm" svg:x="10.05cm" svg:y="11.47cm">
          <draw:text-box>
            <text:p text:style-name="P3"><text:span text:style-name="T17">Human approves design before</text:span></text:p>
          </draw:text-box>
        </draw:frame>
        <draw:path draw:style-name="gr8" draw:text-style-name="P9" draw:layer="layout" svg:width="8.228cm" svg:height="5.927cm" svg:x="17.674cm" svg:y="7.778cm" svg:viewBox="0 0 8229 5928" svg:d="M31 31c20-20 45-31 74-31h8018c30 0 55 11 75 31 21 21 31 46 31 75v5716c0 29-10 54-31 75-20 21-45 31-75 31h-8018c-29 0-54-10-74-31-21-21-31-46-31-75v-5716c0-29 10-54 31-75z">
          <text:p/>
        </draw:path>
        <draw:path draw:style-name="gr2" draw:text-style-name="P2" draw:layer="layout" svg:width="8.151cm" svg:height="0.051cm" svg:x="17.722cm" svg:y="7.778cm" svg:viewBox="0 0 8152 52" svg:d="M8133 52c-1 0-1-2-1-2-16-16-35-23-57-23h-8018c-3 0-7 2-10 6l-47-16c17-11 36-17 57-17h8018c30 0 55 11 75 31 1 1 1 1 2 2z">
          <text:p/>
        </draw:path>
        <draw:path draw:style-name="gr2" draw:text-style-name="P2" draw:layer="layout" svg:width="8.151cm" svg:height="0.051cm" svg:x="17.722cm" svg:y="13.654cm" svg:viewBox="0 0 8152 52" svg:d="M47 18c3 4 7 6 10 6h8018c22 0 41-7 57-23 0 0 0-1 1-1l19 19c-1 0-1 0-2 1-20 22-45 32-75 32h-8018c-21 0-40-6-57-18z">
          <text:p/>
        </draw:path>
        <draw:path draw:style-name="gr2" draw:text-style-name="P2" draw:layer="layout" svg:width="0.049cm" svg:height="5.865cm" svg:x="25.853cm" svg:y="7.809cm" svg:viewBox="0 0 50 5866" svg:d="M0 5847c15-15 23-34 23-56v-5716c0-22-8-41-23-56l18-19c21 21 32 46 32 75v5716c0 29-11 54-32 75z">
          <text:p/>
        </draw:path>
        <draw:polygon draw:style-name="gr2" draw:text-style-name="P2" draw:layer="layout" svg:width="8.228cm" svg:height="5.927cm" svg:x="17.674cm" svg:y="7.778cm" svg:viewBox="0 0 8229 5928" draw:points="0,0 8229,0 8229,5928 0,5928">
          <text:p/>
        </draw:polygon>
        <draw:frame draw:style-name="gr18" draw:text-style-name="P19" draw:layer="layout" svg:width="3.275cm" svg:height="0.539cm" svg:x="10.05cm" svg:y="12.079cm">
          <draw:text-box>
            <text:p text:style-name="P3"><text:span text:style-name="T17">implementation</text:span></text:p>
          </draw:text-box>
        </draw:frame>
        <draw:path draw:style-name="gr17" draw:text-style-name="P18" draw:layer="layout" svg:width="0.159cm" svg:height="0.159cm" svg:x="18.176cm" svg:y="9.101cm" svg:viewBox="0 0 160 160" svg:d="M160 80c0 10-2 20-6 30s-10 18-17 26c-8 8-16 14-26 18s-20 6-30 6c-12 0-22-2-32-6-9-4-18-10-25-18-8-8-14-16-18-26s-6-20-6-30c0-11 2-21 6-31s10-18 18-26c7-7 16-13 25-17 10-4 20-6 32-6 10 0 20 2 30 6s18 10 26 17c7 8 13 16 17 26s6 20 6 31z">
          <text:p/>
        </draw:path>
        <draw:frame draw:style-name="gr20" draw:text-style-name="P21" draw:layer="layout" svg:width="4.579cm" svg:height="0.666cm" svg:x="18.207cm" svg:y="8.089cm">
          <draw:text-box>
            <text:p text:style-name="P3"><text:span text:style-name="T38">CODING AGENT</text:span></text:p>
          </draw:text-box>
        </draw:frame>
        <draw:path draw:style-name="gr17" draw:text-style-name="P18" draw:layer="layout" svg:width="0.159cm" svg:height="0.158cm" svg:x="18.176cm" svg:y="9.763cm" svg:viewBox="0 0 160 159" svg:d="M160 79c0 10-2 21-6 30-4 11-10 20-17 27-8 8-16 13-26 17s-20 6-30 6c-12 0-22-2-32-6-9-4-18-9-25-17-8-7-14-16-18-27-4-9-6-20-6-30 0-11 2-21 6-30 4-10 10-19 18-26 7-8 16-13 25-17 10-4 20-6 32-6 10 0 20 2 30 6s18 9 26 17c7 7 13 16 17 26 4 9 6 19 6 30z">
          <text:p/>
        </draw:path>
        <draw:frame draw:style-name="gr18" draw:text-style-name="P19" draw:layer="layout" svg:width="6.468cm" svg:height="0.539cm" svg:x="18.64cm" svg:y="8.878cm">
          <draw:text-box>
            <text:p text:style-name="P3"><text:span text:style-name="T17">9-step execution loop per step</text:span></text:p>
          </draw:text-box>
        </draw:frame>
        <draw:frame draw:style-name="gr18" draw:text-style-name="P19" draw:layer="layout" svg:width="7.753cm" svg:height="0.539cm" svg:x="18.64cm" svg:y="9.539cm">
          <draw:text-box>
            <text:p text:style-name="P3"><text:span text:style-name="T17">Observe → Refresh → Assemble →</text:span></text:p>
          </draw:text-box>
        </draw:frame>
        <draw:frame draw:style-name="gr18" draw:text-style-name="P19" draw:layer="layout" svg:width="7.968cm" svg:height="0.539cm" svg:x="18.64cm" svg:y="10.148cm">
          <draw:text-box>
            <text:p text:style-name="P3"><text:span text:style-name="T17">LLM → Approve → Execute → Verify</text:span></text:p>
          </draw:text-box>
        </draw:frame>
        <draw:path draw:style-name="gr17" draw:text-style-name="P18" draw:layer="layout" svg:width="0.159cm" svg:height="0.158cm" svg:x="18.176cm" svg:y="11.668cm" svg:viewBox="0 0 160 159" svg:d="M160 79c0 10-2 21-6 31s-10 19-17 26c-8 8-16 13-26 17s-20 6-30 6c-12 0-22-2-32-6-9-4-18-9-25-17-8-7-14-16-18-26s-6-21-6-31 2-21 6-30c4-10 10-19 18-26 7-8 16-13 25-17 10-4 20-6 32-6 10 0 20 2 30 6s18 9 26 17c7 7 13 16 17 26 4 9 6 20 6 30z">
          <text:p/>
        </draw:path>
        <draw:frame draw:style-name="gr18" draw:text-style-name="P19" draw:layer="layout" svg:width="4.482cm" svg:height="0.539cm" svg:x="18.64cm" svg:y="10.783cm">
          <draw:text-box>
            <text:p text:style-name="P3"><text:span text:style-name="T17">→ Update → Repeat</text:span></text:p>
          </draw:text-box>
        </draw:frame>
        <draw:frame draw:style-name="gr18" draw:text-style-name="P19" draw:layer="layout" svg:width="6.332cm" svg:height="0.539cm" svg:x="18.64cm" svg:y="11.444cm">
          <draw:text-box>
            <text:p text:style-name="P3"><text:span text:style-name="T17">Tool failure → Retry dialog →</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3.784cm" svg:height="0.539cm" svg:x="18.64cm" svg:y="12.053cm">
          <draw:text-box>
            <text:p text:style-name="P3"><text:span text:style-name="T17">Scenario memory</text:span></text:p>
          </draw:text-box>
        </draw:frame>
        <draw:frame draw:style-name="gr7" draw:text-style-name="P8" draw:layer="layout" svg:width="0.412cm" svg:height="0.412cm" svg:x="25.617cm" svg:y="18.503cm">
          <draw:text-box>
            <text:p text:style-name="P3"><text:span text:style-name="T6">27</text:span></text:p>
          </draw:text-box>
        </draw:frame>
      </draw:page>
      <draw:page draw:name="page28" draw:style-name="dp1" draw:master-page-name="master-page3">
        <draw:polygon draw:style-name="gr1" draw:text-style-name="P1" draw:layer="layout" svg:width="26.405cm" svg:height="19.235cm" svg:x="0cm" svg:y="0cm" svg:viewBox="0 0 26406 19236" draw:points="0,0 26406,0 26406,19236 0,19236">
          <text:p/>
        </draw:polygon>
        <draw:frame draw:style-name="gr9" draw:text-style-name="P10" draw:layer="layout" svg:width="20.65cm" svg:height="1.119cm" svg:x="2.184cm" svg:y="5.418cm">
          <draw:text-box>
            <text:p text:style-name="P3"><text:span text:style-name="T7">WORKFLOW STATE CHAINING &amp; CONTEXT</text:span></text:p>
          </draw:text-box>
        </draw:frame>
        <draw:frame draw:style-name="gr9" draw:text-style-name="P10" draw:layer="layout" svg:width="5.331cm" svg:height="1.119cm" svg:x="10.329cm" svg:y="6.609cm">
          <draw:text-box>
            <text:p text:style-name="P3"><text:span text:style-name="T7">ISOLATION</text:span></text:p>
          </draw:text-box>
        </draw:frame>
        <draw:frame draw:style-name="gr20" draw:text-style-name="P21" draw:layer="layout" svg:width="9.288cm" svg:height="0.666cm" svg:x="1.887cm" svg:y="8.195cm">
          <draw:text-box>
            <text:p text:style-name="P3"><text:span text:style-name="T68">STEP-TO-STEP STATE MACHINE</text:span></text:p>
          </draw:text-box>
        </draw:frame>
        <draw:frame draw:style-name="gr7" draw:text-style-name="P8" draw:layer="layout" svg:width="12.532cm" svg:height="0.412cm" svg:x="0.787cm" svg:y="9.428cm">
          <draw:text-box>
            <text:p text:style-name="P3"><text:span text:style-name="T36">After each execution step, the system captures what the agent proposed and</text:span></text:p>
          </draw:text-box>
        </draw:frame>
        <draw:frame draw:style-name="gr7" draw:text-style-name="P8" draw:layer="layout" svg:width="12.797cm" svg:height="0.412cm" svg:x="0.634cm" svg:y="9.904cm">
          <draw:text-box>
            <text:p text:style-name="P3"><text:span text:style-name="T36">how the human responded. This state is injected into the next step’s prompt —</text:span></text:p>
          </draw:text-box>
        </draw:frame>
        <draw:polygon draw:style-name="gr2" draw:text-style-name="P2" draw:layer="layout" svg:width="1.323cm" svg:height="0.609cm" svg:x="13.573cm" svg:y="10.9cm" svg:viewBox="0 0 1324 610" draw:points="0,0 1324,0 1324,610 0,610">
          <text:p/>
        </draw:polygon>
        <draw:polygon draw:style-name="gr2" draw:text-style-name="P2" draw:layer="layout" svg:width="6.164cm" svg:height="0.609cm" svg:x="14.896cm" svg:y="10.9cm" svg:viewBox="0 0 6165 610" draw:points="0,0 6165,0 6165,610 0,610">
          <text:p/>
        </draw:polygon>
        <draw:polygon draw:style-name="gr2" draw:text-style-name="P2" draw:layer="layout" svg:width="4.842cm" svg:height="0.609cm" svg:x="21.06cm" svg:y="10.9cm" svg:viewBox="0 0 4843 610" draw:points="0,0 4843,0 4843,610 0,610">
          <text:p/>
        </draw:polygon>
        <draw:polygon draw:style-name="gr30" draw:text-style-name="P31" draw:layer="layout" svg:width="1.323cm" svg:height="0.608cm" svg:x="13.573cm" svg:y="12.144cm" svg:viewBox="0 0 1324 609" draw:points="0,0 1324,0 1324,609 0,609">
          <text:p/>
        </draw:polygon>
        <draw:polygon draw:style-name="gr30" draw:text-style-name="P31" draw:layer="layout" svg:width="6.164cm" svg:height="0.608cm" svg:x="14.896cm" svg:y="12.144cm" svg:viewBox="0 0 6165 609" draw:points="0,0 6165,0 6165,609 0,609">
          <text:p/>
        </draw:polygon>
        <draw:polygon draw:style-name="gr30" draw:text-style-name="P31" draw:layer="layout" svg:width="4.842cm" svg:height="0.608cm" svg:x="21.06cm" svg:y="12.144cm" svg:viewBox="0 0 4843 609" draw:points="0,0 4843,0 4843,609 0,609">
          <text:p/>
        </draw:polygon>
        <draw:polygon draw:style-name="gr1" draw:text-style-name="P1" draw:layer="layout" svg:width="1.323cm" svg:height="0.026cm" svg:x="13.573cm" svg:y="11.509cm" svg:viewBox="0 0 1324 27" draw:points="0,0 1324,0 1324,27 0,27">
          <text:p/>
        </draw:polygon>
        <draw:polygon draw:style-name="gr1" draw:text-style-name="P1" draw:layer="layout" svg:width="6.164cm" svg:height="0.026cm" svg:x="14.896cm" svg:y="11.509cm" svg:viewBox="0 0 6165 27" draw:points="0,0 6165,0 6165,27 0,27">
          <text:p/>
        </draw:polygon>
        <draw:polygon draw:style-name="gr1" draw:text-style-name="P1" draw:layer="layout" svg:width="4.842cm" svg:height="0.026cm" svg:x="21.06cm" svg:y="11.509cm" svg:viewBox="0 0 4843 27" draw:points="0,0 4843,0 4843,27 0,27">
          <text:p/>
        </draw:polygon>
        <draw:polygon draw:style-name="gr31" draw:text-style-name="P32" draw:layer="layout" svg:width="1.323cm" svg:height="0.027cm" svg:x="13.573cm" svg:y="12.117cm" svg:viewBox="0 0 1324 28" draw:points="0,0 1324,0 1324,28 0,28">
          <text:p/>
        </draw:polygon>
        <draw:polygon draw:style-name="gr31" draw:text-style-name="P32" draw:layer="layout" svg:width="6.164cm" svg:height="0.027cm" svg:x="14.896cm" svg:y="12.117cm" svg:viewBox="0 0 6165 28" draw:points="0,0 6165,0 6165,28 0,28">
          <text:p/>
        </draw:polygon>
        <draw:polygon draw:style-name="gr31" draw:text-style-name="P32" draw:layer="layout" svg:width="4.842cm" svg:height="0.027cm" svg:x="21.06cm" svg:y="12.117cm" svg:viewBox="0 0 4843 28" draw:points="0,0 4843,0 4843,28 0,28">
          <text:p/>
        </draw:polygon>
        <draw:polygon draw:style-name="gr31" draw:text-style-name="P32" draw:layer="layout" svg:width="1.323cm" svg:height="0.026cm" svg:x="13.573cm" svg:y="12.726cm" svg:viewBox="0 0 1324 27" draw:points="0,0 1324,0 1324,27 0,27">
          <text:p/>
        </draw:polygon>
        <draw:polygon draw:style-name="gr31" draw:text-style-name="P32" draw:layer="layout" svg:width="6.164cm" svg:height="0.026cm" svg:x="14.896cm" svg:y="12.726cm" svg:viewBox="0 0 6165 27" draw:points="0,0 6165,0 6165,27 0,27">
          <text:p/>
        </draw:polygon>
        <draw:polygon draw:style-name="gr31" draw:text-style-name="P32" draw:layer="layout" svg:width="4.842cm" svg:height="0.026cm" svg:x="21.06cm" svg:y="12.726cm" svg:viewBox="0 0 4843 27" draw:points="0,0 4843,0 4843,27 0,27">
          <text:p/>
        </draw:polygon>
        <draw:frame draw:style-name="gr7" draw:text-style-name="P8" draw:layer="layout" svg:width="8.456cm" svg:height="0.412cm" svg:x="2.8cm" svg:y="10.38cm">
          <draw:text-box>
            <text:p text:style-name="P3"><text:span text:style-name="T36">the agent </text:span><text:span text:style-name="T54">learns from its corrections</text:span><text:span text:style-name="T36"> mid-session.</text:span></text:p>
          </draw:text-box>
        </draw:frame>
        <draw:frame draw:style-name="gr20" draw:text-style-name="P21" draw:layer="layout" svg:width="8.795cm" svg:height="0.666cm" svg:x="15.174cm" svg:y="8.195cm">
          <draw:text-box>
            <text:p text:style-name="P3"><text:span text:style-name="T68">3-LAYER CONTEXT ISOLATION</text:span></text:p>
          </draw:text-box>
        </draw:frame>
        <draw:frame draw:style-name="gr7" draw:text-style-name="P8" draw:layer="layout" svg:width="12.798cm" svg:height="0.412cm" svg:x="13.675cm" svg:y="9.428cm">
          <draw:text-box>
            <text:p text:style-name="P3"><text:span text:style-name="T36">Each phase gets only the context it needs. Instruction pollution is prevented by</text:span></text:p>
          </draw:text-box>
        </draw:frame>
        <draw:frame draw:style-name="gr7" draw:text-style-name="P8" draw:layer="layout" svg:width="1.19cm" svg:height="0.412cm" svg:x="19.179cm" svg:y="9.904cm">
          <draw:text-box>
            <text:p text:style-name="P3"><text:span text:style-name="T36">design.</text:span></text:p>
          </draw:text-box>
        </draw:frame>
        <draw:frame draw:style-name="gr78" draw:text-style-name="P43" draw:layer="layout" svg:width="0.987cm" svg:height="0.378cm" svg:x="13.706cm" svg:y="10.97cm">
          <draw:text-box>
            <text:p text:style-name="P3"><text:span text:style-name="T69">Phase</text:span></text:p>
          </draw:text-box>
        </draw:frame>
        <draw:frame draw:style-name="gr78" draw:text-style-name="P43" draw:layer="layout" svg:width="1.377cm" svg:height="0.378cm" svg:x="15.031cm" svg:y="10.97cm">
          <draw:text-box>
            <text:p text:style-name="P3"><text:span text:style-name="T69">Included</text:span></text:p>
          </draw:text-box>
        </draw:frame>
        <draw:frame draw:style-name="gr78" draw:text-style-name="P43" draw:layer="layout" svg:width="1.265cm" svg:height="0.378cm" svg:x="21.201cm" svg:y="10.97cm">
          <draw:text-box>
            <text:p text:style-name="P3"><text:span text:style-name="T69">Omitted</text:span></text:p>
          </draw:text-box>
        </draw:frame>
        <draw:frame draw:style-name="gr78" draw:text-style-name="P43" draw:layer="layout" svg:width="0.801cm" svg:height="0.378cm" svg:x="13.706cm" svg:y="11.605cm">
          <draw:text-box>
            <text:p text:style-name="P3"><text:span text:style-name="T70">Spec</text:span></text:p>
          </draw:text-box>
        </draw:frame>
        <draw:frame draw:style-name="gr78" draw:text-style-name="P43" draw:layer="layout" svg:width="3.385cm" svg:height="0.378cm" svg:x="15.031cm" svg:y="11.631cm">
          <draw:text-box>
            <text:p text:style-name="P3"><text:span text:style-name="T71">Canvas, schema, Q&amp;A</text:span></text:p>
          </draw:text-box>
        </draw:frame>
        <draw:frame draw:style-name="gr78" draw:text-style-name="P43" draw:layer="layout" svg:width="2.957cm" svg:height="0.378cm" svg:x="21.201cm" svg:y="11.631cm">
          <draw:text-box>
            <text:p text:style-name="P3"><text:span text:style-name="T71">File lists, AST, code</text:span></text:p>
          </draw:text-box>
        </draw:frame>
        <draw:frame draw:style-name="gr78" draw:text-style-name="P43" draw:layer="layout" svg:width="0.708cm" svg:height="0.378cm" svg:x="13.706cm" svg:y="12.24cm">
          <draw:text-box>
            <text:p text:style-name="P3"><text:span text:style-name="T70">Plan</text:span></text:p>
          </draw:text-box>
        </draw:frame>
        <draw:frame draw:style-name="gr78" draw:text-style-name="P43" draw:layer="layout" svg:width="4.203cm" svg:height="0.378cm" svg:x="15.031cm" svg:y="12.24cm">
          <draw:text-box>
            <text:p text:style-name="P3"><text:span text:style-name="T71">Spec, repo tree, AST, config</text:span></text:p>
          </draw:text-box>
        </draw:frame>
        <draw:frame draw:style-name="gr78" draw:text-style-name="P43" draw:layer="layout" svg:width="4.092cm" svg:height="0.378cm" svg:x="21.201cm" svg:y="12.24cm">
          <draw:text-box>
            <text:p text:style-name="P3"><text:span text:style-name="T71">Execution logs, tool outputs</text:span></text:p>
          </draw:text-box>
        </draw:frame>
        <draw:frame draw:style-name="gr78" draw:text-style-name="P43" draw:layer="layout" svg:width="0.838cm" svg:height="0.378cm" svg:x="13.706cm" svg:y="12.848cm">
          <draw:text-box>
            <text:p text:style-name="P3"><text:span text:style-name="T70">Code</text:span></text:p>
          </draw:text-box>
        </draw:frame>
        <draw:frame draw:style-name="gr78" draw:text-style-name="P43" draw:layer="layout" svg:width="5.374cm" svg:height="0.378cm" svg:x="15.031cm" svg:y="12.848cm">
          <draw:text-box>
            <text:p text:style-name="P3"><text:span text:style-name="T71">Spec, plan, graph, memory, artifacts</text:span></text:p>
          </draw:text-box>
        </draw:frame>
        <draw:path draw:style-name="gr76" draw:text-style-name="P60" draw:layer="layout" svg:width="12.149cm" svg:height="3.556cm" svg:x="0cm" svg:y="10.947cm" svg:viewBox="0 0 12150 3557" svg:d="M0 0h12150v3557h-12150zM529 535v2224c0 22 7 41 23 56 15 16 34 23 56 23h10875c22 0 41-7 57-23 15-15 23-34 23-56v-2224c0-22-8-40-23-56-16-15-35-23-57-23h-10875c-22 0-41 8-56 23-16 16-23 34-23 56z">
          <text:p/>
        </draw:path>
        <draw:path draw:style-name="gr77" draw:text-style-name="P61" draw:layer="layout" svg:width="11.086cm" svg:height="2.434cm" svg:x="0.502cm" svg:y="11.377cm" svg:viewBox="0 0 11087 2435" svg:d="M0 2329v-2224c0-14 3-27 8-40 6-13 13-25 23-34 10-10 22-18 35-23 13-6 26-8 40-8h10875c14 0 28 2 41 8 13 5 24 13 34 23 10 9 18 21 23 34 6 13 8 26 8 40v2224c0 14-2 27-8 40-5 13-13 25-23 35s-21 17-34 23c-13 5-27 8-41 8h-10875c-14 0-27-3-40-8-13-6-25-13-35-23s-17-22-23-35c-5-13-8-26-8-40z">
          <text:p/>
        </draw:path>
        <draw:frame draw:style-name="gr78" draw:text-style-name="P43" draw:layer="layout" svg:width="4.017cm" svg:height="0.378cm" svg:x="21.201cm" svg:y="12.848cm">
          <draw:text-box>
            <text:p text:style-name="P3"><text:span text:style-name="T71">Canvas drafts, Q&amp;A details</text:span></text:p>
          </draw:text-box>
        </draw:frame>
        <draw:frame draw:style-name="gr88" draw:text-style-name="P68" draw:layer="layout" svg:width="4.17cm" svg:height="0.332cm" svg:x="0.71cm" svg:y="11.532cm">
          <draw:text-box>
            <text:p text:style-name="P3"><text:span text:style-name="T67"># State captured between steps</text:span></text:p>
          </draw:text-box>
        </draw:frame>
        <draw:frame draw:style-name="gr88" draw:text-style-name="P68" draw:layer="layout" svg:width="1.806cm" svg:height="0.332cm" svg:x="0.71cm" svg:y="11.876cm">
          <draw:text-box>
            <text:p text:style-name="P3"><text:span text:style-name="T67">step_state = {</text:span></text:p>
          </draw:text-box>
        </draw:frame>
        <draw:frame draw:style-name="gr88" draw:text-style-name="P68" draw:layer="layout" svg:width="5.678cm" svg:height="0.332cm" svg:x="0.71cm" svg:y="12.247cm">
          <draw:text-box>
            <text:p text:style-name="P3"><text:span text:style-name="T67"><text:s text:c="4"/>"proposal": "Add route /health in app.py",</text:span></text:p>
          </draw:text-box>
        </draw:frame>
        <draw:frame draw:style-name="gr88" draw:text-style-name="P68" draw:layer="layout" svg:width="5.71cm" svg:height="0.332cm" svg:x="0.71cm" svg:y="12.591cm">
          <draw:text-box>
            <text:p text:style-name="P3"><text:span text:style-name="T67"><text:s text:c="4"/>"correction": "Use /api/v1/health instead",</text:span></text:p>
          </draw:text-box>
        </draw:frame>
        <draw:frame draw:style-name="gr88" draw:text-style-name="P68" draw:layer="layout" svg:width="4.54cm" svg:height="0.332cm" svg:x="0.71cm" svg:y="12.961cm">
          <draw:text-box>
            <text:p text:style-name="P3"><text:span text:style-name="T67"><text:s text:c="4"/>"trajectory": "...previous steps..."</text:span></text:p>
          </draw:text-box>
        </draw:frame>
        <draw:polygon draw:style-name="gr6" draw:text-style-name="P7" draw:layer="layout" svg:width="0.714cm" svg:height="0.635cm" svg:x="25.479cm" svg:y="18.388cm" svg:viewBox="0 0 715 636" draw:points="0,0 715,0 715,636 0,636">
          <text:p/>
        </draw:polygon>
        <draw:frame draw:style-name="gr88" draw:text-style-name="P68" draw:layer="layout" svg:width="0.295cm" svg:height="0.332cm" svg:x="0.71cm" svg:y="13.305cm">
          <draw:text-box>
            <text:p text:style-name="P3"><text:span text:style-name="T67">}</text:span></text:p>
          </draw:text-box>
        </draw:frame>
        <draw:frame draw:style-name="gr7" draw:text-style-name="P8" draw:layer="layout" svg:width="0.412cm" svg:height="0.412cm" svg:x="25.617cm" svg:y="18.503cm">
          <draw:text-box>
            <text:p text:style-name="P3"><text:span text:style-name="T6">28</text:span></text:p>
          </draw:text-box>
        </draw:frame>
      </draw:page>
      <draw:page draw:name="page29"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145cm" svg:height="4.71cm" svg:x="0.502cm" svg:y="8.281cm" svg:viewBox="0 0 12146 4711" svg:d="M31 31c21-21 46-31 75-31h11934c29 0 54 10 75 31 20 21 31 46 31 75v4499c0 29-11 54-31 75-21 20-46 31-75 31h-11934c-29 0-54-11-75-31-20-21-31-46-31-75v-4499c0-29 11-54 31-75z">
          <text:p/>
        </draw:path>
        <draw:path draw:style-name="gr2" draw:text-style-name="P2" draw:layer="layout" svg:width="12.067cm" svg:height="0.051cm" svg:x="0.55cm" svg:y="8.281cm" svg:viewBox="0 0 12068 52" svg:d="M12049 52l-1-1c-16-16-34-24-56-24h-11934c-4 0-7 2-10 7l-48-16c17-12 36-18 58-18h11934c29 0 54 11 75 32 0 0 0 1 1 1z">
          <text:p/>
        </draw:path>
        <draw:path draw:style-name="gr2" draw:text-style-name="P2" draw:layer="layout" svg:width="12.067cm" svg:height="0.052cm" svg:x="0.55cm" svg:y="12.939cm" svg:viewBox="0 0 12068 53" svg:d="M48 19c3 4 6 6 10 6h11934c22 0 40-8 56-23 0-1 1-1 1-2l19 19c-1 1-1 1-1 2-21 21-46 32-75 32h-11934c-22 0-41-6-58-18z">
          <text:p/>
        </draw:path>
        <draw:path draw:style-name="gr2" draw:text-style-name="P2" draw:layer="layout" svg:width="0.05cm" svg:height="4.648cm" svg:x="12.597cm" svg:y="8.312cm" svg:viewBox="0 0 51 4649" svg:d="M0 4630c15-16 24-34 24-56v-4499c0-22-9-41-24-56l19-19c21 21 32 46 32 75v4499c0 29-11 54-32 75z">
          <text:p/>
        </draw:path>
        <draw:polygon draw:style-name="gr2" draw:text-style-name="P2" draw:layer="layout" svg:width="12.145cm" svg:height="4.71cm" svg:x="0.502cm" svg:y="8.281cm" svg:viewBox="0 0 12146 4711" draw:points="0,0 12146,0 12146,4711 0,4711">
          <text:p/>
        </draw:polygon>
        <draw:frame draw:style-name="gr9" draw:text-style-name="P10" draw:layer="layout" svg:width="19.211cm" svg:height="1.119cm" svg:x="2.94cm" svg:y="4.598cm">
          <draw:text-box>
            <text:p text:style-name="P3"><text:span text:style-name="T7">LAYER 4: DATA — KNOWLEDGE GRAPH</text:span></text:p>
          </draw:text-box>
        </draw:frame>
        <draw:path draw:style-name="gr33" draw:text-style-name="P34" draw:layer="layout" svg:width="1.191cm" svg:height="0.476cm" svg:x="7.302cm" svg:y="6.72cm" svg:viewBox="0 0 1192 477" svg:d="M0 398v-319c0-10 2-20 6-30s10-18 17-26c8-7 16-13 26-17s20-6 30-6h1033c11 0 21 2 31 6 9 4 18 10 25 17 8 8 14 16 18 26s6 20 6 30v319c0 10-2 20-6 30s-10 18-18 26c-7 7-16 13-25 17-10 4-20 6-31 6h-1033c-10 0-20-2-30-6s-18-10-26-17c-7-8-13-16-17-26s-6-20-6-30z">
          <text:p/>
        </draw:path>
        <draw:frame draw:style-name="gr13" draw:text-style-name="P14" draw:layer="layout" svg:width="7.095cm" svg:height="0.454cm" svg:x="0.931cm" svg:y="6.696cm">
          <draw:text-box>
            <text:p text:style-name="P3"><text:span text:style-name="T35">SQLite-backed AST parser</text:span><text:span text:style-name="T10"> building a </text:span></text:p>
          </draw:text-box>
        </draw:frame>
        <draw:frame draw:style-name="gr79" draw:text-style-name="P62" draw:layer="layout" svg:width="0.948cm" svg:height="0.386cm" svg:x="7.38cm" svg:y="6.768cm">
          <draw:text-box>
            <text:p text:style-name="P3"><text:span text:style-name="T61">nodes</text:span></text:p>
          </draw:text-box>
        </draw:frame>
        <draw:path draw:style-name="gr33" draw:text-style-name="P34" draw:layer="layout" svg:width="1.217cm" svg:height="0.476cm" svg:x="8.863cm" svg:y="6.72cm" svg:viewBox="0 0 1218 477" svg:d="M0 398v-319c0-10 2-20 6-30s10-18 17-26c8-7 16-13 26-17s20-6 30-6h1060c10 0 20 2 30 6s18 10 26 17c7 8 13 16 17 26s6 20 6 30v319c0 10-2 20-6 30s-10 18-17 26c-8 7-16 13-26 17s-20 6-30 6h-1060c-10 0-20-2-30-6s-18-10-26-17c-7-8-13-16-17-26s-6-20-6-30z">
          <text:p/>
        </draw:path>
        <draw:frame draw:style-name="gr13" draw:text-style-name="P14" draw:layer="layout" svg:width="0.465cm" svg:height="0.454cm" svg:x="8.505cm" svg:y="6.696cm">
          <draw:text-box>
            <text:p text:style-name="P3"><text:span text:style-name="T10"><text:s/>+ </text:span></text:p>
          </draw:text-box>
        </draw:frame>
        <draw:frame draw:style-name="gr79" draw:text-style-name="P62" draw:layer="layout" svg:width="0.948cm" svg:height="0.386cm" svg:x="8.958cm" svg:y="6.768cm">
          <draw:text-box>
            <text:p text:style-name="P3"><text:span text:style-name="T61">edges</text:span></text:p>
          </draw:text-box>
        </draw:frame>
        <draw:frame draw:style-name="gr13" draw:text-style-name="P14" draw:layer="layout" svg:width="2.284cm" svg:height="0.454cm" svg:x="10.083cm" svg:y="6.696cm">
          <draw:text-box>
            <text:p text:style-name="P3"><text:span text:style-name="T10"><text:s/>graph of the</text:span></text:p>
          </draw:text-box>
        </draw:frame>
        <draw:frame draw:style-name="gr13" draw:text-style-name="P14" draw:layer="layout" svg:width="1.899cm" svg:height="0.454cm" svg:x="5.658cm" svg:y="7.251cm">
          <draw:text-box>
            <text:p text:style-name="P3"><text:span text:style-name="T10">repository.</text:span></text:p>
          </draw:text-box>
        </draw:frame>
        <draw:path draw:style-name="gr17" draw:text-style-name="P18" draw:layer="layout" svg:width="0.159cm" svg:height="0.159cm" svg:x="0.978cm" svg:y="9.604cm" svg:viewBox="0 0 160 160" svg:d="M160 79c0 11-2 21-6 31s-10 19-17 26c-7 8-16 13-26 18-10 4-20 6-30 6-11 0-21-2-31-6-10-5-19-10-26-18-8-7-13-16-17-26-5-10-7-20-7-31 0-10 2-20 7-30 4-10 9-19 17-26 7-7 16-13 26-17s20-6 31-6c10 0 20 2 30 6s19 10 26 17 13 16 17 26 6 20 6 30z">
          <text:p/>
        </draw:path>
        <draw:path draw:style-name="gr33" draw:text-style-name="P34" draw:layer="layout" svg:width="1.428cm" svg:height="0.582cm" svg:x="1.455cm" svg:y="9.392cm" svg:viewBox="0 0 1429 583" svg:d="M0 504v-424c0-11 2-21 6-31s10-18 17-26c7-7 16-13 26-17 9-4 20-6 30-6h1271c11 0 21 2 30 6 10 4 19 10 26 17 8 8 13 16 17 26s6 20 6 31v424c0 10-2 21-6 30-4 10-9 18-17 26-7 7-16 13-26 17-9 4-19 6-30 6h-1271c-10 0-21-2-30-6-10-4-19-10-26-17-7-8-13-16-17-26-4-9-6-20-6-30z">
          <text:p/>
        </draw:path>
        <draw:frame draw:style-name="gr20" draw:text-style-name="P21" draw:layer="layout" svg:width="5.369cm" svg:height="0.666cm" svg:x="1.027cm" svg:y="8.592cm">
          <draw:text-box>
            <text:p text:style-name="P3"><text:span text:style-name="T38">QUERY GRAMMAR</text:span></text:p>
          </draw:text-box>
        </draw:frame>
        <draw:frame draw:style-name="gr75" draw:text-style-name="P59" draw:layer="layout" svg:width="0.732cm" svg:height="0.463cm" svg:x="1.562cm" svg:y="9.466cm">
          <draw:text-box>
            <text:p text:style-name="P3"><text:span text:style-name="T58">files</text:span></text:p>
          </draw:text-box>
        </draw:frame>
        <draw:path draw:style-name="gr17" draw:text-style-name="P18" draw:layer="layout" svg:width="0.159cm" svg:height="0.159cm" svg:x="0.978cm" svg:y="10.265cm" svg:viewBox="0 0 160 160" svg:d="M160 80c0 11-2 21-6 31s-10 18-17 26c-7 7-16 13-26 17s-20 6-30 6c-11 0-21-2-31-6s-19-10-26-17c-8-8-13-16-17-26-5-10-7-20-7-31s2-21 7-31c4-9 9-18 17-25 7-8 16-14 26-18s20-6 31-6c10 0 20 2 30 6s19 10 26 18c7 7 13 16 17 25 4 10 6 20 6 31z">
          <text:p/>
        </draw:path>
        <draw:path draw:style-name="gr33" draw:text-style-name="P34" draw:layer="layout" svg:width="3.651cm" svg:height="0.609cm" svg:x="1.455cm" svg:y="10.027cm" svg:viewBox="0 0 3652 610" svg:d="M0 530v-449c0-11 2-21 6-31s10-18 17-26c7-7 16-13 26-17 9-5 20-7 30-7h3494c10 0 20 2 30 7 10 4 18 10 26 17 7 8 13 16 17 26s6 20 6 31v449c0 11-2 21-6 31-4 9-10 18-17 25-8 8-16 14-26 18s-20 6-30 6h-3494c-10 0-21-2-30-6-10-4-19-10-26-18-7-7-13-16-17-25-4-10-6-20-6-31z">
          <text:p/>
        </draw:path>
        <draw:frame draw:style-name="gr18" draw:text-style-name="P19" draw:layer="layout" svg:width="3.113cm" svg:height="0.539cm" svg:x="2.892cm" svg:y="9.38cm">
          <draw:text-box>
            <text:p text:style-name="P3"><text:span text:style-name="T17"><text:s/>— List all files</text:span></text:p>
          </draw:text-box>
        </draw:frame>
        <draw:frame draw:style-name="gr75" draw:text-style-name="P59" draw:layer="layout" svg:width="2.764cm" svg:height="0.463cm" svg:x="1.562cm" svg:y="10.101cm">
          <draw:text-box>
            <text:p text:style-name="P3"><text:span text:style-name="T58">classes.&lt;path&gt;</text:span></text:p>
          </draw:text-box>
        </draw:frame>
        <draw:path draw:style-name="gr17" draw:text-style-name="P18" draw:layer="layout" svg:width="0.159cm" svg:height="0.159cm" svg:x="0.978cm" svg:y="10.9cm" svg:viewBox="0 0 160 160" svg:d="M160 80c0 11-2 21-6 31s-10 18-17 26c-7 7-16 13-26 17s-20 6-30 6c-11 0-21-2-31-6s-19-10-26-17c-8-8-13-16-17-26-5-10-7-20-7-31s2-21 7-31c4-9 9-18 17-25 7-8 16-14 26-18s20-6 31-6c10 0 20 2 30 6s19 10 26 18c7 7 13 16 17 25 4 10 6 20 6 31z">
          <text:p/>
        </draw:path>
        <draw:path draw:style-name="gr33" draw:text-style-name="P34" draw:layer="layout" svg:width="3.651cm" svg:height="0.582cm" svg:x="1.455cm" svg:y="10.689cm" svg:viewBox="0 0 3652 583" svg:d="M0 503v-423c0-12 2-22 6-31 4-10 10-19 17-26 7-8 16-13 26-17 9-4 20-6 30-6h3494c10 0 20 2 30 6s18 9 26 17c7 7 13 16 17 26 4 9 6 19 6 31v423c0 11-2 21-6 31-4 9-10 18-17 25-8 8-16 14-26 18s-20 6-30 6h-3494c-10 0-21-2-30-6-10-4-19-10-26-18-7-7-13-16-17-25-4-10-6-20-6-31z">
          <text:p/>
        </draw:path>
        <draw:frame draw:style-name="gr18" draw:text-style-name="P19" draw:layer="layout" svg:width="4.132cm" svg:height="0.539cm" svg:x="5.102cm" svg:y="10.042cm">
          <draw:text-box>
            <text:p text:style-name="P3"><text:span text:style-name="T17"><text:s/>— Classes in a file</text:span></text:p>
          </draw:text-box>
        </draw:frame>
        <draw:frame draw:style-name="gr75" draw:text-style-name="P59" draw:layer="layout" svg:width="2.741cm" svg:height="0.463cm" svg:x="1.562cm" svg:y="10.762cm">
          <draw:text-box>
            <text:p text:style-name="P3"><text:span text:style-name="T58">imports.&lt;path&gt;</text:span></text:p>
          </draw:text-box>
        </draw:frame>
        <draw:path draw:style-name="gr17" draw:text-style-name="P18" draw:layer="layout" svg:width="0.159cm" svg:height="0.159cm" svg:x="0.978cm" svg:y="11.562cm" svg:viewBox="0 0 160 160" svg:d="M160 80c0 11-2 21-6 30-4 10-10 19-17 26-7 8-16 13-26 17-10 5-20 7-30 7-11 0-21-2-31-7-10-4-19-9-26-17-8-7-13-16-17-26-5-9-7-19-7-30 0-10 2-21 7-31 4-10 9-19 17-26 7-7 16-13 26-17s20-6 31-6c10 0 20 2 30 6s19 10 26 17 13 16 17 26 6 21 6 31z">
          <text:p/>
        </draw:path>
        <draw:path draw:style-name="gr33" draw:text-style-name="P34" draw:layer="layout" svg:width="4.63cm" svg:height="0.608cm" svg:x="1.455cm" svg:y="11.324cm" svg:viewBox="0 0 4631 609" svg:d="M0 529v-450c0-10 2-21 6-30 4-10 10-19 17-26 7-8 16-13 26-17 9-4 20-6 30-6h4473c10 0 20 2 30 6s18 9 26 17c7 7 13 16 17 26 4 9 6 20 6 30v450c0 11-2 21-6 31s-10 18-17 26c-8 7-16 13-26 17s-20 6-30 6h-4473c-10 0-21-2-30-6-10-4-19-10-26-17-7-8-13-16-17-26s-6-20-6-31z">
          <text:p/>
        </draw:path>
        <draw:frame draw:style-name="gr18" draw:text-style-name="P19" draw:layer="layout" svg:width="3.838cm" svg:height="0.539cm" svg:x="5.102cm" svg:y="10.677cm">
          <draw:text-box>
            <text:p text:style-name="P3"><text:span text:style-name="T17"><text:s/>— Dependencies</text:span></text:p>
          </draw:text-box>
        </draw:frame>
        <draw:frame draw:style-name="gr75" draw:text-style-name="P59" draw:layer="layout" svg:width="3.655cm" svg:height="0.463cm" svg:x="1.562cm" svg:y="11.397cm">
          <draw:text-box>
            <text:p text:style-name="P3"><text:span text:style-name="T58">imported_by.&lt;path&gt;</text:span></text:p>
          </draw:text-box>
        </draw:frame>
        <draw:path draw:style-name="gr17" draw:text-style-name="P18" draw:layer="layout" svg:width="0.159cm" svg:height="0.159cm" svg:x="0.978cm" svg:y="12.223cm" svg:viewBox="0 0 160 160" svg:d="M160 81c0 10-2 20-6 30s-10 18-17 26c-7 7-16 13-26 17s-20 6-30 6c-11 0-21-2-31-6s-19-10-26-17c-8-8-13-16-17-26-5-10-7-20-7-30 0-11 2-21 7-31 4-10 9-18 17-26 7-8 16-14 26-18s20-6 31-6c10 0 20 2 30 6s19 10 26 18 13 16 17 26 6 20 6 31z">
          <text:p/>
        </draw:path>
        <draw:path draw:style-name="gr33" draw:text-style-name="P34" draw:layer="layout" svg:width="3.651cm" svg:height="0.582cm" svg:x="1.455cm" svg:y="11.985cm" svg:viewBox="0 0 3652 583" svg:d="M0 503v-423c0-11 2-21 6-31s10-18 17-26c7-7 16-13 26-17 9-4 20-6 30-6h3494c10 0 20 2 30 6s18 10 26 17c7 8 13 16 17 26s6 20 6 31v423c0 10-2 20-6 31-4 10-10 18-17 26-8 7-16 13-26 17s-20 6-30 6h-3494c-10 0-21-2-30-6-10-4-19-10-26-17-7-8-13-16-17-26-4-11-6-21-6-31z">
          <text:p/>
        </draw:path>
        <draw:frame draw:style-name="gr18" draw:text-style-name="P19" draw:layer="layout" svg:width="3.73cm" svg:height="0.539cm" svg:x="6.085cm" svg:y="11.338cm">
          <draw:text-box>
            <text:p text:style-name="P3"><text:span text:style-name="T17"><text:s/>— Reverse deps</text:span></text:p>
          </draw:text-box>
        </draw:frame>
        <draw:frame draw:style-name="gr75" draw:text-style-name="P59" draw:layer="layout" svg:width="2.971cm" svg:height="0.463cm" svg:x="1.562cm" svg:y="12.059cm">
          <draw:text-box>
            <text:p text:style-name="P3"><text:span text:style-name="T58">node.&lt;node_id&gt;</text:span></text:p>
          </draw:text-box>
        </draw:frame>
        <draw:frame draw:style-name="gr18" draw:text-style-name="P19" draw:layer="layout" svg:width="3.65cm" svg:height="0.539cm" svg:x="5.102cm" svg:y="12cm">
          <draw:text-box>
            <text:p text:style-name="P3"><text:span text:style-name="T17"><text:s/>— Specific node</text:span></text:p>
          </draw:text-box>
        </draw:frame>
        <draw:frame draw:style-name="gr7" draw:text-style-name="P8" draw:layer="layout" svg:width="11.753cm" svg:height="0.412cm" svg:x="1.132cm" svg:y="13.211cm">
          <draw:text-box>
            <text:p text:style-name="P3"><text:span text:style-name="T36">The LLM cannot navigate a filesystem — the knowledge graph gives it a</text:span></text:p>
          </draw:text-box>
        </draw:frame>
        <draw:path draw:style-name="gr76" draw:text-style-name="P60" draw:layer="layout" svg:width="13.579cm" svg:height="5.113cm" svg:x="12.826cm" svg:y="7.984cm" svg:viewBox="0 0 13580 5114" svg:d="M13580 5114h-13580v-5114h13580zM588 535v3784c0 22 8 40 23 56 16 15 34 23 56 23h12304c22 0 41-8 56-23 16-16 24-34 24-56v-3784c0-22-8-41-24-56-15-16-34-23-56-23h-12304c-22 0-40 7-56 23-15 15-23 34-23 56z">
          <text:p/>
        </draw:path>
        <draw:path draw:style-name="gr77" draw:text-style-name="P61" draw:layer="layout" svg:width="12.515cm" svg:height="3.995cm" svg:x="13.387cm" svg:y="8.413cm" svg:viewBox="0 0 12516 3996" svg:d="M0 3891v-3785c0-14 3-28 8-40 6-13 13-25 23-35s22-17 35-23c13-5 26-8 40-8h12304c14 0 28 3 41 8 13 6 24 13 34 23s18 22 23 35c6 12 8 26 8 40v3785c0 14-2 27-8 40-5 13-13 24-23 34s-21 18-34 23c-13 6-27 8-41 8h-12304c-14 0-27-2-40-8-13-5-25-13-35-23s-17-21-23-34c-5-13-8-26-8-40z">
          <text:p/>
        </draw:path>
        <draw:frame draw:style-name="gr7" draw:text-style-name="P8" draw:layer="layout" svg:width="4.505cm" svg:height="0.412cm" svg:x="4.502cm" svg:y="13.688cm">
          <draw:text-box>
            <text:p text:style-name="P3"><text:span text:style-name="T54">queryable representation</text:span><text:span text:style-name="T36">.</text:span></text:p>
          </draw:text-box>
        </draw:frame>
        <draw:frame draw:style-name="gr89" draw:text-style-name="P69" draw:layer="layout" svg:width="2.872cm" svg:height="0.289cm" svg:x="13.573cm" svg:y="8.55cm">
          <draw:text-box>
            <text:p text:style-name="P3"><text:span text:style-name="T72">CREATE TABLE nodes (</text:span></text:p>
          </draw:text-box>
        </draw:frame>
        <draw:frame draw:style-name="gr89" draw:text-style-name="P69" draw:layer="layout" svg:width="3.848cm" svg:height="0.289cm" svg:x="13.573cm" svg:y="8.867cm">
          <draw:text-box>
            <text:p text:style-name="P3"><text:span text:style-name="T72"><text:s text:c="4"/>node_id TEXT PRIMARY KEY,</text:span></text:p>
          </draw:text-box>
        </draw:frame>
        <draw:frame draw:style-name="gr89" draw:text-style-name="P69" draw:layer="layout" svg:width="3.13cm" svg:height="0.289cm" svg:x="13.573cm" svg:y="9.185cm">
          <draw:text-box>
            <text:p text:style-name="P3"><text:span text:style-name="T72"><text:s text:c="4"/>kind <text:s text:c="3"/>TEXT NOT NULL,</text:span></text:p>
          </draw:text-box>
        </draw:frame>
        <draw:frame draw:style-name="gr89" draw:text-style-name="P69" draw:layer="layout" svg:width="3.159cm" svg:height="0.289cm" svg:x="13.573cm" svg:y="9.502cm">
          <draw:text-box>
            <text:p text:style-name="P3"><text:span text:style-name="T72"><text:s text:c="4"/>path <text:s text:c="3"/>TEXT NOT NULL,</text:span></text:p>
          </draw:text-box>
        </draw:frame>
        <draw:frame draw:style-name="gr89" draw:text-style-name="P69" draw:layer="layout" svg:width="3.231cm" svg:height="0.289cm" svg:x="13.573cm" svg:y="9.793cm">
          <draw:text-box>
            <text:p text:style-name="P3"><text:span text:style-name="T72"><text:s text:c="4"/>name <text:s text:c="3"/>TEXT NOT NULL</text:span></text:p>
          </draw:text-box>
        </draw:frame>
        <draw:frame draw:style-name="gr89" draw:text-style-name="P69" draw:layer="layout" svg:width="0.258cm" svg:height="0.289cm" svg:x="13.573cm" svg:y="10.111cm">
          <draw:text-box>
            <text:p text:style-name="P3"><text:span text:style-name="T72">);</text:span></text:p>
          </draw:text-box>
        </draw:frame>
        <draw:frame draw:style-name="gr89" draw:text-style-name="P69" draw:layer="layout" svg:width="2.872cm" svg:height="0.289cm" svg:x="13.573cm" svg:y="10.428cm">
          <draw:text-box>
            <text:p text:style-name="P3"><text:span text:style-name="T72">CREATE TABLE edges (</text:span></text:p>
          </draw:text-box>
        </draw:frame>
        <draw:frame draw:style-name="gr89" draw:text-style-name="P69" draw:layer="layout" svg:width="2.785cm" svg:height="0.289cm" svg:x="13.573cm" svg:y="10.746cm">
          <draw:text-box>
            <text:p text:style-name="P3"><text:span text:style-name="T72"><text:s text:c="4"/>src TEXT NOT NULL,</text:span></text:p>
          </draw:text-box>
        </draw:frame>
        <draw:frame draw:style-name="gr89" draw:text-style-name="P69" draw:layer="layout" svg:width="2.728cm" svg:height="0.289cm" svg:x="13.573cm" svg:y="11.063cm">
          <draw:text-box>
            <text:p text:style-name="P3"><text:span text:style-name="T72"><text:s text:c="4"/>rel TEXT NOT NULL,</text:span></text:p>
          </draw:text-box>
        </draw:frame>
        <draw:frame draw:style-name="gr89" draw:text-style-name="P69" draw:layer="layout" svg:width="2.786cm" svg:height="0.289cm" svg:x="13.573cm" svg:y="11.354cm">
          <draw:text-box>
            <text:p text:style-name="P3"><text:span text:style-name="T72"><text:s text:c="4"/>dst TEXT NOT NULL,</text:span></text:p>
          </draw:text-box>
        </draw:frame>
        <draw:frame draw:style-name="gr89" draw:text-style-name="P69" draw:layer="layout" svg:width="3.56cm" svg:height="0.289cm" svg:x="13.573cm" svg:y="11.672cm">
          <draw:text-box>
            <text:p text:style-name="P3"><text:span text:style-name="T72"><text:s text:c="4"/>PRIMARY KEY (src, rel, dst)</text:span></text:p>
          </draw:text-box>
        </draw:frame>
        <draw:polygon draw:style-name="gr6" draw:text-style-name="P7" draw:layer="layout" svg:width="0.714cm" svg:height="0.635cm" svg:x="25.479cm" svg:y="18.388cm" svg:viewBox="0 0 715 636" draw:points="0,0 715,0 715,636 0,636">
          <text:p/>
        </draw:polygon>
        <draw:frame draw:style-name="gr89" draw:text-style-name="P69" draw:layer="layout" svg:width="0.258cm" svg:height="0.289cm" svg:x="13.573cm" svg:y="11.989cm">
          <draw:text-box>
            <text:p text:style-name="P3"><text:span text:style-name="T72">);</text:span></text:p>
          </draw:text-box>
        </draw:frame>
        <draw:frame draw:style-name="gr7" draw:text-style-name="P8" draw:layer="layout" svg:width="0.412cm" svg:height="0.412cm" svg:x="25.617cm" svg:y="18.503cm">
          <draw:text-box>
            <text:p text:style-name="P3"><text:span text:style-name="T6">29</text:span></text:p>
          </draw:text-box>
        </draw:frame>
      </draw:page>
      <draw:page draw:name="page30" draw:style-name="dp1" draw:master-page-name="master-page3">
        <draw:polygon draw:style-name="gr1" draw:text-style-name="P1" draw:layer="layout" svg:width="26.405cm" svg:height="19.235cm" svg:x="0cm" svg:y="0cm" svg:viewBox="0 0 26406 19236" draw:points="0,0 26406,0 26406,19236 0,19236">
          <text:p/>
        </draw:polygon>
        <draw:polygon draw:style-name="gr90" draw:text-style-name="P70" draw:layer="layout" svg:width="19.627cm" svg:height="2.309cm" svg:x="3.389cm" svg:y="13.192cm" svg:viewBox="0 0 19628 2310" draw:points="0,2310 19628,2310 16934,0 2694,0">
          <text:p/>
        </draw:polygon>
        <draw:polygon draw:style-name="gr91" draw:text-style-name="P26" draw:layer="layout" svg:width="19.627cm" svg:height="2.309cm" svg:x="3.389cm" svg:y="13.192cm" svg:viewBox="0 0 19628 2310" draw:points="0,2310 19628,2310 16934,0 2694,0">
          <text:p/>
        </draw:polygon>
        <draw:frame draw:style-name="gr9" draw:text-style-name="P10" draw:layer="layout" svg:width="9.327cm" svg:height="1.119cm" svg:x="8.149cm" svg:y="2.032cm">
          <draw:text-box>
            <text:p text:style-name="P3"><text:span text:style-name="T7">MEMORY PYRAMID</text:span></text:p>
          </draw:text-box>
        </draw:frame>
        <draw:frame draw:style-name="gr92" draw:text-style-name="P71" draw:layer="layout" svg:width="6.254cm" svg:height="0.691cm" svg:x="10.557cm" svg:y="13.636cm">
          <draw:text-box>
            <text:p text:style-name="P3"><text:span text:style-name="T73">L0 — Session Events</text:span></text:p>
          </draw:text-box>
        </draw:frame>
        <draw:polygon draw:style-name="gr93" draw:text-style-name="P72" draw:layer="layout" svg:width="14.239cm" svg:height="2.501cm" svg:x="6.083cm" svg:y="10.691cm" svg:viewBox="0 0 14240 2502" draw:points="0,2502 14240,2502 11546,0 2695,0">
          <text:p/>
        </draw:polygon>
        <draw:polygon draw:style-name="gr91" draw:text-style-name="P26" draw:layer="layout" svg:width="14.239cm" svg:height="2.501cm" svg:x="6.083cm" svg:y="10.691cm" svg:viewBox="0 0 14240 2502" draw:points="0,2502 14240,2502 11546,0 2695,0">
          <text:p/>
        </draw:polygon>
        <draw:frame draw:style-name="gr94" draw:text-style-name="P73" draw:layer="layout" svg:width="6.825cm" svg:height="0.475cm" svg:x="9.866cm" svg:y="14.542cm">
          <draw:text-box>
            <text:p text:style-name="P3"><text:span text:style-name="T74">.agent/memory/l0/&lt;timestamp&gt;.jsonl</text:span></text:p>
          </draw:text-box>
        </draw:frame>
        <draw:frame draw:style-name="gr95" draw:text-style-name="P74" draw:layer="layout" svg:width="6.126cm" svg:height="0.602cm" svg:x="10.551cm" svg:y="11.397cm">
          <draw:text-box>
            <text:p text:style-name="P3"><text:span text:style-name="T75">L1 — Engineering Facts</text:span></text:p>
          </draw:text-box>
        </draw:frame>
        <draw:polygon draw:style-name="gr12" draw:text-style-name="P13" draw:layer="layout" svg:width="8.851cm" svg:height="2.502cm" svg:x="8.777cm" svg:y="8.189cm" svg:viewBox="0 0 8852 2503" draw:points="0,2503 8852,2503 7505,0 1347,0">
          <text:p/>
        </draw:polygon>
        <draw:polygon draw:style-name="gr96" draw:text-style-name="P26" draw:layer="layout" svg:width="8.851cm" svg:height="2.502cm" svg:x="8.777cm" svg:y="8.189cm" svg:viewBox="0 0 8852 2503" draw:points="0,2503 8852,2503 7505,0 1347,0">
          <text:p/>
        </draw:polygon>
        <draw:frame draw:style-name="gr97" draw:text-style-name="P75" draw:layer="layout" svg:width="4.648cm" svg:height="0.429cm" svg:x="11.012cm" svg:y="12.152cm">
          <draw:text-box>
            <text:p text:style-name="P3"><text:span text:style-name="T76">.agent/memory.db (SQLite)</text:span></text:p>
          </draw:text-box>
        </draw:frame>
        <draw:frame draw:style-name="gr98" draw:text-style-name="P76" draw:layer="layout" svg:width="5.105cm" svg:height="0.517cm" svg:x="10.964cm" svg:y="9.003cm">
          <draw:text-box>
            <text:p text:style-name="P3"><text:span text:style-name="T77">L2 — Scenario Memory</text:span></text:p>
          </draw:text-box>
        </draw:frame>
        <draw:polygon draw:style-name="gr99" draw:text-style-name="P77" draw:layer="layout" svg:width="6.157cm" svg:height="3.463cm" svg:x="10.124cm" svg:y="4.726cm" svg:viewBox="0 0 6158 3464" draw:points="3078,0 6158,3464 0,3464">
          <text:p/>
        </draw:polygon>
        <draw:polygon draw:style-name="gr100" draw:text-style-name="P26" draw:layer="layout" svg:width="6.157cm" svg:height="3.463cm" svg:x="10.124cm" svg:y="4.726cm" svg:viewBox="0 0 6158 3464" draw:points="3078,0 6158,3464 0,3464">
          <text:p/>
        </draw:polygon>
        <draw:frame draw:style-name="gr79" draw:text-style-name="P62" draw:layer="layout" svg:width="4.941cm" svg:height="0.386cm" svg:x="10.803cm" svg:y="9.723cm">
          <draw:text-box>
            <text:p text:style-name="P3"><text:span text:style-name="T78">.agent/memory/scenarios/*.jsonl</text:span></text:p>
          </draw:text-box>
        </draw:frame>
        <draw:frame draw:style-name="gr97" draw:text-style-name="P75" draw:layer="layout" svg:width="4.583cm" svg:height="0.429cm" svg:x="11.194cm" svg:y="7.072cm">
          <draw:text-box>
            <text:p text:style-name="P3"><text:span text:style-name="T79">L3 — Engineering Profile</text:span></text:p>
          </draw:text-box>
        </draw:frame>
        <draw:frame draw:style-name="gr83" draw:text-style-name="P78" draw:layer="layout" svg:width="4.091cm" svg:height="0.344cm" svg:x="11.236cm" svg:y="7.719cm">
          <draw:text-box>
            <text:p text:style-name="P3"><text:span text:style-name="T80">.agent/engineering_profile.md</text:span></text:p>
          </draw:text-box>
        </draw:frame>
        <draw:polygon draw:style-name="gr6" draw:text-style-name="P7" draw:layer="layout" svg:width="0.714cm" svg:height="0.635cm" svg:x="25.479cm" svg:y="18.388cm" svg:viewBox="0 0 715 636" draw:points="0,0 715,0 715,636 0,636">
          <text:p/>
        </draw:polygon>
        <draw:frame draw:style-name="gr79" draw:text-style-name="P62" draw:layer="layout" svg:width="9.9cm" svg:height="0.386cm" svg:x="8.625cm" svg:y="16.15cm">
          <draw:text-box>
            <text:p text:style-name="P3"><text:span text:style-name="T78">4-tier pyramid: L0 raw logs → L3 confidence-filtered conventions</text:span></text:p>
          </draw:text-box>
        </draw:frame>
        <draw:frame draw:style-name="gr7" draw:text-style-name="P8" draw:layer="layout" svg:width="0.412cm" svg:height="0.412cm" svg:x="25.617cm" svg:y="18.503cm">
          <draw:text-box>
            <text:p text:style-name="P3"><text:span text:style-name="T6">30</text:span></text:p>
          </draw:text-box>
        </draw:frame>
      </draw:page>
      <draw:page draw:name="page31"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8.07cm" svg:height="6.192cm" svg:x="0.502cm" svg:y="7.328cm" svg:viewBox="0 0 8071 6193" svg:d="M31 31c21-20 46-31 75-31h7859c29 0 54 11 75 31 21 21 31 46 31 75v5981c0 29-10 54-31 75-21 20-46 31-75 31h-7859c-29 0-54-11-75-31-20-21-31-46-31-75v-5981c0-29 11-54 31-75z">
          <text:p/>
        </draw:path>
        <draw:path draw:style-name="gr2" draw:text-style-name="P2" draw:layer="layout" svg:width="7.992cm" svg:height="0.052cm" svg:x="0.55cm" svg:y="7.328cm" svg:viewBox="0 0 7993 53" svg:d="M7975 53c-1-1-1-1-2-2-15-16-34-24-56-24h-7859c-4 0-7 2-10 6l-48-16c17-11 36-17 58-17h7859c29 0 54 11 75 31 0 1 1 1 1 2z">
          <text:p/>
        </draw:path>
        <draw:path draw:style-name="gr2" draw:text-style-name="P2" draw:layer="layout" svg:width="7.992cm" svg:height="0.051cm" svg:x="0.55cm" svg:y="13.469cm" svg:viewBox="0 0 7993 52" svg:d="M48 18c3 5 6 7 10 7h7859c22 0 41-9 56-24 1 0 1-1 2-1l18 18c0 1-1 1-1 2-21 21-46 32-75 32h-7859c-22 0-41-6-58-17z">
          <text:p/>
        </draw:path>
        <draw:polygon draw:style-name="gr2" draw:text-style-name="P2" draw:layer="layout" svg:width="8.07cm" svg:height="6.192cm" svg:x="0.502cm" svg:y="7.328cm" svg:viewBox="0 0 8071 6193" draw:points="0,0 8071,0 8071,6193 0,6193">
          <text:p/>
        </draw:polygon>
        <draw:polygon draw:style-name="gr2" draw:text-style-name="P2" draw:layer="layout" svg:width="8.07cm" svg:height="6.192cm" svg:x="0.502cm" svg:y="7.328cm" svg:viewBox="0 0 8071 6193" draw:points="0,0 8071,0 8071,6193 0,6193">
          <text:p/>
        </draw:polygon>
        <draw:frame draw:style-name="gr9" draw:text-style-name="P10" draw:layer="layout" svg:width="13.825cm" svg:height="1.119cm" svg:x="6.018cm" svg:y="5.577cm">
          <draw:text-box>
            <text:p text:style-name="P3"><text:span text:style-name="T7">LAYER 5: INFRASTRUCTURE</text:span></text:p>
          </draw:text-box>
        </draw:frame>
        <draw:frame draw:style-name="gr20" draw:text-style-name="P21" draw:layer="layout" svg:width="6.061cm" svg:height="0.666cm" svg:x="1.027cm" svg:y="7.639cm">
          <draw:text-box>
            <text:p text:style-name="P3"><text:span text:style-name="T38">PROVIDER ADAPTER</text:span></text:p>
          </draw:text-box>
        </draw:frame>
        <draw:frame draw:style-name="gr78" draw:text-style-name="P43" draw:layer="layout" svg:width="7.178cm" svg:height="0.378cm" svg:x="1.027cm" svg:y="8.403cm">
          <draw:text-box>
            <text:p text:style-name="P3"><text:span text:style-name="T71">Single OpenAI-compatible adapter for supported</text:span></text:p>
          </draw:text-box>
        </draw:frame>
        <draw:path draw:style-name="gr17" draw:text-style-name="P18" draw:layer="layout" svg:width="0.159cm" svg:height="0.159cm" svg:x="0.978cm" svg:y="9.551cm" svg:viewBox="0 0 160 160" svg:d="M160 80c0 11-2 21-6 31-4 9-10 18-17 25-7 8-16 14-26 18s-20 6-30 6c-11 0-21-2-31-6s-19-10-26-18c-8-7-13-16-17-25-5-10-7-20-7-31 0-10 2-20 7-30 4-10 9-18 17-26 7-7 16-13 26-18 10-4 20-6 31-6 10 0 20 2 30 6 10 5 19 11 26 18 7 8 13 16 17 26s6 20 6 30z">
          <text:p/>
        </draw:path>
        <draw:frame draw:style-name="gr78" draw:text-style-name="P43" draw:layer="layout" svg:width="3.124cm" svg:height="0.378cm" svg:x="1.027cm" svg:y="8.853cm">
          <draw:text-box>
            <text:p text:style-name="P3"><text:span text:style-name="T71">provider families like:</text:span></text:p>
          </draw:text-box>
        </draw:frame>
        <draw:path draw:style-name="gr33" draw:text-style-name="P34" draw:layer="layout" svg:width="2.672cm" svg:height="0.608cm" svg:x="4.101cm" svg:y="9.313cm" svg:viewBox="0 0 2673 609" svg:d="M0 530v-451c0-10 2-20 6-30s9-19 17-26c7-7 16-13 26-17 9-4 19-6 30-6h2514c11 0 21 2 31 6s18 10 26 17c7 7 13 16 17 26s6 20 6 30v451c0 10-2 21-6 30-4 10-10 19-17 26-8 7-16 13-26 17s-20 6-31 6h-2514c-11 0-21-2-30-6-10-4-19-10-26-17-8-7-13-16-17-26-4-9-6-20-6-30z">
          <text:p/>
        </draw:path>
        <draw:frame draw:style-name="gr18" draw:text-style-name="P19" draw:layer="layout" svg:width="3.06cm" svg:height="0.539cm" svg:x="1.46cm" svg:y="9.327cm">
          <draw:text-box>
            <text:p text:style-name="P3"><text:span text:style-name="T16">DeepSeek</text:span><text:span text:style-name="T17"> — </text:span></text:p>
          </draw:text-box>
        </draw:frame>
        <draw:frame draw:style-name="gr75" draw:text-style-name="P59" draw:layer="layout" svg:width="2.079cm" svg:height="0.463cm" svg:x="4.202cm" svg:y="9.387cm">
          <draw:text-box>
            <text:p text:style-name="P3"><text:span text:style-name="T58">deepseek-*</text:span></text:p>
          </draw:text-box>
        </draw:frame>
        <draw:path draw:style-name="gr17" draw:text-style-name="P18" draw:layer="layout" svg:width="0.159cm" svg:height="0.159cm" svg:x="0.978cm" svg:y="10.821cm" svg:viewBox="0 0 160 160" svg:d="M160 80c0 11-2 21-6 31-4 9-10 18-17 25-7 8-16 14-26 18s-20 6-30 6c-11 0-21-2-31-6s-19-10-26-18c-8-7-13-16-17-25-5-10-7-20-7-31 0-10 2-20 7-30 4-10 9-18 17-26 7-7 16-13 26-17s20-7 31-7c10 0 20 3 30 7s19 10 26 17c7 8 13 16 17 26s6 20 6 30z">
          <text:p/>
        </draw:path>
        <draw:frame draw:style-name="gr18" draw:text-style-name="P19" draw:layer="layout" svg:width="2.631cm" svg:height="0.539cm" svg:x="1.46cm" svg:y="9.962cm">
          <draw:text-box>
            <text:p text:style-name="P3"><text:span text:style-name="T17">model prefix</text:span></text:p>
          </draw:text-box>
        </draw:frame>
        <draw:path draw:style-name="gr17" draw:text-style-name="P18" draw:layer="layout" svg:width="0.159cm" svg:height="0.159cm" svg:x="0.978cm" svg:y="11.482cm" svg:viewBox="0 0 160 160" svg:d="M160 80c0 10-2 20-6 30s-10 18-17 27c-7 7-16 13-26 17s-20 6-30 6c-11 0-21-2-31-6s-19-10-26-17c-8-9-13-17-17-27-5-10-7-20-7-30 0-11 2-21 7-31 4-9 9-18 17-25 7-8 16-14 26-18s20-6 31-6c10 0 20 2 30 6s19 10 26 18c7 7 13 16 17 25 4 10 6 20 6 31z">
          <text:p/>
        </draw:path>
        <draw:frame draw:style-name="gr18" draw:text-style-name="P19" draw:layer="layout" svg:width="6.413cm" svg:height="0.539cm" svg:x="1.46cm" svg:y="10.597cm">
          <draw:text-box>
            <text:p text:style-name="P3"><text:span text:style-name="T16">OpenAI</text:span><text:span text:style-name="T17"> — Standard endpoint</text:span></text:p>
          </draw:text-box>
        </draw:frame>
        <draw:path draw:style-name="gr33" draw:text-style-name="P34" draw:layer="layout" svg:width="0.952cm" svg:height="0.609cm" svg:x="6.085cm" svg:y="11.244cm" svg:viewBox="0 0 953 610" svg:d="M0 530v-449c0-11 2-21 6-31 4-9 10-18 17-25 8-8 16-14 26-18 10-5 20-7 30-7h795c11 0 21 2 30 7 10 4 19 10 26 18 8 7 13 16 17 25 4 10 6 20 6 31v449c0 11-2 21-6 31-4 9-9 18-17 26-7 7-16 13-26 17-9 4-19 6-30 6h-795c-10 0-20-2-30-6s-18-10-26-17c-7-8-13-17-17-26-4-10-6-20-6-31z">
          <text:p/>
        </draw:path>
        <draw:frame draw:style-name="gr18" draw:text-style-name="P19" draw:layer="layout" svg:width="5.234cm" svg:height="0.539cm" svg:x="1.46cm" svg:y="11.259cm">
          <draw:text-box>
            <text:p text:style-name="P3"><text:span text:style-name="T16">Ollama server</text:span><text:span text:style-name="T17"> — Local </text:span></text:p>
          </draw:text-box>
        </draw:frame>
        <draw:path draw:style-name="gr17" draw:text-style-name="P18" draw:layer="layout" svg:width="0.159cm" svg:height="0.159cm" svg:x="0.978cm" svg:y="12.117cm" svg:viewBox="0 0 160 160" svg:d="M160 80c0 10-2 20-6 30s-10 19-17 27c-7 7-16 13-26 17s-20 6-30 6c-11 0-21-2-31-6s-19-10-26-17c-8-8-13-17-17-27-5-10-7-20-7-30 0-11 2-21 7-31 4-9 9-18 17-25 7-8 16-14 26-18s20-6 31-6c10 0 20 2 30 6s19 10 26 18c7 7 13 16 17 25 4 10 6 20 6 31z">
          <text:p/>
        </draw:path>
        <draw:frame draw:style-name="gr75" draw:text-style-name="P59" draw:layer="layout" svg:width="0.664cm" svg:height="0.463cm" svg:x="6.197cm" svg:y="11.318cm">
          <draw:text-box>
            <text:p text:style-name="P3"><text:span text:style-name="T58">API</text:span></text:p>
          </draw:text-box>
        </draw:frame>
        <draw:path draw:style-name="gr33" draw:text-style-name="P34" draw:layer="layout" svg:width="1.932cm" svg:height="0.582cm" svg:x="4.55cm" svg:y="11.906cm" svg:viewBox="0 0 1933 583" svg:d="M0 503v-423c0-10 2-21 6-30 4-10 10-19 18-27 7-7 16-13 25-17 10-4 20-6 31-6h1773c11 0 21 2 31 6s18 10 26 17c7 8 13 17 17 27 4 9 6 20 6 30v423c0 11-2 21-6 31-4 9-10 18-17 26-8 7-16 13-26 17s-20 6-31 6h-1773c-11 0-21-2-31-6-9-4-18-10-25-17-8-8-14-17-18-26-4-10-6-20-6-31z">
          <text:p/>
        </draw:path>
        <draw:frame draw:style-name="gr18" draw:text-style-name="P19" draw:layer="layout" svg:width="3.541cm" svg:height="0.539cm" svg:x="1.46cm" svg:y="11.894cm">
          <draw:text-box>
            <text:p text:style-name="P3"><text:span text:style-name="T16">OpenRouter</text:span><text:span text:style-name="T17"> — </text:span></text:p>
          </draw:text-box>
        </draw:frame>
        <draw:frame draw:style-name="gr75" draw:text-style-name="P59" draw:layer="layout" svg:width="1.211cm" svg:height="0.463cm" svg:x="4.657cm" svg:y="11.979cm">
          <draw:text-box>
            <text:p text:style-name="P3"><text:span text:style-name="T58">sk-or-*</text:span></text:p>
          </draw:text-box>
        </draw:frame>
        <draw:frame draw:style-name="gr18" draw:text-style-name="P19" draw:layer="layout" svg:width="0.887cm" svg:height="0.539cm" svg:x="6.479cm" svg:y="11.894cm">
          <draw:text-box>
            <text:p text:style-name="P3"><text:span text:style-name="T17"><text:s/>key</text:span></text:p>
          </draw:text-box>
        </draw:frame>
        <draw:path draw:style-name="gr8" draw:text-style-name="P9" draw:layer="layout" svg:width="8.096cm" svg:height="6.192cm" svg:x="9.154cm" svg:y="7.328cm" svg:viewBox="0 0 8097 6193" svg:d="M31 31c21-20 46-31 75-31h7886c29 0 54 11 74 31 21 21 31 46 31 75v5981c0 29-10 54-31 75-20 20-45 31-75 31h-7885c-29 0-54-11-75-31-21-21-31-46-31-75v-5981c0-29 10-54 31-75z">
          <text:p/>
        </draw:path>
        <draw:path draw:style-name="gr2" draw:text-style-name="P2" draw:layer="layout" svg:width="8.019cm" svg:height="0.052cm" svg:x="9.202cm" svg:y="7.328cm" svg:viewBox="0 0 8020 53" svg:d="M8001 53c0-1-1-1-1-2-16-16-35-24-57-24h-7885c-4 0-7 2-11 6l-47-16c17-11 36-17 58-17h7886c29 0 54 11 74 31 1 1 1 1 2 2z">
          <text:p/>
        </draw:path>
        <draw:path draw:style-name="gr2" draw:text-style-name="P2" draw:layer="layout" svg:width="8.019cm" svg:height="0.051cm" svg:x="9.202cm" svg:y="13.469cm" svg:viewBox="0 0 8020 52" svg:d="M47 18c4 5 7 7 11 7h7885c22 0 41-9 57-24l1-1 19 18c-1 1-1 1-2 2-20 21-45 32-75 32h-7885c-22 0-41-6-58-17z">
          <text:p/>
        </draw:path>
        <draw:path draw:style-name="gr2" draw:text-style-name="P2" draw:layer="layout" svg:width="0.049cm" svg:height="6.13cm" svg:x="17.201cm" svg:y="7.359cm" svg:viewBox="0 0 50 6131" svg:d="M0 6112c15-15 24-34 24-56v-5981c0-22-9-40-24-56l18-19c22 21 32 46 32 75v5981c0 29-10 54-32 75z">
          <text:p/>
        </draw:path>
        <draw:polygon draw:style-name="gr2" draw:text-style-name="P2" draw:layer="layout" svg:width="8.096cm" svg:height="6.192cm" svg:x="9.154cm" svg:y="7.328cm" svg:viewBox="0 0 8097 6193" draw:points="0,0 8097,0 8097,6193 0,6193">
          <text:p/>
        </draw:polygon>
        <draw:frame draw:style-name="gr18" draw:text-style-name="P19" draw:layer="layout" svg:width="1.182cm" svg:height="0.539cm" svg:x="1.46cm" svg:y="12.529cm">
          <draw:text-box>
            <text:p text:style-name="P3"><text:span text:style-name="T17">prefix</text:span></text:p>
          </draw:text-box>
        </draw:frame>
        <draw:frame draw:style-name="gr20" draw:text-style-name="P21" draw:layer="layout" svg:width="4.48cm" svg:height="0.666cm" svg:x="9.69cm" svg:y="7.639cm">
          <draw:text-box>
            <text:p text:style-name="P3"><text:span text:style-name="T38">TOOL RUNTIME</text:span></text:p>
          </draw:text-box>
        </draw:frame>
        <draw:path draw:style-name="gr17" draw:text-style-name="P18" draw:layer="layout" svg:width="0.159cm" svg:height="0.158cm" svg:x="9.657cm" svg:y="9.128cm" svg:viewBox="0 0 160 159" svg:d="M160 79c0 10-2 21-7 30-4 11-9 20-17 27-7 8-16 13-25 17-10 4-20 6-31 6-10 0-21-2-31-6s-19-9-26-17c-7-7-13-16-17-27-4-9-6-20-6-30 0-11 2-21 6-30 4-10 10-19 17-26 7-8 16-13 26-17s21-6 31-6c11 0 21 2 31 6 9 4 18 9 25 17 8 7 13 16 17 26 5 9 7 19 7 30z">
          <text:p/>
        </draw:path>
        <draw:path draw:style-name="gr33" draw:text-style-name="P34" draw:layer="layout" svg:width="1.164cm" svg:height="0.608cm" svg:x="10.133cm" svg:y="8.89cm" svg:viewBox="0 0 1165 609" svg:d="M0 529v-450c0-11 2-21 6-31 4-9 10-18 17-25 8-8 16-14 26-17 10-4 20-6 30-6h1007c10 0 20 2 30 6 10 3 19 9 26 17 7 7 13 16 17 25 4 10 6 20 6 31v450c0 11-2 21-6 31s-10 18-17 26c-7 7-16 13-26 17s-20 6-30 6h-1007c-10 0-20-2-30-6s-18-10-26-17c-7-8-13-16-17-26s-6-20-6-31z">
          <text:p/>
        </draw:path>
        <draw:frame draw:style-name="gr78" draw:text-style-name="P43" draw:layer="layout" svg:width="6.879cm" svg:height="0.378cm" svg:x="9.69cm" svg:y="8.403cm">
          <draw:text-box>
            <text:p text:style-name="P3"><text:span text:style-name="T71">Four stateless primitives with safety validation:</text:span></text:p>
          </draw:text-box>
        </draw:frame>
        <draw:frame draw:style-name="gr75" draw:text-style-name="P59" draw:layer="layout" svg:width="0.824cm" svg:height="0.463cm" svg:x="10.226cm" svg:y="8.963cm">
          <draw:text-box>
            <text:p text:style-name="P3"><text:span text:style-name="T58">read</text:span></text:p>
          </draw:text-box>
        </draw:frame>
        <draw:path draw:style-name="gr17" draw:text-style-name="P18" draw:layer="layout" svg:width="0.159cm" svg:height="0.158cm" svg:x="9.657cm" svg:y="9.763cm" svg:viewBox="0 0 160 159" svg:d="M160 79c0 10-2 21-7 30-4 11-9 20-17 27-7 7-16 13-25 17-10 4-20 6-31 6-10 0-21-2-31-6s-19-10-26-17-13-16-17-27c-4-9-6-20-6-30 0-11 2-21 6-30 4-10 10-19 17-26 7-8 16-13 26-17s21-6 31-6c11 0 21 2 31 6 9 4 18 9 25 17 8 7 13 16 17 26 5 9 7 19 7 30z">
          <text:p/>
        </draw:path>
        <draw:path draw:style-name="gr33" draw:text-style-name="P34" draw:layer="layout" svg:width="1.429cm" svg:height="0.582cm" svg:x="10.133cm" svg:y="9.551cm" svg:viewBox="0 0 1430 583" svg:d="M0 504v-424c0-10 2-20 6-31 4-10 10-18 17-26 8-7 16-13 26-17s20-6 30-6h1271c11 0 21 2 31 6s18 10 26 17c7 8 13 16 17 26 4 11 6 21 6 31v424c0 10-2 20-6 30s-10 18-17 26c-8 7-16 13-26 17s-20 6-31 6h-1271c-10 0-20-2-30-6s-18-10-26-17c-7-8-13-16-17-26s-6-20-6-30z">
          <text:p/>
        </draw:path>
        <draw:frame draw:style-name="gr18" draw:text-style-name="P19" draw:layer="layout" svg:width="3.274cm" svg:height="0.539cm" svg:x="11.311cm" svg:y="8.904cm">
          <draw:text-box>
            <text:p text:style-name="P3"><text:span text:style-name="T17"><text:s/>— File reading</text:span></text:p>
          </draw:text-box>
        </draw:frame>
        <draw:frame draw:style-name="gr75" draw:text-style-name="P59" draw:layer="layout" svg:width="0.869cm" svg:height="0.463cm" svg:x="10.226cm" svg:y="9.625cm">
          <draw:text-box>
            <text:p text:style-name="P3"><text:span text:style-name="T58">write</text:span></text:p>
          </draw:text-box>
        </draw:frame>
        <draw:path draw:style-name="gr17" draw:text-style-name="P18" draw:layer="layout" svg:width="0.159cm" svg:height="0.159cm" svg:x="9.657cm" svg:y="10.424cm" svg:viewBox="0 0 160 160" svg:d="M160 79c0 12-2 22-7 32-4 10-9 18-17 26-7 7-16 13-25 17-10 4-20 6-31 6-10 0-21-2-31-6s-19-10-26-17c-7-8-13-16-17-26s-6-20-6-32c0-10 2-20 6-30s10-18 17-26c7-7 16-13 26-17s21-6 31-6c11 0 21 2 31 6 9 4 18 10 25 17 8 8 13 16 17 26 5 10 7 20 7 30z">
          <text:p/>
        </draw:path>
        <draw:path draw:style-name="gr33" draw:text-style-name="P34" draw:layer="layout" svg:width="1.164cm" svg:height="0.609cm" svg:x="10.133cm" svg:y="10.186cm" svg:viewBox="0 0 1165 610" svg:d="M0 530v-451c0-10 2-20 6-30s10-18 17-26c8-7 16-13 26-17s20-6 30-6h1007c10 0 20 2 30 6s19 10 26 17c7 8 13 16 17 26s6 20 6 30v451c0 11-2 21-6 30-4 10-10 19-17 26-7 8-16 13-26 17s-20 6-30 7h-1007c-10-1-20-3-30-7s-18-9-26-17c-7-7-13-16-17-26-4-9-6-19-6-30z">
          <text:p/>
        </draw:path>
        <draw:frame draw:style-name="gr18" draw:text-style-name="P19" draw:layer="layout" svg:width="3.059cm" svg:height="0.539cm" svg:x="11.556cm" svg:y="9.539cm">
          <draw:text-box>
            <text:p text:style-name="P3"><text:span text:style-name="T17"><text:s/>— File writing</text:span></text:p>
          </draw:text-box>
        </draw:frame>
        <draw:frame draw:style-name="gr75" draw:text-style-name="P59" draw:layer="layout" svg:width="0.664cm" svg:height="0.463cm" svg:x="10.226cm" svg:y="10.26cm">
          <draw:text-box>
            <text:p text:style-name="P3"><text:span text:style-name="T58">edit</text:span></text:p>
          </draw:text-box>
        </draw:frame>
        <draw:frame draw:style-name="gr18" draw:text-style-name="P19" draw:layer="layout" svg:width="5.822cm" svg:height="0.539cm" svg:x="11.311cm" svg:y="10.2cm">
          <draw:text-box>
            <text:p text:style-name="P3"><text:span text:style-name="T17"><text:s/>— Exact occurrence-count</text:span></text:p>
          </draw:text-box>
        </draw:frame>
        <draw:path draw:style-name="gr17" draw:text-style-name="P18" draw:layer="layout" svg:width="0.159cm" svg:height="0.159cm" svg:x="9.657cm" svg:y="11.694cm" svg:viewBox="0 0 160 160" svg:d="M160 80c0 11-2 21-7 31-4 9-9 18-17 26-7 7-16 13-25 17-10 4-20 6-31 6-10 0-21-2-31-6s-19-10-26-17c-7-8-13-17-17-26-4-10-6-20-6-31s2-21 6-31 10-18 17-26c7-7 16-13 26-17s21-6 31-6c11 0 21 2 31 6 9 4 18 10 25 17 8 8 13 16 17 26 5 10 7 20 7 31z">
          <text:p/>
        </draw:path>
        <draw:path draw:style-name="gr33" draw:text-style-name="P34" draw:layer="layout" svg:width="1.164cm" svg:height="0.609cm" svg:x="10.133cm" svg:y="11.456cm" svg:viewBox="0 0 1165 610" svg:d="M0 530v-451c0-10 2-20 6-30s10-18 17-26c8-7 16-13 26-17s20-6 30-6h1007c10 0 20 2 30 6s19 10 26 17c7 8 13 16 17 26s6 20 6 30v451c0 11-2 21-6 30-4 10-10 19-17 26-7 8-16 13-26 17s-20 6-30 7h-1007c-10-1-20-3-30-7s-18-9-26-17c-7-7-13-16-17-26-4-9-6-19-6-30z">
          <text:p/>
        </draw:path>
        <draw:frame draw:style-name="gr18" draw:text-style-name="P19" draw:layer="layout" svg:width="1.96cm" svg:height="0.539cm" svg:x="10.124cm" svg:y="10.835cm">
          <draw:text-box>
            <text:p text:style-name="P3"><text:span text:style-name="T17">matching</text:span></text:p>
          </draw:text-box>
        </draw:frame>
        <draw:frame draw:style-name="gr75" draw:text-style-name="P59" draw:layer="layout" svg:width="0.892cm" svg:height="0.463cm" svg:x="10.226cm" svg:y="11.53cm">
          <draw:text-box>
            <text:p text:style-name="P3"><text:span text:style-name="T58">bash</text:span></text:p>
          </draw:text-box>
        </draw:frame>
        <draw:frame draw:style-name="gr18" draw:text-style-name="P19" draw:layer="layout" svg:width="4cm" svg:height="0.539cm" svg:x="11.311cm" svg:y="11.47cm">
          <draw:text-box>
            <text:p text:style-name="P3"><text:span text:style-name="T17"><text:s/>— Sandboxed, no</text:span></text:p>
          </draw:text-box>
        </draw:frame>
        <draw:path draw:style-name="gr8" draw:text-style-name="P9" draw:layer="layout" svg:width="8.07cm" svg:height="6.192cm" svg:x="17.832cm" svg:y="7.328cm" svg:viewBox="0 0 8071 6193" svg:d="M31 31c21-20 46-31 75-31h7860c29 0 54 11 74 31 21 21 31 46 31 75v5981c0 29-10 54-31 75-20 20-45 31-75 31h-7859c-29 0-54-11-75-31-20-21-31-46-31-75v-5981c0-29 11-54 31-75z">
          <text:p/>
        </draw:path>
        <draw:path draw:style-name="gr2" draw:text-style-name="P2" draw:layer="layout" svg:width="7.993cm" svg:height="0.052cm" svg:x="17.88cm" svg:y="7.328cm" svg:viewBox="0 0 7994 53" svg:d="M7975 53c-1-1-1-1-1-2-16-16-35-24-57-24h-7859c-4 0-7 2-10 6l-48-16c17-11 37-17 58-17h7860c29 0 54 11 74 31 1 1 1 1 2 2z">
          <text:p/>
        </draw:path>
        <draw:path draw:style-name="gr2" draw:text-style-name="P2" draw:layer="layout" svg:width="7.993cm" svg:height="0.051cm" svg:x="17.88cm" svg:y="13.469cm" svg:viewBox="0 0 7994 52" svg:d="M48 18c3 5 6 7 10 7h7859c22 0 41-9 57-24 0 0 0-1 1-1l19 18c-1 1-1 1-2 2-20 21-45 32-75 32h-7859c-21 0-41-6-58-17z">
          <text:p/>
        </draw:path>
        <draw:path draw:style-name="gr2" draw:text-style-name="P2" draw:layer="layout" svg:width="0.049cm" svg:height="6.13cm" svg:x="25.853cm" svg:y="7.359cm" svg:viewBox="0 0 50 6131" svg:d="M0 6112c15-15 23-34 23-56v-5981c0-22-8-40-23-56l18-19c21 21 32 46 32 75v5981c0 29-11 54-32 75z">
          <text:p/>
        </draw:path>
        <draw:path draw:style-name="gr2" draw:text-style-name="P2" draw:layer="layout" svg:width="0.096cm" svg:height="6.158cm" svg:x="17.832cm" svg:y="7.345cm" svg:viewBox="0 0 97 6159" svg:d="M97 15c-3 4-6 10-8 18-6 16-8 34-8 56v5981c0 22 2 41 8 56 2 8 5 14 8 18l-48 15c-6-4-12-9-18-14-20-21-31-46-31-75v-5981c0-29 11-54 31-75 6-5 12-10 18-14z">
          <text:p/>
        </draw:path>
        <draw:frame draw:style-name="gr18" draw:text-style-name="P19" draw:layer="layout" svg:width="3.033cm" svg:height="0.539cm" svg:x="10.124cm" svg:y="12.105cm">
          <draw:text-box>
            <text:p text:style-name="P3"><text:span text:style-name="T17">sudo/traversal</text:span></text:p>
          </draw:text-box>
        </draw:frame>
        <draw:frame draw:style-name="gr20" draw:text-style-name="P21" draw:layer="layout" svg:width="5.633cm" svg:height="0.666cm" svg:x="18.355cm" svg:y="7.639cm">
          <draw:text-box>
            <text:p text:style-name="P3"><text:span text:style-name="T38">BUDGET MANAGER</text:span></text:p>
          </draw:text-box>
        </draw:frame>
        <draw:path draw:style-name="gr17" draw:text-style-name="P18" draw:layer="layout" svg:width="0.158cm" svg:height="0.158cm" svg:x="18.309cm" svg:y="9.128cm" svg:viewBox="0 0 159 159" svg:d="M159 79c0 10-2 21-6 30-4 11-9 20-17 27-7 8-16 13-26 17-9 4-20 6-31 6-10 0-21-2-30-6-10-4-19-9-26-17-8-7-13-16-17-27-4-9-6-20-6-30 0-11 2-21 6-30 4-10 9-19 17-26 7-8 16-13 26-17 9-4 20-6 30-6 11 0 22 2 31 6 10 4 19 9 26 17 8 7 13 16 17 26 4 9 6 19 6 30z">
          <text:p/>
        </draw:path>
        <draw:frame draw:style-name="gr78" draw:text-style-name="P43" draw:layer="layout" svg:width="5.393cm" svg:height="0.378cm" svg:x="18.355cm" svg:y="8.403cm">
          <draw:text-box>
            <text:p text:style-name="P3"><text:span text:style-name="T71">Unconditional transcript compaction:</text:span></text:p>
          </draw:text-box>
        </draw:frame>
        <draw:path draw:style-name="gr17" draw:text-style-name="P18" draw:layer="layout" svg:width="0.158cm" svg:height="0.158cm" svg:x="18.309cm" svg:y="9.763cm" svg:viewBox="0 0 159 159" svg:d="M159 79c0 10-2 21-6 30-4 11-9 20-17 27-7 7-16 13-26 17-9 4-20 6-31 6-10 0-21-2-30-6-10-4-19-10-26-17-8-7-13-16-17-27-4-9-6-20-6-30 0-11 2-21 6-30 4-10 9-19 17-26 7-8 16-13 26-17 9-4 20-6 30-6 11 0 22 2 31 6 10 4 19 9 26 17 8 7 13 16 17 26 4 9 6 19 6 30z">
          <text:p/>
        </draw:path>
        <draw:frame draw:style-name="gr18" draw:text-style-name="P19" draw:layer="layout" svg:width="3.864cm" svg:height="0.539cm" svg:x="18.788cm" svg:y="8.904cm">
          <draw:text-box>
            <text:p text:style-name="P3"><text:span text:style-name="T17">Duplicate removal</text:span></text:p>
          </draw:text-box>
        </draw:frame>
        <draw:path draw:style-name="gr17" draw:text-style-name="P18" draw:layer="layout" svg:width="0.158cm" svg:height="0.159cm" svg:x="18.309cm" svg:y="10.424cm" svg:viewBox="0 0 159 160" svg:d="M159 79c0 12-2 22-6 32s-9 18-17 26c-7 7-16 13-26 17-9 4-20 6-31 6-10 0-21-2-30-6-10-4-19-10-26-17-8-8-13-16-17-26s-6-20-6-32c0-10 2-20 6-30s9-18 17-26c7-7 16-13 26-17 9-4 20-6 30-6 11 0 22 2 31 6 10 4 19 10 26 17 8 8 13 16 17 26s6 20 6 30z">
          <text:p/>
        </draw:path>
        <draw:frame draw:style-name="gr18" draw:text-style-name="P19" draw:layer="layout" svg:width="4.348cm" svg:height="0.539cm" svg:x="18.788cm" svg:y="9.539cm">
          <draw:text-box>
            <text:p text:style-name="P3"><text:span text:style-name="T17">Large-string clipping</text:span></text:p>
          </draw:text-box>
        </draw:frame>
        <draw:frame draw:style-name="gr18" draw:text-style-name="P19" draw:layer="layout" svg:width="4.911cm" svg:height="0.539cm" svg:x="18.788cm" svg:y="10.2cm">
          <draw:text-box>
            <text:p text:style-name="P3"><text:span text:style-name="T17">Context window ceiling</text:span></text:p>
          </draw:text-box>
        </draw:frame>
        <draw:path draw:style-name="gr17" draw:text-style-name="P18" draw:layer="layout" svg:width="0.158cm" svg:height="0.159cm" svg:x="18.309cm" svg:y="11.694cm" svg:viewBox="0 0 159 160" svg:d="M159 80c0 11-2 21-6 31-4 9-9 18-17 26-7 7-16 13-26 17-9 4-20 6-31 6-10 0-21-2-30-6-10-4-19-10-26-17-8-8-13-17-17-26-4-10-6-20-6-31s2-21 6-31 9-18 17-26c7-7 16-13 26-17 9-4 20-6 30-6 11 0 22 2 31 6 10 4 19 10 26 17 8 8 13 16 17 26s6 20 6 31z">
          <text:p/>
        </draw:path>
        <draw:frame draw:style-name="gr18" draw:text-style-name="P19" draw:layer="layout" svg:width="2.685cm" svg:height="0.539cm" svg:x="18.788cm" svg:y="10.835cm">
          <draw:text-box>
            <text:p text:style-name="P3"><text:span text:style-name="T17">enforcement</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6.815cm" svg:height="0.539cm" svg:x="18.788cm" svg:y="11.47cm">
          <draw:text-box>
            <text:p text:style-name="P3"><text:span text:style-name="T17">LLM sees most relevant context</text:span></text:p>
          </draw:text-box>
        </draw:frame>
        <draw:frame draw:style-name="gr7" draw:text-style-name="P8" draw:layer="layout" svg:width="0.412cm" svg:height="0.412cm" svg:x="25.617cm" svg:y="18.503cm">
          <draw:text-box>
            <text:p text:style-name="P3"><text:span text:style-name="T6">31</text:span></text:p>
          </draw:text-box>
        </draw:frame>
      </draw:page>
      <draw:page draw:name="page32"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5.109cm" svg:height="1.119cm" svg:x="10.451cm" svg:y="9.519cm">
          <draw:text-box>
            <text:p text:style-name="P3"><text:span text:style-name="T11">SUMMARY</text:span></text:p>
          </draw:text-box>
        </draw:frame>
        <draw:frame draw:style-name="gr15" draw:text-style-name="P16" draw:layer="layout" svg:width="4.122cm" svg:height="4.137cm" svg:x="10.98cm" svg:y="6.517cm">
          <draw:text-box>
            <text:p text:style-name="P3"><text:span text:style-name="T12">05</text:span></text:p>
          </draw:text-box>
        </draw:frame>
        <draw:polygon draw:style-name="gr6" draw:text-style-name="P7" draw:layer="layout" svg:width="0.714cm" svg:height="0.635cm" svg:x="25.479cm" svg:y="18.388cm" svg:viewBox="0 0 715 636" draw:points="0,0 715,0 715,636 0,636">
          <text:p/>
        </draw:polygon>
        <draw:frame draw:style-name="gr16" draw:text-style-name="P17" draw:layer="layout" svg:width="5.619cm" svg:height="0.827cm" svg:x="10.594cm" svg:y="11.077cm">
          <draw:text-box>
            <text:p text:style-name="P3"><text:span text:style-name="T13">What We've Built</text:span></text:p>
          </draw:text-box>
        </draw:frame>
        <draw:frame draw:style-name="gr7" draw:text-style-name="P8" draw:layer="layout" svg:width="0.412cm" svg:height="0.412cm" svg:x="25.617cm" svg:y="18.503cm">
          <draw:text-box>
            <text:p text:style-name="P3"><text:span text:style-name="T6">32</text:span></text:p>
          </draw:text-box>
        </draw:frame>
      </draw:page>
      <draw:page draw:name="page33"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462cm" svg:height="1.772cm" svg:x="0.502cm" svg:y="4.683cm" svg:viewBox="0 0 12463 1773" svg:d="M31 31c21-21 46-31 75-31h12251c30 0 54 10 75 31 21 20 31 45 31 74v1562c0 30-10 55-31 75-21 21-46 31-75 31h-12251c-29 0-54-10-75-31-20-20-31-45-31-75v-1562c0-29 11-54 31-74z">
          <text:p/>
        </draw:path>
        <draw:polygon draw:style-name="gr2" draw:text-style-name="P2" draw:layer="layout" svg:width="12.462cm" svg:height="0.066cm" svg:x="0.502cm" svg:y="4.683cm" svg:viewBox="0 0 12463 67" draw:points="12400,67 0,67 0,0 12463,0 12463,2">
          <text:p/>
        </draw:polygon>
        <draw:path draw:style-name="gr2" draw:text-style-name="P2" draw:layer="layout" svg:width="12.384cm" svg:height="0.051cm" svg:x="0.55cm" svg:y="6.404cm" svg:viewBox="0 0 12385 52" svg:d="M48 19c3 4 6 6 10 6h12251c22 0 41-8 56-23 1-1 1-1 2-2l18 19c0 0 0 1-1 1-21 21-46 32-75 32h-12251c-22 0-41-6-58-18z">
          <text:p/>
        </draw:path>
        <draw:path draw:style-name="gr2" draw:text-style-name="P2" draw:layer="layout" svg:width="0.05cm" svg:height="1.71cm" svg:x="12.914cm" svg:y="4.714cm" svg:viewBox="0 0 51 1711" svg:d="M0 1693c16-16 24-35 24-57v-1562c0-21-8-40-24-56l19-18c21 20 32 45 32 74v1562c0 30-11 55-32 75z">
          <text:p/>
        </draw:path>
        <draw:polygon draw:style-name="gr2" draw:text-style-name="P2" draw:layer="layout" svg:width="12.462cm" svg:height="1.772cm" svg:x="0.502cm" svg:y="4.683cm" svg:viewBox="0 0 12463 1773" draw:points="0,0 12463,0 12463,1773 0,1773">
          <text:p/>
        </draw:polygon>
        <draw:path draw:style-name="gr8" draw:text-style-name="P9" draw:layer="layout" svg:width="12.462cm" svg:height="1.773cm" svg:x="0.502cm" svg:y="6.614cm" svg:viewBox="0 0 12463 1774" svg:d="M31 31c21-21 46-31 75-31h12251c30 0 54 10 75 31s31 46 31 75v1562c0 29-10 54-31 75-21 20-46 31-75 31h-12251c-29 0-54-11-75-31-20-21-31-46-31-75v-1562c0-29 11-54 31-75z">
          <text:p/>
        </draw:path>
        <draw:polygon draw:style-name="gr2" draw:text-style-name="P2" draw:layer="layout" svg:width="12.462cm" svg:height="0.066cm" svg:x="0.502cm" svg:y="6.614cm" svg:viewBox="0 0 12463 67" draw:points="12400,67 0,67 0,0 12463,0 12463,3">
          <text:p/>
        </draw:polygon>
        <draw:path draw:style-name="gr2" draw:text-style-name="P2" draw:layer="layout" svg:width="12.384cm" svg:height="0.051cm" svg:x="0.55cm" svg:y="8.336cm" svg:viewBox="0 0 12385 52" svg:d="M48 19c3 4 6 6 10 6h12251c22 0 41-7 56-24 1 0 1-1 2-1l18 19c0 1 0 1-1 2-21 20-46 31-75 31h-12251c-22 0-41-6-58-17z">
          <text:p/>
        </draw:path>
        <draw:path draw:style-name="gr2" draw:text-style-name="P2" draw:layer="layout" svg:width="0.05cm" svg:height="1.711cm" svg:x="12.914cm" svg:y="6.645cm" svg:viewBox="0 0 51 1712" svg:d="M0 1693c16-15 24-34 24-56v-1562c0-22-8-41-24-56l19-19c21 21 32 46 32 75v1562c0 29-11 54-32 75z">
          <text:p/>
        </draw:path>
        <draw:polygon draw:style-name="gr2" draw:text-style-name="P2" draw:layer="layout" svg:width="12.462cm" svg:height="1.773cm" svg:x="0.502cm" svg:y="6.614cm" svg:viewBox="0 0 12463 1774" draw:points="0,0 12463,0 12463,1774 0,1774">
          <text:p/>
        </draw:polygon>
        <draw:path draw:style-name="gr8" draw:text-style-name="P9" draw:layer="layout" svg:width="12.462cm" svg:height="1.772cm" svg:x="0.502cm" svg:y="8.546cm" svg:viewBox="0 0 12463 1773" svg:d="M31 31c21-21 46-31 75-31h12251c30 0 54 10 75 31 21 20 31 45 31 74v1562c0 30-10 55-31 75-21 21-46 31-75 31h-12251c-29 0-54-10-75-31-20-20-31-45-31-75v-1562c0-29 11-54 31-74z">
          <text:p/>
        </draw:path>
        <draw:polygon draw:style-name="gr2" draw:text-style-name="P2" draw:layer="layout" svg:width="12.462cm" svg:height="0.066cm" svg:x="0.502cm" svg:y="8.546cm" svg:viewBox="0 0 12463 67" draw:points="12400,67 0,67 0,0 12463,0 12463,3">
          <text:p/>
        </draw:polygon>
        <draw:path draw:style-name="gr2" draw:text-style-name="P2" draw:layer="layout" svg:width="12.384cm" svg:height="0.051cm" svg:x="0.55cm" svg:y="10.267cm" svg:viewBox="0 0 12385 52" svg:d="M48 20c3 4 6 6 10 6h12251c22 0 41-8 56-24 1-1 1-1 2-2l18 20c0 0 0 1-1 1-21 21-46 31-75 31h-12251c-22 0-41-5-58-17z">
          <text:p/>
        </draw:path>
        <draw:path draw:style-name="gr2" draw:text-style-name="P2" draw:layer="layout" svg:width="0.05cm" svg:height="1.71cm" svg:x="12.914cm" svg:y="8.577cm" svg:viewBox="0 0 51 1711" svg:d="M0 1693c16-16 24-35 24-57v-1562c0-22-8-40-24-56l19-18c21 20 32 45 32 74v1562c0 30-11 55-32 75z">
          <text:p/>
        </draw:path>
        <draw:polygon draw:style-name="gr2" draw:text-style-name="P2" draw:layer="layout" svg:width="12.462cm" svg:height="1.772cm" svg:x="0.502cm" svg:y="8.546cm" svg:viewBox="0 0 12463 1773" draw:points="0,0 12463,0 12463,1773 0,1773">
          <text:p/>
        </draw:polygon>
        <draw:path draw:style-name="gr8" draw:text-style-name="P9" draw:layer="layout" svg:width="12.462cm" svg:height="1.773cm" svg:x="0.502cm" svg:y="10.477cm" svg:viewBox="0 0 12463 1774" svg:d="M31 31c21-21 46-31 75-31h12251c30 0 54 10 75 31s31 46 31 75v1562c0 29-10 54-31 75-21 20-46 31-75 31h-12251c-29 0-54-11-75-31-20-21-31-46-31-75v-1562c0-29 11-54 31-75z">
          <text:p/>
        </draw:path>
        <draw:path draw:style-name="gr2" draw:text-style-name="P2" draw:layer="layout" svg:width="12.384cm" svg:height="0.051cm" svg:x="0.55cm" svg:y="10.477cm" svg:viewBox="0 0 12385 52" svg:d="M12367 52c-1 0-1-1-2-1-15-16-34-24-56-24h-12251c-4 0-7 3-10 7l-48-16c17-11 36-18 58-18h12251c30 0 54 11 75 32 1 0 1 1 1 1z">
          <text:p/>
        </draw:path>
        <draw:path draw:style-name="gr2" draw:text-style-name="P2" draw:layer="layout" svg:width="12.384cm" svg:height="0.051cm" svg:x="0.55cm" svg:y="12.199cm" svg:viewBox="0 0 12385 52" svg:d="M48 19c3 4 6 6 10 6h12251c22 0 41-8 56-24 1 0 1-1 2-1l18 19c0 1 0 1-1 2-21 20-46 31-75 31h-12251c-22 0-41-6-58-17z">
          <text:p/>
        </draw:path>
        <draw:path draw:style-name="gr2" draw:text-style-name="P2" draw:layer="layout" svg:width="0.05cm" svg:height="1.711cm" svg:x="12.914cm" svg:y="10.508cm" svg:viewBox="0 0 51 1712" svg:d="M0 1693c16-15 24-34 24-56v-1562c0-22-8-41-24-56l19-19c21 21 32 46 32 75v1562c0 29-11 54-32 75z">
          <text:p/>
        </draw:path>
        <draw:polygon draw:style-name="gr2" draw:text-style-name="P2" draw:layer="layout" svg:width="12.462cm" svg:height="1.773cm" svg:x="0.502cm" svg:y="10.477cm" svg:viewBox="0 0 12463 1774" draw:points="0,0 12463,0 12463,1774 0,1774">
          <text:p/>
        </draw:polygon>
        <draw:path draw:style-name="gr8" draw:text-style-name="P9" draw:layer="layout" svg:width="12.462cm" svg:height="1.773cm" svg:x="0.502cm" svg:y="12.408cm" svg:viewBox="0 0 12463 1774" svg:d="M31 31c21-20 46-31 75-31h12251c30 0 54 11 75 31 21 21 31 46 31 75v1562c0 30-10 55-31 75-21 21-46 31-75 31h-12251c-29 0-54-10-75-31-20-20-31-45-31-75v-1562c0-29 11-54 31-75z">
          <text:p/>
        </draw:path>
        <draw:path draw:style-name="gr2" draw:text-style-name="P2" draw:layer="layout" svg:width="12.384cm" svg:height="0.052cm" svg:x="0.55cm" svg:y="12.408cm" svg:viewBox="0 0 12385 53" svg:d="M12367 53c-1-1-1-1-2-2-15-15-34-23-56-23h-12251c-4 0-7 2-10 6l-48-16c17-12 36-18 58-18h12251c30 0 54 12 75 32 1 1 1 1 1 2z">
          <text:p/>
        </draw:path>
        <draw:path draw:style-name="gr2" draw:text-style-name="P2" draw:layer="layout" svg:width="12.384cm" svg:height="0.051cm" svg:x="0.55cm" svg:y="14.13cm" svg:viewBox="0 0 12385 52" svg:d="M48 18c3 6 6 8 10 8h12251c22 0 41-9 56-25 1 0 1 0 2-1l18 19c0 0 0 1-1 1-21 22-46 32-75 32h-12251c-22 0-41-5-58-17z">
          <text:p/>
        </draw:path>
        <draw:path draw:style-name="gr2" draw:text-style-name="P2" draw:layer="layout" svg:width="0.05cm" svg:height="1.711cm" svg:x="12.914cm" svg:y="12.439cm" svg:viewBox="0 0 51 1712" svg:d="M0 1693c16-15 24-34 24-56v-1562c0-22-8-40-24-56l19-19c21 21 32 46 32 75v1562c0 30-11 55-32 75z">
          <text:p/>
        </draw:path>
        <draw:polygon draw:style-name="gr2" draw:text-style-name="P2" draw:layer="layout" svg:width="12.462cm" svg:height="1.773cm" svg:x="0.502cm" svg:y="12.408cm" svg:viewBox="0 0 12463 1774" draw:points="0,0 12463,0 12463,1774 0,1774">
          <text:p/>
        </draw:polygon>
        <draw:path draw:style-name="gr8" draw:text-style-name="P9" draw:layer="layout" svg:width="12.462cm" svg:height="1.773cm" svg:x="0.502cm" svg:y="14.34cm" svg:viewBox="0 0 12463 1774" svg:d="M31 31c21-21 46-31 75-31h12251c30 0 54 10 75 31s31 46 31 75v1562c0 29-10 54-31 75-21 20-46 31-75 31h-12251c-29 0-54-11-75-31-20-21-31-46-31-75v-1562c0-29 11-54 31-75z">
          <text:p/>
        </draw:path>
        <draw:polygon draw:style-name="gr2" draw:text-style-name="P2" draw:layer="layout" svg:width="12.462cm" svg:height="0.066cm" svg:x="0.502cm" svg:y="14.34cm" svg:viewBox="0 0 12463 67" draw:points="12400,67 0,67 0,0 12463,0 12463,3">
          <text:p/>
        </draw:polygon>
        <draw:path draw:style-name="gr2" draw:text-style-name="P2" draw:layer="layout" svg:width="12.384cm" svg:height="0.051cm" svg:x="0.55cm" svg:y="16.062cm" svg:viewBox="0 0 12385 52" svg:d="M48 18c3 4 6 6 10 6h12251c22 0 41-8 56-23 1-1 1-1 2-1l18 18c0 1 0 1-1 2-21 21-46 32-75 32h-12251c-22 0-41-6-58-17z">
          <text:p/>
        </draw:path>
        <draw:path draw:style-name="gr2" draw:text-style-name="P2" draw:layer="layout" svg:width="0.05cm" svg:height="1.711cm" svg:x="12.914cm" svg:y="14.371cm" svg:viewBox="0 0 51 1712" svg:d="M0 1693c16-16 24-34 24-56v-1562c0-22-8-41-24-56l19-19c21 21 32 46 32 75v1562c0 29-11 54-32 75z">
          <text:p/>
        </draw:path>
        <draw:polygon draw:style-name="gr2" draw:text-style-name="P2" draw:layer="layout" svg:width="12.462cm" svg:height="1.773cm" svg:x="0.502cm" svg:y="14.34cm" svg:viewBox="0 0 12463 1774" draw:points="0,0 12463,0 12463,1774 0,1774">
          <text:p/>
        </draw:polygon>
        <draw:path draw:style-name="gr19" draw:text-style-name="P20" draw:layer="layout" svg:width="0.37cm" svg:height="0.37cm" svg:x="0.926cm" svg:y="5.159cm" svg:viewBox="0 0 371 371" svg:d="M371 185c0 12-1 25-5 37-2 12-5 24-10 35s-10 22-17 32-15 19-23 28c-9 9-18 16-28 23s-21 12-32 17c-12 5-23 8-35 11-12 2-24 3-36 3s-24-1-36-3c-12-3-24-6-35-11s-22-10-32-17-20-14-28-23c-9-9-16-18-23-28s-13-21-17-32c-5-11-9-23-11-35s-3-25-3-37 1-24 3-36 6-24 11-35c4-11 10-22 17-32s14-19 23-28c8-9 18-16 28-23s21-12 32-17 23-8 35-11c12-2 24-3 36-3s24 1 36 3c12 3 23 6 35 11 11 5 22 10 32 17s19 14 28 23c8 9 16 18 23 28s12 21 17 32 8 23 10 35c4 12 5 24 5 36z">
          <text:p/>
        </draw:path>
        <draw:frame draw:style-name="gr9" draw:text-style-name="P10" draw:layer="layout" svg:width="9.274cm" svg:height="1.119cm" svg:x="8.387cm" svg:y="2.984cm">
          <draw:text-box>
            <text:p text:style-name="P3"><text:span text:style-name="T7">13 ACHIEVEMENTS</text:span></text:p>
          </draw:text-box>
        </draw:frame>
        <draw:frame draw:style-name="gr101" draw:text-style-name="P79" draw:layer="layout" svg:width="0.264cm" svg:height="0.297cm" svg:x="1.021cm" svg:y="5.158cm">
          <draw:text-box>
            <text:p text:style-name="P3"><text:span text:style-name="T81">✓</text:span></text:p>
          </draw:text-box>
        </draw:frame>
        <draw:frame draw:style-name="gr18" draw:text-style-name="P19" draw:layer="layout" svg:width="10.274cm" svg:height="0.539cm" svg:x="1.382cm" svg:y="4.962cm">
          <draw:text-box>
            <text:p text:style-name="P3"><text:span text:style-name="T17"><text:s/></text:span><text:span text:style-name="T16">Spec-driven workflow</text:span><text:span text:style-name="T17"> — full backward nav on</text:span></text:p>
          </draw:text-box>
        </draw:frame>
        <draw:path draw:style-name="gr19" draw:text-style-name="P20" draw:layer="layout" svg:width="0.37cm" svg:height="0.37cm" svg:x="0.926cm" svg:y="7.064cm" svg:viewBox="0 0 371 371" svg:d="M371 186c0 12-1 24-5 36-2 12-5 24-10 35s-10 22-17 32-15 19-23 28c-9 9-18 16-28 23s-21 12-32 17c-12 5-23 8-35 11-12 2-24 3-36 3s-24-1-36-3c-12-3-24-6-35-11s-22-10-32-17-20-14-28-23c-9-9-16-18-23-28s-13-21-17-32c-5-11-9-23-11-35s-3-24-3-36 1-24 3-37c2-12 6-24 11-35 4-11 10-22 17-32s14-19 23-28c8-9 18-16 28-23s21-12 32-17 23-8 35-11c12-2 24-3 36-3s24 1 36 3c12 3 23 6 35 11 11 5 22 10 32 17s19 14 28 23c8 9 16 18 23 28s12 21 17 32 8 23 10 35c4 13 5 25 5 37z">
          <text:p/>
        </draw:path>
        <draw:frame draw:style-name="gr18" draw:text-style-name="P19" draw:layer="layout" svg:width="1.826cm" svg:height="0.539cm" svg:x="0.919cm" svg:y="5.597cm">
          <draw:text-box>
            <text:p text:style-name="P3"><text:span text:style-name="T17">rejection</text:span></text:p>
          </draw:text-box>
        </draw:frame>
        <draw:frame draw:style-name="gr101" draw:text-style-name="P79" draw:layer="layout" svg:width="0.264cm" svg:height="0.297cm" svg:x="1.021cm" svg:y="7.089cm">
          <draw:text-box>
            <text:p text:style-name="P3"><text:span text:style-name="T81">✓</text:span></text:p>
          </draw:text-box>
        </draw:frame>
        <draw:path draw:style-name="gr33" draw:text-style-name="P34" draw:layer="layout" svg:width="1.667cm" svg:height="0.608cm" svg:x="10.53cm" svg:y="6.879cm" svg:viewBox="0 0 1668 609" svg:d="M0 530v-451c0-10 2-21 6-30 4-10 10-19 17-26 8-8 16-13 26-17s20-6 30-6h1509c11 0 21 2 31 6s18 9 26 17c7 7 13 16 17 26 4 9 6 20 6 30v451c0 10-2 20-6 30s-10 18-17 26c-8 7-16 13-26 17s-20 6-31 6h-1509c-10 0-20-2-30-6s-18-10-26-17c-7-8-13-16-17-26s-6-20-6-30z">
          <text:p/>
        </draw:path>
        <draw:frame draw:style-name="gr18" draw:text-style-name="P19" draw:layer="layout" svg:width="9.926cm" svg:height="0.539cm" svg:x="1.382cm" svg:y="6.893cm">
          <draw:text-box>
            <text:p text:style-name="P3"><text:span text:style-name="T17"><text:s/></text:span><text:span text:style-name="T16">Interactive TUI</text:span><text:span text:style-name="T17"> — keyboard-first, auto-focus, </text:span></text:p>
          </draw:text-box>
        </draw:frame>
        <draw:frame draw:style-name="gr75" draw:text-style-name="P59" draw:layer="layout" svg:width="1.177cm" svg:height="0.463cm" svg:x="10.633cm" svg:y="6.952cm">
          <draw:text-box>
            <text:p text:style-name="P3"><text:span text:style-name="T58">Ctrl+D</text:span></text:p>
          </draw:text-box>
        </draw:frame>
        <draw:path draw:style-name="gr19" draw:text-style-name="P20" draw:layer="layout" svg:width="0.37cm" svg:height="0.371cm" svg:x="0.926cm" svg:y="8.995cm" svg:viewBox="0 0 371 372" svg:d="M371 187c0 12-1 24-5 36-2 12-5 23-10 34-5 12-10 22-17 32s-15 20-23 28c-9 9-18 17-28 23-10 7-21 13-32 18-12 4-23 8-35 10-12 3-24 4-36 4s-24-1-36-4c-12-2-24-6-35-10-11-5-22-11-32-18-10-6-20-14-28-23-9-8-16-18-23-28s-13-20-17-32c-5-11-9-22-11-34s-3-24-3-36c0-13 1-25 3-37s6-23 11-34c4-12 10-22 17-32s14-21 23-29c8-9 18-17 28-23 10-7 21-13 32-18 11-4 23-8 35-10s24-4 36-4 24 2 36 4 23 6 35 10c11 5 22 11 32 17 10 7 19 15 28 24 8 8 16 19 23 29s12 20 17 32c5 11 8 22 10 34 4 12 5 24 5 37z">
          <text:p/>
        </draw:path>
        <draw:frame draw:style-name="gr18" draw:text-style-name="P19" draw:layer="layout" svg:width="0.907cm" svg:height="0.539cm" svg:x="0.919cm" svg:y="7.528cm">
          <draw:text-box>
            <text:p text:style-name="P3"><text:span text:style-name="T17">diﬀs</text:span></text:p>
          </draw:text-box>
        </draw:frame>
        <draw:frame draw:style-name="gr101" draw:text-style-name="P79" draw:layer="layout" svg:width="0.264cm" svg:height="0.297cm" svg:x="1.021cm" svg:y="9.021cm">
          <draw:text-box>
            <text:p text:style-name="P3"><text:span text:style-name="T81">✓</text:span></text:p>
          </draw:text-box>
        </draw:frame>
        <draw:frame draw:style-name="gr18" draw:text-style-name="P19" draw:layer="layout" svg:width="11.347cm" svg:height="0.539cm" svg:x="1.382cm" svg:y="8.825cm">
          <draw:text-box>
            <text:p text:style-name="P3"><text:span text:style-name="T17"><text:s/></text:span><text:span text:style-name="T16">Three-phase agents</text:span><text:span text:style-name="T17"> — Spec, Plan, Code with strict</text:span></text:p>
          </draw:text-box>
        </draw:frame>
        <draw:path draw:style-name="gr19" draw:text-style-name="P20" draw:layer="layout" svg:width="0.37cm" svg:height="0.37cm" svg:x="0.926cm" svg:y="10.927cm" svg:viewBox="0 0 371 371" svg:d="M371 185c0 12-1 24-5 36-2 12-5 24-10 35s-10 22-17 32-15 19-23 28c-9 9-18 16-28 23s-21 12-32 17c-12 6-23 9-35 12-12 2-24 3-36 3s-24-1-36-3c-12-3-24-6-35-12-11-5-22-10-32-17s-20-14-28-23c-9-9-16-18-23-28s-13-21-17-32c-5-11-9-23-11-35s-3-24-3-36 1-24 3-36 6-24 11-35c4-11 10-22 17-32s14-19 23-28c8-9 18-16 28-23s21-13 32-17c11-5 23-8 35-11 12-2 24-3 36-3s24 1 36 3c12 3 23 6 35 11 11 4 22 10 32 17s19 14 28 23c8 9 16 18 23 28s12 21 17 32 8 23 10 35c4 12 5 24 5 36z">
          <text:p/>
        </draw:path>
        <draw:frame draw:style-name="gr18" draw:text-style-name="P19" draw:layer="layout" svg:width="2.39cm" svg:height="0.539cm" svg:x="0.919cm" svg:y="9.46cm">
          <draw:text-box>
            <text:p text:style-name="P3"><text:span text:style-name="T17">boundaries</text:span></text:p>
          </draw:text-box>
        </draw:frame>
        <draw:frame draw:style-name="gr101" draw:text-style-name="P79" draw:layer="layout" svg:width="0.264cm" svg:height="0.297cm" svg:x="1.021cm" svg:y="10.952cm">
          <draw:text-box>
            <text:p text:style-name="P3"><text:span text:style-name="T81">✓</text:span></text:p>
          </draw:text-box>
        </draw:frame>
        <draw:frame draw:style-name="gr18" draw:text-style-name="P19" draw:layer="layout" svg:width="12.072cm" svg:height="0.539cm" svg:x="1.382cm" svg:y="10.756cm">
          <draw:text-box>
            <text:p text:style-name="P3"><text:span text:style-name="T17"><text:s/></text:span><text:span text:style-name="T16">Approval Gateway</text:span><text:span text:style-name="T17"> — read auto-approves; writes block</text:span></text:p>
          </draw:text-box>
        </draw:frame>
        <draw:path draw:style-name="gr19" draw:text-style-name="P20" draw:layer="layout" svg:width="0.37cm" svg:height="0.371cm" svg:x="0.926cm" svg:y="12.858cm" svg:viewBox="0 0 371 372" svg:d="M371 185c0 13-1 25-5 37-2 12-5 23-10 34-5 12-10 23-17 33s-15 20-23 28c-9 9-18 17-28 23-10 7-21 13-32 17-12 5-23 9-35 11s-24 4-36 4-24-2-36-4-24-6-35-11c-11-4-22-10-32-17-10-6-20-14-28-23-9-8-16-18-23-28s-13-21-17-33c-5-11-9-22-11-34s-3-24-3-37c0-12 1-24 3-36s6-23 11-35c4-11 10-21 17-32 7-10 14-19 23-28 8-8 18-16 28-23 10-6 21-12 32-17 11-4 23-8 35-10 12-3 24-4 36-4s24 1 36 4c12 2 23 6 35 10 11 5 22 11 32 17 10 7 19 15 28 23 8 9 16 18 23 29 7 10 12 20 17 31 5 12 8 23 10 35 4 12 5 24 5 36z">
          <text:p/>
        </draw:path>
        <draw:frame draw:style-name="gr18" draw:text-style-name="P19" draw:layer="layout" svg:width="2.39cm" svg:height="0.539cm" svg:x="0.919cm" svg:y="11.391cm">
          <draw:text-box>
            <text:p text:style-name="P3"><text:span text:style-name="T17">for consent</text:span></text:p>
          </draw:text-box>
        </draw:frame>
        <draw:frame draw:style-name="gr101" draw:text-style-name="P79" draw:layer="layout" svg:width="0.264cm" svg:height="0.297cm" svg:x="1.021cm" svg:y="12.884cm">
          <draw:text-box>
            <text:p text:style-name="P3"><text:span text:style-name="T81">✓</text:span></text:p>
          </draw:text-box>
        </draw:frame>
        <draw:frame draw:style-name="gr18" draw:text-style-name="P19" draw:layer="layout" svg:width="11.775cm" svg:height="0.539cm" svg:x="1.382cm" svg:y="12.688cm">
          <draw:text-box>
            <text:p text:style-name="P3"><text:span text:style-name="T17"><text:s/></text:span><text:span text:style-name="T16">Knowledge Graph</text:span><text:span text:style-name="T17"> — SQLite-backed AST parser with</text:span></text:p>
          </draw:text-box>
        </draw:frame>
        <draw:path draw:style-name="gr19" draw:text-style-name="P20" draw:layer="layout" svg:width="0.37cm" svg:height="0.37cm" svg:x="0.926cm" svg:y="14.79cm" svg:viewBox="0 0 371 371" svg:d="M371 185c0 13-1 25-5 37-2 12-5 23-10 35-5 11-10 22-17 32s-15 19-23 28c-9 8-18 16-28 23s-21 12-32 17c-12 5-23 8-35 11-12 2-24 3-36 3s-24-1-36-4c-12-2-24-5-35-10s-22-10-32-17-20-15-28-23c-9-9-16-18-23-28s-13-21-17-32c-5-11-9-23-11-35s-3-24-3-37c0-12 1-24 3-36s6-24 11-35c4-11 10-22 17-32s14-20 23-28c8-9 18-16 28-23s21-13 32-17c11-5 23-8 35-11 12-2 24-3 36-3s24 1 36 3c12 3 23 6 35 11 11 4 22 10 32 17s19 14 28 23c8 8 16 18 23 28s12 21 17 32 8 23 10 35c4 12 5 24 5 36z">
          <text:p/>
        </draw:path>
        <draw:frame draw:style-name="gr18" draw:text-style-name="P19" draw:layer="layout" svg:width="3.274cm" svg:height="0.539cm" svg:x="0.919cm" svg:y="13.296cm">
          <draw:text-box>
            <text:p text:style-name="P3"><text:span text:style-name="T17">query grammar</text:span></text:p>
          </draw:text-box>
        </draw:frame>
        <draw:frame draw:style-name="gr101" draw:text-style-name="P79" draw:layer="layout" svg:width="0.264cm" svg:height="0.297cm" svg:x="1.021cm" svg:y="14.815cm">
          <draw:text-box>
            <text:p text:style-name="P3"><text:span text:style-name="T81">✓</text:span></text:p>
          </draw:text-box>
        </draw:frame>
        <draw:frame draw:style-name="gr18" draw:text-style-name="P19" draw:layer="layout" svg:width="11.08cm" svg:height="0.539cm" svg:x="1.382cm" svg:y="14.619cm">
          <draw:text-box>
            <text:p text:style-name="P3"><text:span text:style-name="T17"><text:s/></text:span><text:span text:style-name="T16">Memory Pyramid</text:span><text:span text:style-name="T17"> — L0-L3 with confidence-filtered</text:span></text:p>
          </draw:text-box>
        </draw:frame>
        <draw:path draw:style-name="gr8" draw:text-style-name="P9" draw:layer="layout" svg:width="12.462cm" svg:height="1.164cm" svg:x="13.44cm" svg:y="4.683cm" svg:viewBox="0 0 12463 1165" svg:d="M31 31c21-21 46-31 75-31h12252c29 0 54 10 74 31 21 20 31 45 31 74v954c0 29-10 54-31 75-20 20-45 31-75 31h-12251c-29 0-54-11-75-31-20-21-31-46-31-75v-954c0-29 11-54 31-74z">
          <text:p/>
        </draw:path>
        <draw:polygon draw:style-name="gr2" draw:text-style-name="P2" draw:layer="layout" svg:width="12.462cm" svg:height="0.066cm" svg:x="13.44cm" svg:y="4.683cm" svg:viewBox="0 0 12463 67" draw:points="12400,67 0,67 0,0 12463,0 12463,2">
          <text:p/>
        </draw:polygon>
        <draw:path draw:style-name="gr2" draw:text-style-name="P2" draw:layer="layout" svg:width="12.385cm" svg:height="0.051cm" svg:x="13.488cm" svg:y="5.796cm" svg:viewBox="0 0 12386 52" svg:d="M48 18c3 4 6 6 10 6h12251c22 0 41-7 56-23 1 0 1-1 2-1l19 18c-1 1-1 1-2 2-20 20-45 32-75 32h-12251c-21 0-41-6-58-18z">
          <text:p/>
        </draw:path>
        <draw:path draw:style-name="gr2" draw:text-style-name="P2" draw:layer="layout" svg:width="0.05cm" svg:height="1.102cm" svg:x="25.852cm" svg:y="4.714cm" svg:viewBox="0 0 51 1103" svg:d="M0 1084c16-15 24-34 24-56v-954c0-21-8-40-24-56l19-18c21 20 32 45 32 74v954c0 29-11 54-32 75z">
          <text:p/>
        </draw:path>
        <draw:polygon draw:style-name="gr2" draw:text-style-name="P2" draw:layer="layout" svg:width="12.462cm" svg:height="1.164cm" svg:x="13.44cm" svg:y="4.683cm" svg:viewBox="0 0 12463 1165" draw:points="0,0 12463,0 12463,1165 0,1165">
          <text:p/>
        </draw:polygon>
        <draw:path draw:style-name="gr8" draw:text-style-name="P9" draw:layer="layout" svg:width="12.462cm" svg:height="1.164cm" svg:x="13.44cm" svg:y="5.979cm" svg:viewBox="0 0 12463 1165" svg:d="M31 31c21-21 46-31 75-31h12252c29 0 54 10 74 31 21 21 31 46 31 75v953c0 30-10 55-31 75-20 21-45 31-75 31h-12251c-29 0-54-10-75-31-20-20-31-45-31-75v-953c0-29 11-54 31-75z">
          <text:p/>
        </draw:path>
        <draw:polygon draw:style-name="gr2" draw:text-style-name="P2" draw:layer="layout" svg:width="12.462cm" svg:height="0.066cm" svg:x="13.44cm" svg:y="5.979cm" svg:viewBox="0 0 12463 67" draw:points="12400,67 0,67 0,0 12463,0 12463,3">
          <text:p/>
        </draw:polygon>
        <draw:path draw:style-name="gr2" draw:text-style-name="P2" draw:layer="layout" svg:width="12.385cm" svg:height="0.051cm" svg:x="13.488cm" svg:y="7.092cm" svg:viewBox="0 0 12386 52" svg:d="M48 19c3 5 6 7 10 7h12251c22 0 41-9 56-24 1-1 1-1 2-2l19 19c-1 0-1 1-2 1-20 22-45 32-75 32h-12251c-21 0-41-5-58-17z">
          <text:p/>
        </draw:path>
        <draw:path draw:style-name="gr2" draw:text-style-name="P2" draw:layer="layout" svg:width="0.05cm" svg:height="1.102cm" svg:x="25.852cm" svg:y="6.01cm" svg:viewBox="0 0 51 1103" svg:d="M0 1085c16-16 24-35 24-57v-952c0-22-8-42-24-57l19-19c21 21 32 46 32 76v952c0 30-11 55-32 75z">
          <text:p/>
        </draw:path>
        <draw:polygon draw:style-name="gr2" draw:text-style-name="P2" draw:layer="layout" svg:width="12.462cm" svg:height="1.164cm" svg:x="13.44cm" svg:y="5.979cm" svg:viewBox="0 0 12463 1165" draw:points="0,0 12463,0 12463,1165 0,1165">
          <text:p/>
        </draw:polygon>
        <draw:path draw:style-name="gr8" draw:text-style-name="P9" draw:layer="layout" svg:width="12.462cm" svg:height="1.138cm" svg:x="13.44cm" svg:y="7.302cm" svg:viewBox="0 0 12463 1139" svg:d="M31 31c21-21 46-31 75-31h12252c29 0 54 10 74 31 21 21 31 46 31 76v926c0 29-10 54-31 75-20 20-45 31-75 31h-12251c-29 0-54-11-75-31-20-21-31-46-31-75v-926c0-30 11-55 31-76z">
          <text:p/>
        </draw:path>
        <draw:path draw:style-name="gr2" draw:text-style-name="P2" draw:layer="layout" svg:width="12.385cm" svg:height="0.051cm" svg:x="13.488cm" svg:y="7.302cm" svg:viewBox="0 0 12386 52" svg:d="M12367 52c-1 0-1-1-2-1-15-16-34-24-56-24h-12251c-4 0-7 3-10 7l-48-16c17-12 36-18 58-18h12252c29 0 54 10 74 32 1 0 1 1 2 1z">
          <text:p/>
        </draw:path>
        <draw:path draw:style-name="gr2" draw:text-style-name="P2" draw:layer="layout" svg:width="12.385cm" svg:height="0.051cm" svg:x="13.488cm" svg:y="8.389cm" svg:viewBox="0 0 12386 52" svg:d="M48 19c3 4 6 6 10 6h12251c22 0 41-7 56-23 1 0 1-2 2-2l19 19c-1 1-1 1-2 2-20 20-45 31-75 31h-12251c-21 0-41-6-58-17z">
          <text:p/>
        </draw:path>
        <draw:path draw:style-name="gr2" draw:text-style-name="P2" draw:layer="layout" svg:width="0.05cm" svg:height="1.076cm" svg:x="25.852cm" svg:y="7.333cm" svg:viewBox="0 0 51 1077" svg:d="M0 1058c16-15 24-34 24-56v-927c0-22-8-41-24-56l19-19c21 21 32 46 32 75v927c0 29-11 54-32 75z">
          <text:p/>
        </draw:path>
        <draw:polygon draw:style-name="gr2" draw:text-style-name="P2" draw:layer="layout" svg:width="12.462cm" svg:height="1.138cm" svg:x="13.44cm" svg:y="7.302cm" svg:viewBox="0 0 12463 1139" draw:points="0,0 12463,0 12463,1139 0,1139">
          <text:p/>
        </draw:polygon>
        <draw:path draw:style-name="gr8" draw:text-style-name="P9" draw:layer="layout" svg:width="12.462cm" svg:height="1.773cm" svg:x="13.44cm" svg:y="8.598cm" svg:viewBox="0 0 12463 1774" svg:d="M31 31c21-20 46-31 75-31h12252c29 0 54 11 74 31 21 21 31 46 31 75v1562c0 30-10 55-31 75-20 21-45 31-75 31h-12251c-29 0-54-10-75-31-20-20-31-45-31-75v-1562c0-29 11-54 31-75z">
          <text:p/>
        </draw:path>
        <draw:path draw:style-name="gr2" draw:text-style-name="P2" draw:layer="layout" svg:width="12.385cm" svg:height="0.052cm" svg:x="13.488cm" svg:y="8.598cm" svg:viewBox="0 0 12386 53" svg:d="M12367 53c-1-1-1-1-2-2-15-16-34-24-56-24h-12251c-4 0-7 2-10 6l-48-16c17-11 36-17 58-17h12252c29 0 54 11 74 31 1 1 1 1 2 2z">
          <text:p/>
        </draw:path>
        <draw:path draw:style-name="gr2" draw:text-style-name="P2" draw:layer="layout" svg:width="12.385cm" svg:height="0.051cm" svg:x="13.488cm" svg:y="10.32cm" svg:viewBox="0 0 12386 52" svg:d="M48 19c3 5 6 7 10 7h12251c22 0 41-8 56-25 1 0 1 0 2-1l19 20c-1 0-1 1-2 1-20 21-45 31-75 31h-12251c-21 0-41-5-58-17z">
          <text:p/>
        </draw:path>
        <draw:path draw:style-name="gr2" draw:text-style-name="P2" draw:layer="layout" svg:width="0.05cm" svg:height="1.711cm" svg:x="25.852cm" svg:y="8.629cm" svg:viewBox="0 0 51 1712" svg:d="M0 1693c16-15 24-34 24-56v-1562c0-22-8-40-24-56l19-19c21 21 32 46 32 75v1562c0 30-11 55-32 75z">
          <text:p/>
        </draw:path>
        <draw:polygon draw:style-name="gr2" draw:text-style-name="P2" draw:layer="layout" svg:width="12.462cm" svg:height="1.773cm" svg:x="13.44cm" svg:y="8.598cm" svg:viewBox="0 0 12463 1774" draw:points="0,0 12463,0 12463,1774 0,1774">
          <text:p/>
        </draw:polygon>
        <draw:path draw:style-name="gr8" draw:text-style-name="P9" draw:layer="layout" svg:width="12.462cm" svg:height="1.773cm" svg:x="13.44cm" svg:y="10.53cm" svg:viewBox="0 0 12463 1774" svg:d="M31 31c21-21 46-31 75-31h12252c29 0 54 10 74 31 21 21 31 46 31 75v1562c0 29-10 54-31 75-20 20-45 31-75 31h-12251c-29 0-54-11-75-31-20-21-31-46-31-75v-1562c0-29 11-54 31-75z">
          <text:p/>
        </draw:path>
        <draw:polygon draw:style-name="gr2" draw:text-style-name="P2" draw:layer="layout" svg:width="12.462cm" svg:height="0.066cm" svg:x="13.44cm" svg:y="10.53cm" svg:viewBox="0 0 12463 67" draw:points="12400,67 0,67 0,0 12463,0 12463,3">
          <text:p/>
        </draw:polygon>
        <draw:path draw:style-name="gr2" draw:text-style-name="P2" draw:layer="layout" svg:width="12.385cm" svg:height="0.051cm" svg:x="13.488cm" svg:y="12.252cm" svg:viewBox="0 0 12386 52" svg:d="M48 19c3 4 6 6 10 6h12251c22 0 41-8 56-24 1-1 1-1 2-1l19 19c-1 1-1 1-2 2-20 20-45 31-75 31h-12251c-21 0-41-6-58-17z">
          <text:p/>
        </draw:path>
        <draw:path draw:style-name="gr2" draw:text-style-name="P2" draw:layer="layout" svg:width="0.05cm" svg:height="1.711cm" svg:x="25.852cm" svg:y="10.561cm" svg:viewBox="0 0 51 1712" svg:d="M0 1693c16-16 24-34 24-56v-1562c0-22-8-41-24-56l19-19c21 21 32 46 32 75v1562c0 29-11 54-32 75z">
          <text:p/>
        </draw:path>
        <draw:polygon draw:style-name="gr2" draw:text-style-name="P2" draw:layer="layout" svg:width="12.462cm" svg:height="1.773cm" svg:x="13.44cm" svg:y="10.53cm" svg:viewBox="0 0 12463 1774" draw:points="0,0 12463,0 12463,1774 0,1774">
          <text:p/>
        </draw:polygon>
        <draw:path draw:style-name="gr8" draw:text-style-name="P9" draw:layer="layout" svg:width="12.462cm" svg:height="1.773cm" svg:x="13.44cm" svg:y="12.461cm" svg:viewBox="0 0 12463 1774" svg:d="M31 31c21-20 46-31 75-31h12252c29 0 54 11 74 31 21 21 31 46 31 75v1562c0 29-10 54-31 75-20 21-45 31-75 31h-12251c-29 0-54-10-75-31-20-21-31-46-31-75v-1562c0-29 11-54 31-75z">
          <text:p/>
        </draw:path>
        <draw:path draw:style-name="gr2" draw:text-style-name="P2" draw:layer="layout" svg:width="12.385cm" svg:height="0.051cm" svg:x="13.488cm" svg:y="12.461cm" svg:viewBox="0 0 12386 52" svg:d="M12367 52c-1 0-1 0-2-1-15-15-34-23-56-23h-12251c-4 0-7 2-10 6l-48-16c17-12 36-18 58-18h12252c29 0 54 12 74 32 1 1 1 1 2 2z">
          <text:p/>
        </draw:path>
        <draw:path draw:style-name="gr2" draw:text-style-name="P2" draw:layer="layout" svg:width="12.385cm" svg:height="0.051cm" svg:x="13.488cm" svg:y="14.183cm" svg:viewBox="0 0 12386 52" svg:d="M48 18c3 6 6 8 10 8h12251c22 0 41-9 56-25 1 0 1-1 2-1l19 19c-1 0-1 1-2 1-20 22-45 32-75 32h-12251c-21 0-41-6-58-17z">
          <text:p/>
        </draw:path>
        <draw:path draw:style-name="gr2" draw:text-style-name="P2" draw:layer="layout" svg:width="0.05cm" svg:height="1.711cm" svg:x="25.852cm" svg:y="12.492cm" svg:viewBox="0 0 51 1712" svg:d="M0 1693c16-15 24-34 24-56v-1562c0-22-8-40-24-56l19-19c21 21 32 46 32 75v1562c0 29-11 54-32 75z">
          <text:p/>
        </draw:path>
        <draw:polygon draw:style-name="gr2" draw:text-style-name="P2" draw:layer="layout" svg:width="12.462cm" svg:height="1.773cm" svg:x="13.44cm" svg:y="12.461cm" svg:viewBox="0 0 12463 1774" draw:points="0,0 12463,0 12463,1774 0,1774">
          <text:p/>
        </draw:polygon>
        <draw:path draw:style-name="gr8" draw:text-style-name="P9" draw:layer="layout" svg:width="12.462cm" svg:height="1.773cm" svg:x="13.44cm" svg:y="14.393cm" svg:viewBox="0 0 12463 1774" svg:d="M31 31c21-21 46-31 75-31h12252c29 0 54 10 74 31 21 20 31 45 31 75v1562c0 29-10 54-31 75-20 20-45 31-75 31h-12251c-29 0-54-11-75-31-20-21-31-46-31-75v-1562c0-30 11-55 31-75z">
          <text:p/>
        </draw:path>
        <draw:path draw:style-name="gr2" draw:text-style-name="P2" draw:layer="layout" svg:width="12.385cm" svg:height="0.051cm" svg:x="13.488cm" svg:y="14.393cm" svg:viewBox="0 0 12386 52" svg:d="M12367 52c-1-1-1-1-2-1-15-16-34-24-56-24h-12251c-4 0-7 2-10 7l-48-16c17-12 36-18 58-18h12252c29 0 54 10 74 32 1 0 1 1 2 1z">
          <text:p/>
        </draw:path>
        <draw:path draw:style-name="gr2" draw:text-style-name="P2" draw:layer="layout" svg:width="12.385cm" svg:height="0.052cm" svg:x="13.488cm" svg:y="16.114cm" svg:viewBox="0 0 12386 53" svg:d="M48 19c3 4 6 6 10 6h12251c22 0 41-8 56-23 1-1 1-1 2-2l19 19c-1 1-1 1-2 2-20 21-45 32-75 32h-12251c-21 0-41-6-58-17z">
          <text:p/>
        </draw:path>
        <draw:path draw:style-name="gr2" draw:text-style-name="P2" draw:layer="layout" svg:width="0.05cm" svg:height="1.711cm" svg:x="25.852cm" svg:y="14.424cm" svg:viewBox="0 0 51 1712" svg:d="M0 1693c16-16 24-34 24-56v-1562c0-22-8-41-24-56l19-19c21 20 32 45 32 75v1562c0 29-11 54-32 75z">
          <text:p/>
        </draw:path>
        <draw:polygon draw:style-name="gr2" draw:text-style-name="P2" draw:layer="layout" svg:width="12.462cm" svg:height="1.773cm" svg:x="13.44cm" svg:y="14.393cm" svg:viewBox="0 0 12463 1774" draw:points="0,0 12463,0 12463,1774 0,1774">
          <text:p/>
        </draw:polygon>
        <draw:path draw:style-name="gr19" draw:text-style-name="P20" draw:layer="layout" svg:width="0.37cm" svg:height="0.37cm" svg:x="13.864cm" svg:y="5.159cm" svg:viewBox="0 0 371 371" svg:d="M371 185c0 12-1 25-3 37-3 12-6 24-11 35s-10 22-17 32-15 19-23 28c-9 9-18 16-28 23s-21 12-32 17-23 8-35 11c-12 2-24 3-36 3s-24-1-36-3c-12-3-24-6-35-11s-22-10-32-17-19-14-28-23-16-18-23-28-13-21-17-32c-6-11-9-23-12-35-2-12-3-25-3-37s1-24 3-36c3-12 6-24 12-35 4-11 10-22 17-32s14-19 23-28 18-16 28-23 21-12 32-17 23-8 35-11c12-2 24-3 36-3s24 1 36 3c12 3 24 6 35 11s22 10 32 17 19 14 28 23c8 9 16 18 23 28s12 21 17 32 8 23 11 35c2 12 3 24 3 36z">
          <text:p/>
        </draw:path>
        <draw:frame draw:style-name="gr18" draw:text-style-name="P19" draw:layer="layout" svg:width="1.558cm" svg:height="0.539cm" svg:x="0.919cm" svg:y="15.228cm">
          <draw:text-box>
            <text:p text:style-name="P3"><text:span text:style-name="T17">profiles</text:span></text:p>
          </draw:text-box>
        </draw:frame>
        <draw:frame draw:style-name="gr101" draw:text-style-name="P79" draw:layer="layout" svg:width="0.264cm" svg:height="0.297cm" svg:x="13.961cm" svg:y="5.158cm">
          <draw:text-box>
            <text:p text:style-name="P3"><text:span text:style-name="T81">✓</text:span></text:p>
          </draw:text-box>
        </draw:frame>
        <draw:path draw:style-name="gr19" draw:text-style-name="P20" draw:layer="layout" svg:width="0.37cm" svg:height="0.371cm" svg:x="13.864cm" svg:y="6.455cm" svg:viewBox="0 0 371 372" svg:d="M371 187c0 12-1 24-3 36-3 12-6 23-11 34-5 12-10 22-17 32-7 11-15 20-23 28-9 9-18 17-28 23-10 7-21 13-32 18-11 4-23 8-35 10-12 3-24 4-36 4s-24-1-36-4c-12-2-24-6-35-10-11-5-22-11-32-18-10-6-19-14-28-23-9-8-16-17-23-28-7-10-13-20-17-32-6-11-9-22-12-34-2-12-3-24-3-36 0-13 1-25 3-37 3-12 6-23 12-34 4-12 10-22 17-32s14-20 23-28c9-9 18-17 28-23 10-7 21-14 32-19 11-4 23-8 35-10s24-4 36-4 24 2 36 4 24 6 35 10c11 5 22 12 32 18 10 7 19 15 28 24 8 8 16 18 23 28s12 20 17 32c5 11 8 22 11 34 2 12 3 24 3 37z">
          <text:p/>
        </draw:path>
        <draw:frame draw:style-name="gr18" draw:text-style-name="P19" draw:layer="layout" svg:width="11.91cm" svg:height="0.539cm" svg:x="14.323cm" svg:y="4.962cm">
          <draw:text-box>
            <text:p text:style-name="P3"><text:span text:style-name="T17"><text:s/></text:span><text:span text:style-name="T16">Provider Abstraction</text:span><text:span text:style-name="T17"> — single adapter for 3 providers</text:span></text:p>
          </draw:text-box>
        </draw:frame>
        <draw:frame draw:style-name="gr101" draw:text-style-name="P79" draw:layer="layout" svg:width="0.264cm" svg:height="0.297cm" svg:x="13.961cm" svg:y="6.454cm">
          <draw:text-box>
            <text:p text:style-name="P3"><text:span text:style-name="T81">✓</text:span></text:p>
          </draw:text-box>
        </draw:frame>
        <draw:path draw:style-name="gr19" draw:text-style-name="P20" draw:layer="layout" svg:width="0.37cm" svg:height="0.37cm" svg:x="13.864cm" svg:y="7.752cm" svg:viewBox="0 0 371 371" svg:d="M371 185c0 12-1 25-3 37-3 12-6 24-11 35s-10 22-17 32-15 19-23 28c-9 9-18 16-28 23s-21 12-32 17-23 8-35 11c-12 2-24 3-36 3s-24-1-36-3c-12-3-24-6-35-11s-22-10-32-17-19-14-28-23-16-18-23-28-13-21-17-32c-6-11-9-23-12-35-2-12-3-25-3-37s1-24 3-36c3-12 6-24 12-35 4-11 10-22 17-32s14-19 23-28 18-16 28-23 21-13 32-17c11-5 23-8 35-11 12-2 24-3 36-3s24 1 36 3c12 3 24 6 35 11 11 4 22 10 32 17s19 14 28 23c8 9 16 18 23 28s12 21 17 32 8 23 11 35c2 12 3 24 3 36z">
          <text:p/>
        </draw:path>
        <draw:frame draw:style-name="gr18" draw:text-style-name="P19" draw:layer="layout" svg:width="11.696cm" svg:height="0.539cm" svg:x="14.323cm" svg:y="6.258cm">
          <draw:text-box>
            <text:p text:style-name="P3"><text:span text:style-name="T17"><text:s/></text:span><text:span text:style-name="T16">Safety Validation</text:span><text:span text:style-name="T17"> — no sudo, no system file redirects</text:span></text:p>
          </draw:text-box>
        </draw:frame>
        <draw:frame draw:style-name="gr101" draw:text-style-name="P79" draw:layer="layout" svg:width="0.264cm" svg:height="0.297cm" svg:x="13.961cm" svg:y="7.777cm">
          <draw:text-box>
            <text:p text:style-name="P3"><text:span text:style-name="T81">✓</text:span></text:p>
          </draw:text-box>
        </draw:frame>
        <draw:path draw:style-name="gr19" draw:text-style-name="P20" draw:layer="layout" svg:width="0.37cm" svg:height="0.371cm" svg:x="13.864cm" svg:y="9.048cm" svg:viewBox="0 0 371 372" svg:d="M371 186c0 13-1 25-3 37-3 11-6 23-11 34-5 12-10 22-17 32s-15 20-23 28c-9 9-18 17-28 23-10 7-21 13-32 18-11 4-23 8-35 10s-24 4-36 4-24-2-36-4-24-6-35-10c-11-5-22-11-32-18-10-6-19-14-28-23-9-8-16-18-23-28s-13-20-17-32c-6-11-9-22-12-34-2-12-3-24-3-37 0-12 1-24 3-36 3-12 6-23 12-35 4-11 10-21 17-32 7-10 14-19 23-28 9-8 18-16 28-23 10-6 21-12 32-18 11-4 23-8 35-10 12-3 24-4 36-4s24 1 36 4c12 2 24 6 35 10 11 6 22 12 32 18 10 7 19 15 28 23 8 9 16 18 23 29 7 10 12 20 17 31 5 12 8 23 11 35 2 12 3 24 3 36z">
          <text:p/>
        </draw:path>
        <draw:frame draw:style-name="gr18" draw:text-style-name="P19" draw:layer="layout" svg:width="10.932cm" svg:height="0.539cm" svg:x="14.323cm" svg:y="7.581cm">
          <draw:text-box>
            <text:p text:style-name="P3"><text:span text:style-name="T17"><text:s/></text:span><text:span text:style-name="T16">Audit System</text:span><text:span text:style-name="T17"> — dual-stream + argumentation log</text:span></text:p>
          </draw:text-box>
        </draw:frame>
        <draw:frame draw:style-name="gr101" draw:text-style-name="P79" draw:layer="layout" svg:width="0.264cm" svg:height="0.297cm" svg:x="13.961cm" svg:y="9.074cm">
          <draw:text-box>
            <text:p text:style-name="P3"><text:span text:style-name="T81">✓</text:span></text:p>
          </draw:text-box>
        </draw:frame>
        <draw:frame draw:style-name="gr18" draw:text-style-name="P19" draw:layer="layout" svg:width="11.077cm" svg:height="0.539cm" svg:x="14.323cm" svg:y="8.878cm">
          <draw:text-box>
            <text:p text:style-name="P3"><text:span text:style-name="T17"><text:s/></text:span><text:span text:style-name="T16">Self-Improving Wizard</text:span><text:span text:style-name="T17"> — spec wizard learns from</text:span></text:p>
          </draw:text-box>
        </draw:frame>
        <draw:path draw:style-name="gr19" draw:text-style-name="P20" draw:layer="layout" svg:width="0.37cm" svg:height="0.37cm" svg:x="13.864cm" svg:y="10.98cm" svg:viewBox="0 0 371 371" svg:d="M371 185c0 12-1 24-3 36-3 12-6 24-11 35s-10 22-17 32-15 20-23 29c-9 8-18 16-28 23s-21 12-32 17-23 8-35 11c-12 2-24 3-36 3s-24-1-36-3c-12-3-24-6-35-11s-22-10-32-17-19-15-28-23c-9-9-16-19-23-29s-13-21-17-32c-6-11-9-23-12-35-2-12-3-24-3-36s1-24 3-36c3-12 6-24 12-35 4-11 10-22 17-32s14-19 23-28 18-16 28-23 21-13 32-17c11-5 23-8 35-11 12-2 24-3 36-3s24 1 36 3c12 3 24 6 35 11 11 4 22 10 32 17s19 14 28 23c8 9 16 18 23 28s12 21 17 32 8 23 11 35c2 12 3 24 3 36z">
          <text:p/>
        </draw:path>
        <draw:frame draw:style-name="gr18" draw:text-style-name="P19" draw:layer="layout" svg:width="3.436cm" svg:height="0.539cm" svg:x="13.86cm" svg:y="9.513cm">
          <draw:text-box>
            <text:p text:style-name="P3"><text:span text:style-name="T17">usage over time</text:span></text:p>
          </draw:text-box>
        </draw:frame>
        <draw:frame draw:style-name="gr101" draw:text-style-name="P79" draw:layer="layout" svg:width="0.264cm" svg:height="0.297cm" svg:x="13.961cm" svg:y="11.005cm">
          <draw:text-box>
            <text:p text:style-name="P3"><text:span text:style-name="T81">✓</text:span></text:p>
          </draw:text-box>
        </draw:frame>
        <draw:frame draw:style-name="gr18" draw:text-style-name="P19" draw:layer="layout" svg:width="12.528cm" svg:height="0.539cm" svg:x="14.323cm" svg:y="10.809cm">
          <draw:text-box>
            <text:p text:style-name="P3"><text:span text:style-name="T17"><text:s/></text:span><text:span text:style-name="T16">Session Persistence</text:span><text:span text:style-name="T17"> — full save/resume across restarts,</text:span></text:p>
          </draw:text-box>
        </draw:frame>
        <draw:path draw:style-name="gr19" draw:text-style-name="P20" draw:layer="layout" svg:width="0.37cm" svg:height="0.371cm" svg:x="13.864cm" svg:y="12.911cm" svg:viewBox="0 0 371 372" svg:d="M371 185c0 13-1 25-3 36-3 13-6 25-11 36s-10 22-17 32-15 20-23 28c-9 9-18 17-28 23-10 7-21 13-32 17-11 5-23 9-35 11s-24 4-36 4-24-2-36-4-24-6-35-11c-11-4-22-10-32-17-10-6-19-14-28-23-9-8-16-18-23-28s-13-21-17-32c-6-11-9-23-12-36-2-11-3-23-3-36 0-12 1-24 3-36 3-12 6-23 12-35 4-11 10-21 17-32 7-10 14-19 23-28 9-8 18-16 28-23 10-6 21-12 32-17 11-4 23-8 35-10 12-3 24-4 36-4s24 1 36 4c12 2 24 6 35 10 11 5 22 11 32 17 10 7 19 15 28 23 8 9 16 18 23 28 7 11 12 21 17 32 5 12 8 23 11 35 2 12 3 24 3 36z">
          <text:p/>
        </draw:path>
        <draw:frame draw:style-name="gr18" draw:text-style-name="P19" draw:layer="layout" svg:width="5.314cm" svg:height="0.539cm" svg:x="13.86cm" svg:y="11.444cm">
          <draw:text-box>
            <text:p text:style-name="P3"><text:span text:style-name="T17">State machine controlled</text:span></text:p>
          </draw:text-box>
        </draw:frame>
        <draw:frame draw:style-name="gr101" draw:text-style-name="P79" draw:layer="layout" svg:width="0.264cm" svg:height="0.297cm" svg:x="13.961cm" svg:y="12.937cm">
          <draw:text-box>
            <text:p text:style-name="P3"><text:span text:style-name="T81">✓</text:span></text:p>
          </draw:text-box>
        </draw:frame>
        <draw:path draw:style-name="gr33" draw:text-style-name="P34" draw:layer="layout" svg:width="2.911cm" svg:height="0.609cm" svg:x="18.811cm" svg:y="12.726cm" svg:viewBox="0 0 2912 610" svg:d="M0 530v-451c0-10 2-20 6-30s10-19 18-26c7-7 16-13 25-17 10-4 20-6 31-6h2752c11 0 21 2 31 6s18 10 26 17c7 7 13 16 17 26s6 20 6 30v451c0 11-2 21-6 30-4 10-10 19-17 26-8 8-16 13-26 17s-20 6-31 7h-2752c-11-1-21-3-31-7-9-4-18-9-25-17-8-7-14-16-18-26-4-9-6-19-6-30z">
          <text:p/>
        </draw:path>
        <draw:frame draw:style-name="gr18" draw:text-style-name="P19" draw:layer="layout" svg:width="5.089cm" svg:height="0.539cm" svg:x="14.323cm" svg:y="12.74cm">
          <draw:text-box>
            <text:p text:style-name="P3"><text:span text:style-name="T17"><text:s/></text:span><text:span text:style-name="T16">Artifact Oﬀloading</text:span><text:span text:style-name="T17"> — </text:span></text:p>
          </draw:text-box>
        </draw:frame>
        <draw:frame draw:style-name="gr75" draw:text-style-name="P59" draw:layer="layout" svg:width="1.577cm" svg:height="0.463cm" svg:x="18.915cm" svg:y="12.8cm">
          <draw:text-box>
            <text:p text:style-name="P3"><text:span text:style-name="T58">artifact:./</text:span></text:p>
          </draw:text-box>
        </draw:frame>
        <draw:frame draw:style-name="gr18" draw:text-style-name="P19" draw:layer="layout" svg:width="2.952cm" svg:height="0.539cm" svg:x="21.719cm" svg:y="12.74cm">
          <draw:text-box>
            <text:p text:style-name="P3"><text:span text:style-name="T17"><text:s/>URIs prevent</text:span></text:p>
          </draw:text-box>
        </draw:frame>
        <draw:path draw:style-name="gr19" draw:text-style-name="P20" draw:layer="layout" svg:width="0.37cm" svg:height="0.37cm" svg:x="13.864cm" svg:y="14.843cm" svg:viewBox="0 0 371 371" svg:d="M371 186c0 12-1 24-3 36-3 12-6 23-11 35-5 11-10 22-17 32s-15 19-23 28c-9 8-18 16-28 23s-21 12-32 17-23 8-35 10c-12 3-24 4-36 4s-24-1-36-4c-12-2-24-5-35-10s-22-11-32-17c-10-7-19-15-28-23-9-9-16-18-23-28s-13-21-17-32c-6-12-9-23-12-35-2-12-3-24-3-36s1-24 3-36c3-13 6-25 12-36 4-11 10-22 17-32s14-20 23-28c9-9 18-16 28-23s21-13 32-17c11-5 23-8 35-11 12-2 24-3 36-3s24 1 36 3c12 3 24 6 35 11 11 4 22 10 32 17s19 14 28 23c8 8 16 18 23 28s12 21 17 32 8 23 11 36c2 12 3 24 3 36z">
          <text:p/>
        </draw:path>
        <draw:frame draw:style-name="gr18" draw:text-style-name="P19" draw:layer="layout" svg:width="2.739cm" svg:height="0.539cm" svg:x="13.86cm" svg:y="13.349cm">
          <draw:text-box>
            <text:p text:style-name="P3"><text:span text:style-name="T17">context bloat</text:span></text:p>
          </draw:text-box>
        </draw:frame>
        <draw:frame draw:style-name="gr101" draw:text-style-name="P79" draw:layer="layout" svg:width="0.264cm" svg:height="0.297cm" svg:x="13.961cm" svg:y="14.868cm">
          <draw:text-box>
            <text:p text:style-name="P3"><text:span text:style-name="T81">✓</text:span></text:p>
          </draw:text-box>
        </draw:frame>
        <draw:path draw:style-name="gr33" draw:text-style-name="P34" draw:layer="layout" svg:width="2.646cm" svg:height="0.609cm" svg:x="22.674cm" svg:y="14.657cm" svg:viewBox="0 0 2647 610" svg:d="M0 531v-451c0-11 2-21 6-31 4-9 10-18 18-25 7-8 16-14 25-18 10-4 20-6 31-6h2488c10 0 20 2 30 6s18 10 26 18c7 7 13 16 17 25 4 10 6 20 6 31v451c0 10-2 20-6 30s-10 18-17 26c-8 7-16 13-26 17s-20 6-30 6h-2488c-11 0-21-2-31-6-9-4-18-10-25-17-8-8-14-16-18-26s-6-20-6-30z">
          <text:p/>
        </draw:path>
        <draw:frame draw:style-name="gr18" draw:text-style-name="P19" draw:layer="layout" svg:width="9.2cm" svg:height="0.539cm" svg:x="14.323cm" svg:y="14.672cm">
          <draw:text-box>
            <text:p text:style-name="P3"><text:span text:style-name="T17"><text:s/></text:span><text:span text:style-name="T16">Modular Monolith</text:span><text:span text:style-name="T17"> — 8 main modules via </text:span></text:p>
          </draw:text-box>
        </draw:frame>
        <draw:frame draw:style-name="gr75" draw:text-style-name="P59" draw:layer="layout" svg:width="1.862cm" svg:height="0.463cm" svg:x="22.77cm" svg:y="14.731cm">
          <draw:text-box>
            <text:p text:style-name="P3"><text:span text:style-name="T58">~.Protocol</text:span></text:p>
          </draw:text-box>
        </draw:frame>
        <draw:frame draw:style-name="gr18" draw:text-style-name="P19" draw:layer="layout" svg:width="0.481cm" svg:height="0.539cm" svg:x="25.328cm" svg:y="14.672cm">
          <draw:text-box>
            <text:p text:style-name="P3"><text:span text:style-name="T17">,</text:span></text:p>
          </draw:text-box>
        </draw:frame>
        <draw:polygon draw:style-name="gr6" draw:text-style-name="P7" draw:layer="layout" svg:width="0.714cm" svg:height="0.635cm" svg:x="25.479cm" svg:y="18.388cm" svg:viewBox="0 0 715 636" draw:points="0,0 715,0 715,636 0,636">
          <text:p/>
        </draw:polygon>
        <draw:frame draw:style-name="gr18" draw:text-style-name="P19" draw:layer="layout" svg:width="3.463cm" svg:height="0.539cm" svg:x="13.86cm" svg:y="15.28cm">
          <draw:text-box>
            <text:p text:style-name="P3"><text:span text:style-name="T17">no runtime deps</text:span></text:p>
          </draw:text-box>
        </draw:frame>
        <draw:frame draw:style-name="gr7" draw:text-style-name="P8" draw:layer="layout" svg:width="0.412cm" svg:height="0.412cm" svg:x="25.617cm" svg:y="18.503cm">
          <draw:text-box>
            <text:p text:style-name="P3"><text:span text:style-name="T6">33</text:span></text:p>
          </draw:text-box>
        </draw:frame>
      </draw:page>
      <draw:page draw:name="page34"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7.303cm" svg:x="0.502cm" svg:y="5.979cm" svg:viewBox="0 0 25401 7304" draw:points="0,0 25401,0 25401,7304 0,7304">
          <text:p/>
        </draw:polygon>
        <draw:frame draw:style-name="gr9" draw:text-style-name="P10" draw:layer="layout" svg:width="13.712cm" svg:height="1.119cm" svg:x="5.772cm" svg:y="8.805cm">
          <draw:text-box>
            <text:p text:style-name="P3"><text:span text:style-name="T11">FUTURE WORK &amp; ROADMAP</text:span></text:p>
          </draw:text-box>
        </draw:frame>
        <draw:frame draw:style-name="gr15" draw:text-style-name="P16" draw:layer="layout" svg:width="4.122cm" svg:height="4.137cm" svg:x="10.98cm" svg:y="5.802cm">
          <draw:text-box>
            <text:p text:style-name="P3"><text:span text:style-name="T12">06</text:span></text:p>
          </draw:text-box>
        </draw:frame>
        <draw:polygon draw:style-name="gr6" draw:text-style-name="P7" draw:layer="layout" svg:width="0.714cm" svg:height="0.635cm" svg:x="25.479cm" svg:y="18.388cm" svg:viewBox="0 0 715 636" draw:points="0,0 715,0 715,636 0,636">
          <text:p/>
        </draw:polygon>
        <draw:frame draw:style-name="gr102" draw:text-style-name="P80" draw:layer="layout" svg:width="25.284cm" svg:height="1.656cm" svg:x="1.64cm" svg:y="10.883cm">
          <draw:text-box>
            <text:p text:style-name="P3"><text:span text:style-name="T82">Deferred Until Real Usage Demands It</text:span></text:p>
          </draw:text-box>
        </draw:frame>
        <draw:frame draw:style-name="gr7" draw:text-style-name="P8" draw:layer="layout" svg:width="0.412cm" svg:height="0.412cm" svg:x="25.617cm" svg:y="18.503cm">
          <draw:text-box>
            <text:p text:style-name="P3"><text:span text:style-name="T6">34</text:span></text:p>
          </draw:text-box>
        </draw:frame>
      </draw:page>
      <draw:page draw:name="page35" draw:style-name="dp1" draw:master-page-name="master-page3">
        <draw:polygon draw:style-name="gr1" draw:text-style-name="P1" draw:layer="layout" svg:width="26.405cm" svg:height="19.235cm" svg:x="0cm" svg:y="0cm" svg:viewBox="0 0 26406 19236" draw:points="0,0 26406,0 26406,19236 0,19236">
          <text:p/>
        </draw:polygon>
        <draw:polygon draw:style-name="gr2" draw:text-style-name="P2" draw:layer="layout" svg:width="5.345cm" svg:height="0.821cm" svg:x="0.502cm" svg:y="6.111cm" svg:viewBox="0 0 5346 822" draw:points="0,0 5346,0 5346,822 0,822">
          <text:p/>
        </draw:polygon>
        <draw:polygon draw:style-name="gr2" draw:text-style-name="P2" draw:layer="layout" svg:width="6.641cm" svg:height="0.821cm" svg:x="5.847cm" svg:y="6.111cm" svg:viewBox="0 0 6642 822" draw:points="0,0 6642,0 6642,822 0,822">
          <text:p/>
        </draw:polygon>
        <draw:polygon draw:style-name="gr2" draw:text-style-name="P2" draw:layer="layout" svg:width="13.414cm" svg:height="0.821cm" svg:x="12.488cm" svg:y="6.111cm" svg:viewBox="0 0 13415 822" draw:points="0,0 13415,0 13415,822 0,822">
          <text:p/>
        </draw:polygon>
        <draw:polygon draw:style-name="gr30" draw:text-style-name="P31" draw:layer="layout" svg:width="5.345cm" svg:height="0.794cm" svg:x="0.502cm" svg:y="7.699cm" svg:viewBox="0 0 5346 795" draw:points="0,0 5346,0 5346,795 0,795">
          <text:p/>
        </draw:polygon>
        <draw:polygon draw:style-name="gr30" draw:text-style-name="P31" draw:layer="layout" svg:width="6.641cm" svg:height="0.794cm" svg:x="5.847cm" svg:y="7.699cm" svg:viewBox="0 0 6642 795" draw:points="0,0 6642,0 6642,795 0,795">
          <text:p/>
        </draw:polygon>
        <draw:polygon draw:style-name="gr30" draw:text-style-name="P31" draw:layer="layout" svg:width="13.414cm" svg:height="0.794cm" svg:x="12.488cm" svg:y="7.699cm" svg:viewBox="0 0 13415 795" draw:points="0,0 13415,0 13415,795 0,795">
          <text:p/>
        </draw:polygon>
        <draw:polygon draw:style-name="gr30" draw:text-style-name="P31" draw:layer="layout" svg:width="5.345cm" svg:height="0.794cm" svg:x="0.502cm" svg:y="9.26cm" svg:viewBox="0 0 5346 795" draw:points="0,0 5346,0 5346,795 0,795">
          <text:p/>
        </draw:polygon>
        <draw:polygon draw:style-name="gr30" draw:text-style-name="P31" draw:layer="layout" svg:width="6.641cm" svg:height="0.794cm" svg:x="5.847cm" svg:y="9.26cm" svg:viewBox="0 0 6642 795" draw:points="0,0 6642,0 6642,795 0,795">
          <text:p/>
        </draw:polygon>
        <draw:polygon draw:style-name="gr30" draw:text-style-name="P31" draw:layer="layout" svg:width="13.414cm" svg:height="0.794cm" svg:x="12.488cm" svg:y="9.26cm" svg:viewBox="0 0 13415 795" draw:points="0,0 13415,0 13415,795 0,795">
          <text:p/>
        </draw:polygon>
        <draw:polygon draw:style-name="gr30" draw:text-style-name="P31" draw:layer="layout" svg:width="5.345cm" svg:height="0.794cm" svg:x="0.502cm" svg:y="10.821cm" svg:viewBox="0 0 5346 795" draw:points="0,0 5346,0 5346,795 0,795">
          <text:p/>
        </draw:polygon>
        <draw:polygon draw:style-name="gr30" draw:text-style-name="P31" draw:layer="layout" svg:width="6.641cm" svg:height="0.794cm" svg:x="5.847cm" svg:y="10.821cm" svg:viewBox="0 0 6642 795" draw:points="0,0 6642,0 6642,795 0,795">
          <text:p/>
        </draw:polygon>
        <draw:polygon draw:style-name="gr30" draw:text-style-name="P31" draw:layer="layout" svg:width="13.414cm" svg:height="0.794cm" svg:x="12.488cm" svg:y="10.821cm" svg:viewBox="0 0 13415 795" draw:points="0,0 13415,0 13415,795 0,795">
          <text:p/>
        </draw:polygon>
        <draw:polygon draw:style-name="gr30" draw:text-style-name="P31" draw:layer="layout" svg:width="5.345cm" svg:height="0.794cm" svg:x="0.502cm" svg:y="12.382cm" svg:viewBox="0 0 5346 795" draw:points="0,0 5346,0 5346,795 0,795">
          <text:p/>
        </draw:polygon>
        <draw:polygon draw:style-name="gr30" draw:text-style-name="P31" draw:layer="layout" svg:width="6.641cm" svg:height="0.794cm" svg:x="5.847cm" svg:y="12.382cm" svg:viewBox="0 0 6642 795" draw:points="0,0 6642,0 6642,795 0,795">
          <text:p/>
        </draw:polygon>
        <draw:polygon draw:style-name="gr30" draw:text-style-name="P31" draw:layer="layout" svg:width="13.414cm" svg:height="0.794cm" svg:x="12.488cm" svg:y="12.382cm" svg:viewBox="0 0 13415 795" draw:points="0,0 13415,0 13415,795 0,795">
          <text:p/>
        </draw:polygon>
        <draw:polygon draw:style-name="gr1" draw:text-style-name="P1" draw:layer="layout" svg:width="5.345cm" svg:height="0.027cm" svg:x="0.502cm" svg:y="6.905cm" svg:viewBox="0 0 5346 28" draw:points="0,0 5346,0 5346,28 0,28">
          <text:p/>
        </draw:polygon>
        <draw:polygon draw:style-name="gr1" draw:text-style-name="P1" draw:layer="layout" svg:width="6.641cm" svg:height="0.027cm" svg:x="5.847cm" svg:y="6.905cm" svg:viewBox="0 0 6642 28" draw:points="0,0 6642,0 6642,28 0,28">
          <text:p/>
        </draw:polygon>
        <draw:polygon draw:style-name="gr1" draw:text-style-name="P1" draw:layer="layout" svg:width="13.414cm" svg:height="0.027cm" svg:x="12.488cm" svg:y="6.905cm" svg:viewBox="0 0 13415 28" draw:points="0,0 13415,0 13415,28 0,28">
          <text:p/>
        </draw:polygon>
        <draw:polygon draw:style-name="gr31" draw:text-style-name="P32" draw:layer="layout" svg:width="5.345cm" svg:height="0.026cm" svg:x="0.502cm" svg:y="7.699cm" svg:viewBox="0 0 5346 27" draw:points="0,0 5346,0 5346,27 0,27">
          <text:p/>
        </draw:polygon>
        <draw:polygon draw:style-name="gr31" draw:text-style-name="P32" draw:layer="layout" svg:width="6.641cm" svg:height="0.026cm" svg:x="5.847cm" svg:y="7.699cm" svg:viewBox="0 0 6642 27" draw:points="0,0 6642,0 6642,27 0,27">
          <text:p/>
        </draw:polygon>
        <draw:polygon draw:style-name="gr31" draw:text-style-name="P32" draw:layer="layout" svg:width="13.414cm" svg:height="0.026cm" svg:x="12.488cm" svg:y="7.699cm" svg:viewBox="0 0 13415 27" draw:points="0,0 13415,0 13415,27 0,27">
          <text:p/>
        </draw:polygon>
        <draw:polygon draw:style-name="gr31" draw:text-style-name="P32" draw:layer="layout" svg:width="5.345cm" svg:height="0.027cm" svg:x="0.502cm" svg:y="8.466cm" svg:viewBox="0 0 5346 28" draw:points="0,0 5346,0 5346,28 0,28">
          <text:p/>
        </draw:polygon>
        <draw:polygon draw:style-name="gr31" draw:text-style-name="P32" draw:layer="layout" svg:width="6.641cm" svg:height="0.027cm" svg:x="5.847cm" svg:y="8.466cm" svg:viewBox="0 0 6642 28" draw:points="0,0 6642,0 6642,28 0,28">
          <text:p/>
        </draw:polygon>
        <draw:polygon draw:style-name="gr31" draw:text-style-name="P32" draw:layer="layout" svg:width="13.414cm" svg:height="0.027cm" svg:x="12.488cm" svg:y="8.466cm" svg:viewBox="0 0 13415 28" draw:points="0,0 13415,0 13415,28 0,28">
          <text:p/>
        </draw:polygon>
        <draw:polygon draw:style-name="gr31" draw:text-style-name="P32" draw:layer="layout" svg:width="5.345cm" svg:height="0.026cm" svg:x="0.502cm" svg:y="9.26cm" svg:viewBox="0 0 5346 27" draw:points="0,0 5346,0 5346,27 0,27">
          <text:p/>
        </draw:polygon>
        <draw:polygon draw:style-name="gr31" draw:text-style-name="P32" draw:layer="layout" svg:width="6.641cm" svg:height="0.026cm" svg:x="5.847cm" svg:y="9.26cm" svg:viewBox="0 0 6642 27" draw:points="0,0 6642,0 6642,27 0,27">
          <text:p/>
        </draw:polygon>
        <draw:polygon draw:style-name="gr31" draw:text-style-name="P32" draw:layer="layout" svg:width="13.414cm" svg:height="0.026cm" svg:x="12.488cm" svg:y="9.26cm" svg:viewBox="0 0 13415 27" draw:points="0,0 13415,0 13415,27 0,27">
          <text:p/>
        </draw:polygon>
        <draw:polygon draw:style-name="gr31" draw:text-style-name="P32" draw:layer="layout" svg:width="5.345cm" svg:height="0.027cm" svg:x="0.502cm" svg:y="10.027cm" svg:viewBox="0 0 5346 28" draw:points="0,0 5346,0 5346,28 0,28">
          <text:p/>
        </draw:polygon>
        <draw:polygon draw:style-name="gr31" draw:text-style-name="P32" draw:layer="layout" svg:width="6.641cm" svg:height="0.027cm" svg:x="5.847cm" svg:y="10.027cm" svg:viewBox="0 0 6642 28" draw:points="0,0 6642,0 6642,28 0,28">
          <text:p/>
        </draw:polygon>
        <draw:polygon draw:style-name="gr31" draw:text-style-name="P32" draw:layer="layout" svg:width="13.414cm" svg:height="0.027cm" svg:x="12.488cm" svg:y="10.027cm" svg:viewBox="0 0 13415 28" draw:points="0,0 13415,0 13415,28 0,28">
          <text:p/>
        </draw:polygon>
        <draw:polygon draw:style-name="gr31" draw:text-style-name="P32" draw:layer="layout" svg:width="5.345cm" svg:height="0.026cm" svg:x="0.502cm" svg:y="10.821cm" svg:viewBox="0 0 5346 27" draw:points="0,0 5346,0 5346,27 0,27">
          <text:p/>
        </draw:polygon>
        <draw:polygon draw:style-name="gr31" draw:text-style-name="P32" draw:layer="layout" svg:width="6.641cm" svg:height="0.026cm" svg:x="5.847cm" svg:y="10.821cm" svg:viewBox="0 0 6642 27" draw:points="0,0 6642,0 6642,27 0,27">
          <text:p/>
        </draw:polygon>
        <draw:polygon draw:style-name="gr31" draw:text-style-name="P32" draw:layer="layout" svg:width="13.414cm" svg:height="0.026cm" svg:x="12.488cm" svg:y="10.821cm" svg:viewBox="0 0 13415 27" draw:points="0,0 13415,0 13415,27 0,27">
          <text:p/>
        </draw:polygon>
        <draw:polygon draw:style-name="gr31" draw:text-style-name="P32" draw:layer="layout" svg:width="5.345cm" svg:height="0.027cm" svg:x="0.502cm" svg:y="11.588cm" svg:viewBox="0 0 5346 28" draw:points="0,0 5346,0 5346,28 0,28">
          <text:p/>
        </draw:polygon>
        <draw:polygon draw:style-name="gr31" draw:text-style-name="P32" draw:layer="layout" svg:width="6.641cm" svg:height="0.027cm" svg:x="5.847cm" svg:y="11.588cm" svg:viewBox="0 0 6642 28" draw:points="0,0 6642,0 6642,28 0,28">
          <text:p/>
        </draw:polygon>
        <draw:polygon draw:style-name="gr31" draw:text-style-name="P32" draw:layer="layout" svg:width="13.414cm" svg:height="0.027cm" svg:x="12.488cm" svg:y="11.588cm" svg:viewBox="0 0 13415 28" draw:points="0,0 13415,0 13415,28 0,28">
          <text:p/>
        </draw:polygon>
        <draw:polygon draw:style-name="gr31" draw:text-style-name="P32" draw:layer="layout" svg:width="5.345cm" svg:height="0.026cm" svg:x="0.502cm" svg:y="12.382cm" svg:viewBox="0 0 5346 27" draw:points="0,0 5346,0 5346,27 0,27">
          <text:p/>
        </draw:polygon>
        <draw:polygon draw:style-name="gr31" draw:text-style-name="P32" draw:layer="layout" svg:width="6.641cm" svg:height="0.026cm" svg:x="5.847cm" svg:y="12.382cm" svg:viewBox="0 0 6642 27" draw:points="0,0 6642,0 6642,27 0,27">
          <text:p/>
        </draw:polygon>
        <draw:polygon draw:style-name="gr31" draw:text-style-name="P32" draw:layer="layout" svg:width="13.414cm" svg:height="0.026cm" svg:x="12.488cm" svg:y="12.382cm" svg:viewBox="0 0 13415 27" draw:points="0,0 13415,0 13415,27 0,27">
          <text:p/>
        </draw:polygon>
        <draw:frame draw:style-name="gr9" draw:text-style-name="P10" draw:layer="layout" svg:width="5.053cm" svg:height="1.119cm" svg:x="10.395cm" svg:y="4.572cm">
          <draw:text-box>
            <text:p text:style-name="P3"><text:span text:style-name="T7">ROADMAP</text:span></text:p>
          </draw:text-box>
        </draw:frame>
        <draw:frame draw:style-name="gr5" draw:text-style-name="P6" draw:layer="layout" svg:width="0.99cm" svg:height="0.496cm" svg:x="0.68cm" svg:y="6.213cm">
          <draw:text-box>
            <text:p text:style-name="P3"><text:span text:style-name="T30">Area</text:span></text:p>
          </draw:text-box>
        </draw:frame>
        <draw:frame draw:style-name="gr5" draw:text-style-name="P6" draw:layer="layout" svg:width="1.607cm" svg:height="0.496cm" svg:x="6.013cm" svg:y="6.213cm">
          <draw:text-box>
            <text:p text:style-name="P3"><text:span text:style-name="T30">Current</text:span></text:p>
          </draw:text-box>
        </draw:frame>
        <draw:frame draw:style-name="gr5" draw:text-style-name="P6" draw:layer="layout" svg:width="1.731cm" svg:height="0.496cm" svg:x="12.673cm" svg:y="6.213cm">
          <draw:text-box>
            <text:p text:style-name="P3"><text:span text:style-name="T30">Planned</text:span></text:p>
          </draw:text-box>
        </draw:frame>
        <draw:frame draw:style-name="gr5" draw:text-style-name="P6" draw:layer="layout" svg:width="3.039cm" svg:height="0.496cm" svg:x="0.68cm" svg:y="7.033cm">
          <draw:text-box>
            <text:p text:style-name="P3"><text:span text:style-name="T27">Git Integration</text:span></text:p>
          </draw:text-box>
        </draw:frame>
        <draw:frame draw:style-name="gr5" draw:text-style-name="P6" draw:layer="layout" svg:width="3.436cm" svg:height="0.496cm" svg:x="6.013cm" svg:y="7.033cm">
          <draw:text-box>
            <text:p text:style-name="P3"><text:span text:style-name="T15">No git awareness</text:span></text:p>
          </draw:text-box>
        </draw:frame>
        <draw:frame draw:style-name="gr5" draw:text-style-name="P6" draw:layer="layout" svg:width="10.058cm" svg:height="0.496cm" svg:x="12.673cm" svg:y="7.033cm">
          <draw:text-box>
            <text:p text:style-name="P3"><text:span text:style-name="T15">Transactional rollbacks, incremental graph updates</text:span></text:p>
          </draw:text-box>
        </draw:frame>
        <draw:frame draw:style-name="gr5" draw:text-style-name="P6" draw:layer="layout" svg:width="2.472cm" svg:height="0.496cm" svg:x="0.68cm" svg:y="7.8cm">
          <draw:text-box>
            <text:p text:style-name="P3"><text:span text:style-name="T27">IDE Plugins</text:span></text:p>
          </draw:text-box>
        </draw:frame>
        <draw:frame draw:style-name="gr5" draw:text-style-name="P6" draw:layer="layout" svg:width="4.03cm" svg:height="0.496cm" svg:x="6.013cm" svg:y="7.8cm">
          <draw:text-box>
            <text:p text:style-name="P3"><text:span text:style-name="T15">Standalone TUI only</text:span></text:p>
          </draw:text-box>
        </draw:frame>
        <draw:frame draw:style-name="gr5" draw:text-style-name="P6" draw:layer="layout" svg:width="7.092cm" svg:height="0.496cm" svg:x="12.673cm" svg:y="7.8cm">
          <draw:text-box>
            <text:p text:style-name="P3"><text:span text:style-name="T15">VS Code / JetBrains via JSON-RPC</text:span></text:p>
          </draw:text-box>
        </draw:frame>
        <draw:frame draw:style-name="gr5" draw:text-style-name="P6" draw:layer="layout" svg:width="3.903cm" svg:height="0.496cm" svg:x="0.68cm" svg:y="8.594cm">
          <draw:text-box>
            <text:p text:style-name="P3"><text:span text:style-name="T27">GitHub Integration</text:span></text:p>
          </draw:text-box>
        </draw:frame>
        <draw:frame draw:style-name="gr5" draw:text-style-name="P6" draw:layer="layout" svg:width="3.955cm" svg:height="0.496cm" svg:x="6.013cm" svg:y="8.594cm">
          <draw:text-box>
            <text:p text:style-name="P3"><text:span text:style-name="T15">Local TUI approvals</text:span></text:p>
          </draw:text-box>
        </draw:frame>
        <draw:frame draw:style-name="gr5" draw:text-style-name="P6" draw:layer="layout" svg:width="6.623cm" svg:height="0.496cm" svg:x="12.673cm" svg:y="8.594cm">
          <draw:text-box>
            <text:p text:style-name="P3"><text:span text:style-name="T15">PR automation, remote approvals</text:span></text:p>
          </draw:text-box>
        </draw:frame>
        <draw:path draw:style-name="gr33" draw:text-style-name="P34" draw:layer="layout" svg:width="1.561cm" svg:height="0.556cm" svg:x="6.006cm" svg:y="9.339cm" svg:viewBox="0 0 1562 557" svg:d="M0 478v-398c0-11 2-21 6-31s9-18 17-26c7-7 16-13 26-17 9-4 19-6 30-6h1403c11 0 21 2 31 6 9 4 18 10 25 17 8 8 14 16 18 26s6 20 6 31v398c0 10-2 20-6 30s-10 18-18 26c-7 7-16 13-25 17-10 4-20 6-31 6h-1403c-11 0-21-2-30-6-10-4-19-10-26-17-8-8-13-16-17-26s-6-20-6-30z">
          <text:p/>
        </draw:path>
        <draw:frame draw:style-name="gr5" draw:text-style-name="P6" draw:layer="layout" svg:width="3.484cm" svg:height="0.496cm" svg:x="0.68cm" svg:y="9.361cm">
          <draw:text-box>
            <text:p text:style-name="P3"><text:span text:style-name="T27">Containerization</text:span></text:p>
          </draw:text-box>
        </draw:frame>
        <draw:frame draw:style-name="gr34" draw:text-style-name="P35" draw:layer="layout" svg:width="1.049cm" svg:height="0.424cm" svg:x="6.107cm" svg:y="9.413cm">
          <draw:text-box>
            <text:p text:style-name="P3"><text:span text:style-name="T32">uv run</text:span></text:p>
          </draw:text-box>
        </draw:frame>
        <draw:frame draw:style-name="gr5" draw:text-style-name="P6" draw:layer="layout" svg:width="1.584cm" svg:height="0.496cm" svg:x="7.56cm" svg:y="9.361cm">
          <draw:text-box>
            <text:p text:style-name="P3"><text:span text:style-name="T15"><text:s/>on host</text:span></text:p>
          </draw:text-box>
        </draw:frame>
        <draw:frame draw:style-name="gr5" draw:text-style-name="P6" draw:layer="layout" svg:width="8.946cm" svg:height="0.496cm" svg:x="12.673cm" svg:y="9.361cm">
          <draw:text-box>
            <text:p text:style-name="P3"><text:span text:style-name="T15">Docker multi-stage with sandboxed execution</text:span></text:p>
          </draw:text-box>
        </draw:frame>
        <draw:frame draw:style-name="gr5" draw:text-style-name="P6" draw:layer="layout" svg:width="2.992cm" svg:height="0.496cm" svg:x="0.68cm" svg:y="10.155cm">
          <draw:text-box>
            <text:p text:style-name="P3"><text:span text:style-name="T27">Vector Search</text:span></text:p>
          </draw:text-box>
        </draw:frame>
        <draw:path draw:style-name="gr33" draw:text-style-name="P34" draw:layer="layout" svg:width="1.085cm" svg:height="0.529cm" svg:x="7.328cm" svg:y="10.133cm" svg:viewBox="0 0 1086 530" svg:d="M0 451v-372c0-10 2-20 7-30 4-10 9-18 17-26 7-7 16-13 25-17 10-4 20-6 31-6h927c10 0 21 2 30 6 10 4 19 10 26 17 7 8 13 16 17 26s6 20 6 30v372c0 10-2 20-6 30s-10 18-17 26c-7 7-16 13-26 17-9 4-20 6-30 6h-927c-11 0-21-2-31-6-9-4-18-10-25-17-8-8-13-16-17-26-5-10-7-20-7-30z">
          <text:p/>
        </draw:path>
        <draw:frame draw:style-name="gr5" draw:text-style-name="P6" draw:layer="layout" svg:width="1.484cm" svg:height="0.496cm" svg:x="6.013cm" svg:y="10.155cm">
          <draw:text-box>
            <text:p text:style-name="P3"><text:span text:style-name="T15">SQLite </text:span></text:p>
          </draw:text-box>
        </draw:frame>
        <draw:frame draw:style-name="gr34" draw:text-style-name="P35" draw:layer="layout" svg:width="0.819cm" svg:height="0.424cm" svg:x="7.419cm" svg:y="10.207cm">
          <draw:text-box>
            <text:p text:style-name="P3"><text:span text:style-name="T32">LIKE</text:span></text:p>
          </draw:text-box>
        </draw:frame>
        <draw:frame draw:style-name="gr5" draw:text-style-name="P6" draw:layer="layout" svg:width="1.287cm" svg:height="0.496cm" svg:x="8.419cm" svg:y="10.155cm">
          <draw:text-box>
            <text:p text:style-name="P3"><text:span text:style-name="T15"><text:s/>scans</text:span></text:p>
          </draw:text-box>
        </draw:frame>
        <draw:frame draw:style-name="gr5" draw:text-style-name="P6" draw:layer="layout" svg:width="7.191cm" svg:height="0.496cm" svg:x="12.673cm" svg:y="10.155cm">
          <draw:text-box>
            <text:p text:style-name="P3"><text:span text:style-name="T15">Semantic search via Qdrant/Chroma</text:span></text:p>
          </draw:text-box>
        </draw:frame>
        <draw:frame draw:style-name="gr5" draw:text-style-name="P6" draw:layer="layout" svg:width="2.446cm" svg:height="0.496cm" svg:x="0.68cm" svg:y="10.922cm">
          <draw:text-box>
            <text:p text:style-name="P3"><text:span text:style-name="T27">Multi-Agent</text:span></text:p>
          </draw:text-box>
        </draw:frame>
        <draw:frame draw:style-name="gr5" draw:text-style-name="P6" draw:layer="layout" svg:width="4.869cm" svg:height="0.496cm" svg:x="6.013cm" svg:y="10.922cm">
          <draw:text-box>
            <text:p text:style-name="P3"><text:span text:style-name="T15">Linear SessionController</text:span></text:p>
          </draw:text-box>
        </draw:frame>
        <draw:frame draw:style-name="gr5" draw:text-style-name="P6" draw:layer="layout" svg:width="6.723cm" svg:height="0.496cm" svg:x="12.673cm" svg:y="10.922cm">
          <draw:text-box>
            <text:p text:style-name="P3"><text:span text:style-name="T15">Event-driven decentralized agents</text:span></text:p>
          </draw:text-box>
        </draw:frame>
        <draw:frame draw:style-name="gr5" draw:text-style-name="P6" draw:layer="layout" svg:width="3.88cm" svg:height="0.496cm" svg:x="0.68cm" svg:y="11.716cm">
          <draw:text-box>
            <text:p text:style-name="P3"><text:span text:style-name="T27">Cloud Persistence</text:span></text:p>
          </draw:text-box>
        </draw:frame>
        <draw:path draw:style-name="gr33" draw:text-style-name="P34" draw:layer="layout" svg:width="1.773cm" svg:height="0.556cm" svg:x="7.09cm" svg:y="11.694cm" svg:viewBox="0 0 1774 557" svg:d="M0 477v-398c0-10 2-20 6-30s10-18 18-26c7-7 16-13 25-17 10-4 20-6 31-6h1615c10 0 20 2 30 6s18 10 26 17c7 8 13 16 17 26s6 20 6 30v398c0 11-2 21-6 31-4 9-10 18-17 25-8 8-16 14-26 18s-20 6-30 6h-1615c-11 0-21-2-31-6-9-4-18-10-25-18-8-7-14-16-18-25-4-10-6-20-6-31z">
          <text:p/>
        </draw:path>
        <draw:frame draw:style-name="gr5" draw:text-style-name="P6" draw:layer="layout" svg:width="1.188cm" svg:height="0.496cm" svg:x="6.013cm" svg:y="11.716cm">
          <draw:text-box>
            <text:p text:style-name="P3"><text:span text:style-name="T15">Local </text:span></text:p>
          </draw:text-box>
        </draw:frame>
        <draw:frame draw:style-name="gr34" draw:text-style-name="P35" draw:layer="layout" svg:width="1.154cm" svg:height="0.424cm" svg:x="7.186cm" svg:y="11.768cm">
          <draw:text-box>
            <text:p text:style-name="P3"><text:span text:style-name="T32">.agent/</text:span></text:p>
          </draw:text-box>
        </draw:frame>
        <draw:frame draw:style-name="gr5" draw:text-style-name="P6" draw:layer="layout" svg:width="7.698cm" svg:height="0.496cm" svg:x="12.673cm" svg:y="11.716cm">
          <draw:text-box>
            <text:p text:style-name="P3"><text:span text:style-name="T15">PostgreSQL + S3 for team workspaces</text:span></text:p>
          </draw:text-box>
        </draw:frame>
        <draw:frame draw:style-name="gr5" draw:text-style-name="P6" draw:layer="layout" svg:width="3.979cm" svg:height="0.496cm" svg:x="0.68cm" svg:y="12.483cm">
          <draw:text-box>
            <text:p text:style-name="P3"><text:span text:style-name="T27">Background Tasks</text:span></text:p>
          </draw:text-box>
        </draw:frame>
        <draw:frame draw:style-name="gr5" draw:text-style-name="P6" draw:layer="layout" svg:width="4.82cm" svg:height="0.496cm" svg:x="6.013cm" svg:y="12.483cm">
          <draw:text-box>
            <text:p text:style-name="P3"><text:span text:style-name="T15">Synchronous TUI thread</text:span></text:p>
          </draw:text-box>
        </draw:frame>
        <draw:frame draw:style-name="gr5" draw:text-style-name="P6" draw:layer="layout" svg:width="8.057cm" svg:height="0.496cm" svg:x="12.673cm" svg:y="12.483cm">
          <draw:text-box>
            <text:p text:style-name="P3"><text:span text:style-name="T15">Cron-scheduled reindexing, GC, learning</text:span></text:p>
          </draw:text-box>
        </draw:frame>
        <draw:polygon draw:style-name="gr6" draw:text-style-name="P7" draw:layer="layout" svg:width="0.714cm" svg:height="0.635cm" svg:x="25.479cm" svg:y="18.388cm" svg:viewBox="0 0 715 636" draw:points="0,0 715,0 715,636 0,636">
          <text:p/>
        </draw:polygon>
        <draw:frame draw:style-name="gr13" draw:text-style-name="P14" draw:layer="layout" svg:width="17.87cm" svg:height="0.454cm" svg:x="4.818cm" svg:y="13.734cm">
          <draw:text-box>
            <text:p text:style-name="P3"><text:span text:style-name="T33">Every deferral names its ceiling and upgrade path. Built for POC exit criteria, not hypothetical scale.</text:span></text:p>
          </draw:text-box>
        </draw:frame>
        <draw:frame draw:style-name="gr7" draw:text-style-name="P8" draw:layer="layout" svg:width="0.412cm" svg:height="0.412cm" svg:x="25.617cm" svg:y="18.503cm">
          <draw:text-box>
            <text:p text:style-name="P3"><text:span text:style-name="T6">35</text:span></text:p>
          </draw:text-box>
        </draw:frame>
      </draw:page>
      <draw:page draw:name="page36"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5.874cm" svg:x="0.502cm" svg:y="6.693cm" svg:viewBox="0 0 25401 5875" draw:points="0,0 25401,0 25401,5875 0,5875">
          <text:p/>
        </draw:polygon>
        <draw:frame draw:style-name="gr9" draw:text-style-name="P10" draw:layer="layout" svg:width="9.719cm" svg:height="1.119cm" svg:x="8.1cm" svg:y="9.519cm">
          <draw:text-box>
            <text:p text:style-name="P3"><text:span text:style-name="T11">LESSONS LEARNED</text:span></text:p>
          </draw:text-box>
        </draw:frame>
        <draw:frame draw:style-name="gr15" draw:text-style-name="P16" draw:layer="layout" svg:width="4.122cm" svg:height="4.137cm" svg:x="10.98cm" svg:y="6.517cm">
          <draw:text-box>
            <text:p text:style-name="P3"><text:span text:style-name="T12">07</text:span></text:p>
          </draw:text-box>
        </draw:frame>
        <draw:polygon draw:style-name="gr6" draw:text-style-name="P7" draw:layer="layout" svg:width="0.714cm" svg:height="0.635cm" svg:x="25.479cm" svg:y="18.388cm" svg:viewBox="0 0 715 636" draw:points="0,0 715,0 715,636 0,636">
          <text:p/>
        </draw:polygon>
        <draw:frame draw:style-name="gr16" draw:text-style-name="P17" draw:layer="layout" svg:width="9.555cm" svg:height="0.827cm" svg:x="8.664cm" svg:y="11.077cm">
          <draw:text-box>
            <text:p text:style-name="P3"><text:span text:style-name="T13">From Ideation to Architecture</text:span></text:p>
          </draw:text-box>
        </draw:frame>
        <draw:frame draw:style-name="gr7" draw:text-style-name="P8" draw:layer="layout" svg:width="0.412cm" svg:height="0.412cm" svg:x="25.617cm" svg:y="18.503cm">
          <draw:text-box>
            <text:p text:style-name="P3"><text:span text:style-name="T6">36</text:span></text:p>
          </draw:text-box>
        </draw:frame>
      </draw:page>
      <draw:page draw:name="page37" draw:style-name="dp1" draw:master-page-name="master-page3">
        <draw:polygon draw:style-name="gr1" draw:text-style-name="P1" draw:layer="layout" svg:width="26.405cm" svg:height="19.235cm" svg:x="0cm" svg:y="0cm" svg:viewBox="0 0 26406 19236" draw:points="0,0 26406,0 26406,19236 0,19236">
          <text:p/>
        </draw:polygon>
        <draw:path draw:style-name="gr8" draw:text-style-name="P9" draw:layer="layout" svg:width="12.568cm" svg:height="2.276cm" svg:x="0.502cm" svg:y="6.111cm" svg:viewBox="0 0 12569 2277" svg:d="M31 31c21-20 46-31 75-31h12357c29 0 54 11 75 31 21 21 31 46 31 75v2065c0 29-10 54-31 75-21 20-46 31-75 31h-12357c-29 0-54-11-75-31-20-21-31-46-31-75v-2065c0-29 11-54 31-75z">
          <text:p/>
        </draw:path>
        <draw:path draw:style-name="gr2" draw:text-style-name="P2" draw:layer="layout" svg:width="12.49cm" svg:height="0.051cm" svg:x="0.55cm" svg:y="6.111cm" svg:viewBox="0 0 12491 52" svg:d="M12473 52c-1 0-1 0-2-1-15-15-34-24-56-24h-12357c-4 0-7 2-10 6l-48-16c17-11 36-17 58-17h12357c29 0 54 11 75 31 0 1 1 1 1 2z">
          <text:p/>
        </draw:path>
        <draw:path draw:style-name="gr2" draw:text-style-name="P2" draw:layer="layout" svg:width="12.49cm" svg:height="0.051cm" svg:x="0.55cm" svg:y="8.336cm" svg:viewBox="0 0 12491 52" svg:d="M48 19c3 4 6 6 10 6h12357c22 0 41-7 56-24 1 0 1-1 2-1l18 19c0 1-1 1-1 2-21 20-46 31-75 31h-12357c-22 0-41-6-58-17z">
          <text:p/>
        </draw:path>
        <draw:path draw:style-name="gr2" draw:text-style-name="P2" draw:layer="layout" svg:width="0.05cm" svg:height="2.214cm" svg:x="13.02cm" svg:y="6.142cm" svg:viewBox="0 0 51 2215" svg:d="M0 2196c16-15 23-34 23-56v-2065c0-22-7-40-23-56l19-19c22 21 32 46 32 75v2065c0 29-10 54-32 75z">
          <text:p/>
        </draw:path>
        <draw:polygon draw:style-name="gr2" draw:text-style-name="P2" draw:layer="layout" svg:width="12.568cm" svg:height="2.276cm" svg:x="0.502cm" svg:y="6.111cm" svg:viewBox="0 0 12569 2277" draw:points="0,0 12569,0 12569,2277 0,2277">
          <text:p/>
        </draw:polygon>
        <draw:path draw:style-name="gr8" draw:text-style-name="P9" draw:layer="layout" svg:width="12.568cm" svg:height="1.72cm" svg:x="0.502cm" svg:y="8.519cm" svg:viewBox="0 0 12569 1721" svg:d="M31 31c21-21 46-31 75-31h12357c29 0 54 10 75 31s31 46 31 75v1509c0 29-10 54-31 75s-46 31-75 31h-12357c-29 0-54-10-75-31-20-21-31-46-31-75v-1509c0-29 11-54 31-75z">
          <text:p/>
        </draw:path>
        <draw:polygon draw:style-name="gr2" draw:text-style-name="P2" draw:layer="layout" svg:width="12.568cm" svg:height="0.066cm" svg:x="0.502cm" svg:y="8.519cm" svg:viewBox="0 0 12569 67" draw:points="12505,67 0,67 0,0 12569,0 12569,3">
          <text:p/>
        </draw:polygon>
        <draw:path draw:style-name="gr2" draw:text-style-name="P2" draw:layer="layout" svg:width="12.49cm" svg:height="0.051cm" svg:x="0.55cm" svg:y="10.188cm" svg:viewBox="0 0 12491 52" svg:d="M48 18c3 4 6 6 10 6h12357c22 0 41-7 56-23 1 0 1-1 2-1l18 19c0 0-1 0-1 1-21 22-46 32-75 32h-12357c-22 0-41-6-58-18z">
          <text:p/>
        </draw:path>
        <draw:path draw:style-name="gr2" draw:text-style-name="P2" draw:layer="layout" svg:width="0.05cm" svg:height="1.658cm" svg:x="13.02cm" svg:y="8.55cm" svg:viewBox="0 0 51 1659" svg:d="M0 1640c16-15 23-34 23-56v-1509c0-22-7-41-23-56l19-19c22 21 32 46 32 75v1509c0 29-10 54-32 75z">
          <text:p/>
        </draw:path>
        <draw:polygon draw:style-name="gr2" draw:text-style-name="P2" draw:layer="layout" svg:width="12.568cm" svg:height="1.72cm" svg:x="0.502cm" svg:y="8.519cm" svg:viewBox="0 0 12569 1721" draw:points="0,0 12569,0 12569,1721 0,1721">
          <text:p/>
        </draw:polygon>
        <draw:path draw:style-name="gr8" draw:text-style-name="P9" draw:layer="layout" svg:width="12.568cm" svg:height="1.719cm" svg:x="0.502cm" svg:y="10.398cm" svg:viewBox="0 0 12569 1720" svg:d="M31 31c21-21 46-31 75-31h12357c29 0 54 10 75 31 21 20 31 45 31 74v1510c0 29-10 54-31 74-21 21-46 31-75 31h-12357c-29 0-54-10-75-31-20-20-31-45-31-74v-1510c0-29 11-54 31-74z">
          <text:p/>
        </draw:path>
        <draw:path draw:style-name="gr2" draw:text-style-name="P2" draw:layer="layout" svg:width="12.49cm" svg:height="0.051cm" svg:x="0.55cm" svg:y="10.398cm" svg:viewBox="0 0 12491 52" svg:d="M12473 52c-1-1-1-1-2-2-15-15-34-24-56-24h-12357c-4 0-7 2-10 7l-48-16c17-12 36-17 58-17h12357c29 0 54 10 75 31l1 2z">
          <text:p/>
        </draw:path>
        <draw:path draw:style-name="gr2" draw:text-style-name="P2" draw:layer="layout" svg:width="12.49cm" svg:height="0.051cm" svg:x="0.55cm" svg:y="12.066cm" svg:viewBox="0 0 12491 52" svg:d="M48 19c3 4 6 6 10 6h12357c22 0 41-8 56-23 1-1 1-1 2-2l18 19c0 1-1 1-1 1-21 21-46 32-75 32h-12357c-22 0-41-6-58-18z">
          <text:p/>
        </draw:path>
        <draw:path draw:style-name="gr2" draw:text-style-name="P2" draw:layer="layout" svg:width="0.05cm" svg:height="1.657cm" svg:x="13.02cm" svg:y="10.429cm" svg:viewBox="0 0 51 1658" svg:d="M0 1640c16-16 23-34 23-56v-1510c0-21-7-40-23-56l19-18c22 20 32 45 32 74v1510c0 29-10 54-32 74z">
          <text:p/>
        </draw:path>
        <draw:polygon draw:style-name="gr2" draw:text-style-name="P2" draw:layer="layout" svg:width="12.568cm" svg:height="1.719cm" svg:x="0.502cm" svg:y="10.398cm" svg:viewBox="0 0 12569 1720" draw:points="0,0 12569,0 12569,1720 0,1720">
          <text:p/>
        </draw:polygon>
        <draw:path draw:style-name="gr2" draw:text-style-name="P2" draw:layer="layout" svg:width="0.37cm" svg:height="0.37cm" svg:x="0.926cm" svg:y="6.588cm" svg:viewBox="0 0 371 371" svg:d="M371 185c0 12-1 24-5 36-2 12-5 23-10 35s-10 23-17 33-15 19-23 28c-9 8-18 16-28 23-10 6-21 12-32 17-12 4-23 8-35 10-12 3-24 4-36 4s-24-1-36-4c-12-2-24-5-35-10s-22-11-32-17c-10-7-20-15-28-23-9-9-16-18-23-28s-13-21-17-33c-5-12-9-23-11-35s-3-24-3-36 1-24 3-36 6-24 11-35c4-11 10-22 17-32s14-20 23-28c8-9 18-16 28-23s21-13 32-17c11-5 23-8 35-11 12-2 24-3 36-3s24 1 36 3c12 3 23 6 35 11 11 4 22 10 32 17s19 14 28 23c8 8 16 18 23 28s12 21 17 32 8 23 10 35c4 12 5 24 5 36z">
          <text:p/>
        </draw:path>
        <draw:frame draw:style-name="gr9" draw:text-style-name="P10" draw:layer="layout" svg:width="5.555cm" svg:height="1.119cm" svg:x="10.33cm" svg:y="4.413cm">
          <draw:text-box>
            <text:p text:style-name="P3"><text:span text:style-name="T7">7 LESSONS</text:span></text:p>
          </draw:text-box>
        </draw:frame>
        <draw:frame draw:style-name="gr101" draw:text-style-name="P79" draw:layer="layout" svg:width="0.264cm" svg:height="0.297cm" svg:x="1.036cm" svg:y="6.587cm">
          <draw:text-box>
            <text:p text:style-name="P3"><text:span text:style-name="T81">1</text:span></text:p>
          </draw:text-box>
        </draw:frame>
        <draw:path draw:style-name="gr2" draw:text-style-name="P2" draw:layer="layout" svg:width="0.37cm" svg:height="0.371cm" svg:x="0.926cm" svg:y="8.995cm" svg:viewBox="0 0 371 372" svg:d="M371 187c0 12-1 24-5 36-2 12-5 23-10 34-5 12-10 22-17 32-7 11-15 20-23 28-9 9-18 17-28 24-10 6-21 12-32 17-12 4-23 8-35 10-12 3-24 4-36 4s-24-1-36-4c-12-2-24-6-35-10-11-5-22-11-32-17-10-7-20-15-28-24-9-8-16-17-23-28-7-10-13-20-17-32-5-11-9-22-11-34s-3-24-3-36c0-13 1-25 3-37s6-23 11-34c4-12 10-22 17-32 7-11 14-21 23-29 8-9 18-17 28-24 10-6 21-12 32-17 11-4 23-8 35-10s24-4 36-4 24 2 36 4 23 6 35 10c11 5 22 11 32 17 10 7 19 15 28 24 8 8 16 18 23 29 7 10 12 20 17 32 5 11 8 22 10 34 4 12 5 24 5 37z">
          <text:p/>
        </draw:path>
        <draw:frame draw:style-name="gr18" draw:text-style-name="P19" draw:layer="layout" svg:width="8.242cm" svg:height="0.539cm" svg:x="1.382cm" svg:y="6.39cm">
          <draw:text-box>
            <text:p text:style-name="P3"><text:span text:style-name="T17"><text:s/></text:span><text:span text:style-name="T16">Specs-first sounds slow; it's faster.</text:span></text:p>
          </draw:text-box>
        </draw:frame>
        <draw:frame draw:style-name="gr101" draw:text-style-name="P79" draw:layer="layout" svg:width="0.264cm" svg:height="0.297cm" svg:x="1.036cm" svg:y="8.994cm">
          <draw:text-box>
            <text:p text:style-name="P3"><text:span text:style-name="T81">2</text:span></text:p>
          </draw:text-box>
        </draw:frame>
        <draw:path draw:style-name="gr2" draw:text-style-name="P2" draw:layer="layout" svg:width="0.37cm" svg:height="0.37cm" svg:x="0.926cm" svg:y="10.874cm" svg:viewBox="0 0 371 371" svg:d="M371 186c0 12-1 24-5 36-2 12-5 24-10 35s-10 22-17 32-15 19-23 28c-9 9-18 16-28 23s-21 12-32 17c-12 5-23 8-35 11-12 2-24 3-36 3s-24-1-36-3c-12-3-24-6-35-11s-22-10-32-17-20-14-28-23c-9-9-16-18-23-28s-13-21-17-32c-5-11-9-23-11-35s-3-24-3-36 1-24 3-36 6-24 11-35c4-11 10-22 17-32s14-19 23-28c8-9 18-17 28-24s21-12 32-17 23-8 35-11c12-2 24-3 36-3s24 1 36 3c12 3 23 6 35 11 11 5 22 10 32 17s19 15 28 24c8 9 16 18 23 28s12 21 17 32 8 23 10 35c4 12 5 24 5 36z">
          <text:p/>
        </draw:path>
        <draw:frame draw:style-name="gr18" draw:text-style-name="P19" draw:layer="layout" svg:width="7.966cm" svg:height="0.539cm" svg:x="1.382cm" svg:y="8.798cm">
          <draw:text-box>
            <text:p text:style-name="P3"><text:span text:style-name="T17"><text:s/></text:span><text:span text:style-name="T16">Protocol-driven modularity works.</text:span></text:p>
          </draw:text-box>
        </draw:frame>
        <draw:frame draw:style-name="gr101" draw:text-style-name="P79" draw:layer="layout" svg:width="0.264cm" svg:height="0.297cm" svg:x="1.036cm" svg:y="10.873cm">
          <draw:text-box>
            <text:p text:style-name="P3"><text:span text:style-name="T81">3</text:span></text:p>
          </draw:text-box>
        </draw:frame>
        <draw:path draw:style-name="gr8" draw:text-style-name="P9" draw:layer="layout" svg:width="12.568cm" svg:height="2.276cm" svg:x="13.334cm" svg:y="6.111cm" svg:viewBox="0 0 12569 2277" svg:d="M31 31c21-20 46-31 75-31h12358c29 0 54 11 74 31 21 21 31 46 31 75v2065c0 29-10 54-31 75-20 20-45 31-75 31h-12357c-29 0-54-11-75-31-20-21-31-46-31-75v-2065c0-29 11-54 31-75z">
          <text:p/>
        </draw:path>
        <draw:path draw:style-name="gr2" draw:text-style-name="P2" draw:layer="layout" svg:width="12.49cm" svg:height="0.051cm" svg:x="13.383cm" svg:y="6.111cm" svg:viewBox="0 0 12491 52" svg:d="M12472 52c-1 0-1 0-2-1-15-15-34-24-56-24h-12357c-3 0-7 2-10 6l-47-16c16-11 36-17 57-17h12358c29 0 54 11 74 31 1 1 1 1 2 2z">
          <text:p/>
        </draw:path>
        <draw:path draw:style-name="gr2" draw:text-style-name="P2" draw:layer="layout" svg:width="12.49cm" svg:height="0.051cm" svg:x="13.383cm" svg:y="8.336cm" svg:viewBox="0 0 12491 52" svg:d="M47 19c3 4 7 6 10 6h12357c22 0 41-7 56-24 1 0 1-1 2-1l19 19c-1 1-1 1-2 2-20 20-45 31-75 31h-12357c-21 0-41-6-57-17z">
          <text:p/>
        </draw:path>
        <draw:polygon draw:style-name="gr2" draw:text-style-name="P2" draw:layer="layout" svg:width="12.568cm" svg:height="2.276cm" svg:x="13.334cm" svg:y="6.111cm" svg:viewBox="0 0 12569 2277" draw:points="0,0 12569,0 12569,2277 0,2277">
          <text:p/>
        </draw:polygon>
        <draw:polygon draw:style-name="gr2" draw:text-style-name="P2" draw:layer="layout" svg:width="12.568cm" svg:height="2.276cm" svg:x="13.334cm" svg:y="6.111cm" svg:viewBox="0 0 12569 2277" draw:points="0,0 12569,0 12569,2277 0,2277">
          <text:p/>
        </draw:polygon>
        <draw:path draw:style-name="gr8" draw:text-style-name="P9" draw:layer="layout" svg:width="12.568cm" svg:height="1.72cm" svg:x="13.334cm" svg:y="8.519cm" svg:viewBox="0 0 12569 1721" svg:d="M31 31c21-21 46-31 75-31h12358c29 0 54 10 74 31 21 21 31 46 31 75v1509c0 29-10 54-31 75-20 21-45 31-75 31h-12357c-29 0-54-10-75-31-20-21-31-46-31-75v-1509c0-29 11-54 31-75z">
          <text:p/>
        </draw:path>
        <draw:polygon draw:style-name="gr2" draw:text-style-name="P2" draw:layer="layout" svg:width="12.568cm" svg:height="0.066cm" svg:x="13.334cm" svg:y="8.519cm" svg:viewBox="0 0 12569 67" draw:points="12506,67 0,67 0,0 12569,0 12569,3">
          <text:p/>
        </draw:polygon>
        <draw:path draw:style-name="gr2" draw:text-style-name="P2" draw:layer="layout" svg:width="12.49cm" svg:height="0.051cm" svg:x="13.383cm" svg:y="10.188cm" svg:viewBox="0 0 12491 52" svg:d="M47 18c3 4 7 6 10 6h12357c22 0 41-7 56-23 1 0 1-1 2-1l19 19c-1 0-1 0-2 1-20 22-45 32-75 32h-12357c-21 0-41-6-57-18z">
          <text:p/>
        </draw:path>
        <draw:polygon draw:style-name="gr2" draw:text-style-name="P2" draw:layer="layout" svg:width="12.568cm" svg:height="1.72cm" svg:x="13.334cm" svg:y="8.519cm" svg:viewBox="0 0 12569 1721" draw:points="0,0 12569,0 12569,1721 0,1721">
          <text:p/>
        </draw:polygon>
        <draw:polygon draw:style-name="gr2" draw:text-style-name="P2" draw:layer="layout" svg:width="12.568cm" svg:height="1.72cm" svg:x="13.334cm" svg:y="8.519cm" svg:viewBox="0 0 12569 1721" draw:points="0,0 12569,0 12569,1721 0,1721">
          <text:p/>
        </draw:polygon>
        <draw:path draw:style-name="gr8" draw:text-style-name="P9" draw:layer="layout" svg:width="12.568cm" svg:height="1.719cm" svg:x="13.334cm" svg:y="10.398cm" svg:viewBox="0 0 12569 1720" svg:d="M31 31c21-21 46-31 75-31h12358c29 0 54 10 74 31 21 20 31 45 31 74v1510c0 29-10 54-31 74-20 21-45 31-75 31h-12357c-29 0-54-10-75-31-20-20-31-45-31-74v-1510c0-29 11-54 31-74z">
          <text:p/>
        </draw:path>
        <draw:path draw:style-name="gr2" draw:text-style-name="P2" draw:layer="layout" svg:width="12.49cm" svg:height="0.051cm" svg:x="13.383cm" svg:y="10.398cm" svg:viewBox="0 0 12491 52" svg:d="M12472 52c-1-1-1-1-2-2-15-15-34-24-56-24h-12357c-3 0-7 2-10 7l-47-16c16-12 36-17 57-17h12358c29 0 54 10 74 31 1 0 1 2 2 2z">
          <text:p/>
        </draw:path>
        <draw:path draw:style-name="gr2" draw:text-style-name="P2" draw:layer="layout" svg:width="12.49cm" svg:height="0.051cm" svg:x="13.383cm" svg:y="12.066cm" svg:viewBox="0 0 12491 52" svg:d="M47 19c3 4 7 6 10 6h12357c22 0 41-8 56-23 1-1 1-1 2-2l19 19c-1 1-1 1-2 1-20 21-45 32-75 32h-12357c-21 0-41-6-57-18z">
          <text:p/>
        </draw:path>
        <draw:polygon draw:style-name="gr2" draw:text-style-name="P2" draw:layer="layout" svg:width="12.568cm" svg:height="1.719cm" svg:x="13.334cm" svg:y="10.398cm" svg:viewBox="0 0 12569 1720" draw:points="0,0 12569,0 12569,1720 0,1720">
          <text:p/>
        </draw:polygon>
        <draw:polygon draw:style-name="gr2" draw:text-style-name="P2" draw:layer="layout" svg:width="12.568cm" svg:height="1.719cm" svg:x="13.334cm" svg:y="10.398cm" svg:viewBox="0 0 12569 1720" draw:points="0,0 12569,0 12569,1720 0,1720">
          <text:p/>
        </draw:polygon>
        <draw:path draw:style-name="gr2" draw:text-style-name="P2" draw:layer="layout" svg:width="0.37cm" svg:height="0.37cm" svg:x="13.758cm" svg:y="6.588cm" svg:viewBox="0 0 371 371" svg:d="M371 185c0 12-1 24-3 36-3 12-6 23-11 35s-10 23-17 33-14 19-23 28c-9 8-18 16-28 23-10 6-21 12-32 17-11 4-23 8-35 10-12 3-24 4-36 4s-24-1-36-4c-12-2-24-5-36-10-11-5-22-11-32-17-10-7-19-15-28-23-9-9-16-18-23-28s-12-21-17-33-8-23-11-35c-2-12-3-24-3-36s1-24 3-36c3-12 6-24 11-35s10-22 17-32 14-20 23-28c9-9 18-16 28-23s21-13 32-17c12-5 24-8 36-11 12-2 24-3 36-3s24 1 36 3c12 3 24 6 35 11 11 4 22 10 32 17s19 14 28 23c9 8 16 18 23 28s12 21 17 32 8 23 11 35c2 12 3 24 3 36z">
          <text:p/>
        </draw:path>
        <draw:frame draw:style-name="gr18" draw:text-style-name="P19" draw:layer="layout" svg:width="8.369cm" svg:height="0.539cm" svg:x="1.382cm" svg:y="10.677cm">
          <draw:text-box>
            <text:p text:style-name="P3"><text:span text:style-name="T17"><text:s/></text:span><text:span text:style-name="T16">Hardest part is context engineering.</text:span></text:p>
          </draw:text-box>
        </draw:frame>
        <draw:frame draw:style-name="gr101" draw:text-style-name="P79" draw:layer="layout" svg:width="0.264cm" svg:height="0.297cm" svg:x="13.88cm" svg:y="6.587cm">
          <draw:text-box>
            <text:p text:style-name="P3"><text:span text:style-name="T81">4</text:span></text:p>
          </draw:text-box>
        </draw:frame>
        <draw:path draw:style-name="gr2" draw:text-style-name="P2" draw:layer="layout" svg:width="0.37cm" svg:height="0.371cm" svg:x="13.758cm" svg:y="8.995cm" svg:viewBox="0 0 371 372" svg:d="M371 187c0 12-1 24-3 36-3 12-6 23-11 34-5 12-10 22-17 32-7 11-14 20-23 28-9 9-18 17-28 24-10 6-21 12-32 17-11 4-23 8-35 10-12 3-24 4-36 4s-24-1-36-4c-12-2-24-6-36-10-11-5-22-11-32-17-10-7-19-15-28-24-9-8-16-17-23-28-7-10-12-20-17-32-5-11-8-22-11-34-2-12-3-24-3-36 0-13 1-25 3-37 3-12 6-23 11-34 5-12 10-22 17-32 7-11 14-21 23-29 9-9 18-17 28-24 10-6 21-12 32-17 12-4 24-8 36-10s24-4 36-4 24 2 36 4 24 6 35 10c11 5 22 11 32 17 10 7 19 15 28 24 9 8 16 18 23 29 7 10 12 20 17 32 5 11 8 22 11 34 2 12 3 24 3 37z">
          <text:p/>
        </draw:path>
        <draw:frame draw:style-name="gr18" draw:text-style-name="P19" draw:layer="layout" svg:width="8.931cm" svg:height="0.539cm" svg:x="14.226cm" svg:y="6.39cm">
          <draw:text-box>
            <text:p text:style-name="P3"><text:span text:style-name="T17"><text:s/></text:span><text:span text:style-name="T16">Human-in-the-loop is a quality feature.</text:span></text:p>
          </draw:text-box>
        </draw:frame>
        <draw:frame draw:style-name="gr101" draw:text-style-name="P79" draw:layer="layout" svg:width="0.264cm" svg:height="0.297cm" svg:x="13.88cm" svg:y="8.994cm">
          <draw:text-box>
            <text:p text:style-name="P3"><text:span text:style-name="T81">5</text:span></text:p>
          </draw:text-box>
        </draw:frame>
        <draw:path draw:style-name="gr2" draw:text-style-name="P2" draw:layer="layout" svg:width="0.37cm" svg:height="0.37cm" svg:x="13.758cm" svg:y="10.874cm" svg:viewBox="0 0 371 371" svg:d="M371 186c0 12-1 24-3 36-3 12-6 24-11 35s-10 22-17 32-14 19-23 28-18 16-28 23-21 12-32 17-23 8-35 11c-12 2-24 3-36 3s-24-1-36-3c-12-3-24-6-36-11-11-5-22-10-32-17s-19-14-28-23-16-18-23-28-12-21-17-32-8-23-11-35c-2-12-3-24-3-36s1-24 3-36c3-12 6-24 11-35s10-22 17-32 14-19 23-28 18-17 28-24 21-12 32-17c12-5 24-8 36-11 12-2 24-3 36-3s24 1 36 3c12 3 24 6 35 11s22 10 32 17 19 15 28 24 16 18 23 28 12 21 17 32 8 23 11 35c2 12 3 24 3 36z">
          <text:p/>
        </draw:path>
        <draw:frame draw:style-name="gr18" draw:text-style-name="P19" draw:layer="layout" svg:width="8.656cm" svg:height="0.539cm" svg:x="14.226cm" svg:y="8.798cm">
          <draw:text-box>
            <text:p text:style-name="P3"><text:span text:style-name="T17"><text:s/></text:span><text:span text:style-name="T16">Keyboard-first TUI is worth the eﬀort.</text:span></text:p>
          </draw:text-box>
        </draw:frame>
        <draw:frame draw:style-name="gr101" draw:text-style-name="P79" draw:layer="layout" svg:width="0.264cm" svg:height="0.297cm" svg:x="13.88cm" svg:y="10.873cm">
          <draw:text-box>
            <text:p text:style-name="P3"><text:span text:style-name="T81">6</text:span></text:p>
          </draw:text-box>
        </draw:frame>
        <draw:path draw:style-name="gr37" draw:text-style-name="P38" draw:layer="layout" svg:width="25.4cm" svg:height="2.646cm" svg:x="0.502cm" svg:y="12.567cm" svg:viewBox="0 0 25401 2647" svg:d="M31 31c21-20 46-31 75-31h25190c29 0 54 11 74 31 21 21 31 46 31 75v2435c0 29-10 54-31 75-20 21-45 31-75 31h-25189c-29 0-54-10-75-31-20-21-31-46-31-75v-2435c0-29 11-54 31-75z">
          <text:p/>
        </draw:path>
        <draw:path draw:style-name="gr2" draw:text-style-name="P2" draw:layer="layout" svg:width="25.323cm" svg:height="0.051cm" svg:x="0.55cm" svg:y="12.567cm" svg:viewBox="0 0 25324 52" svg:d="M25305 52c-1 0-1-1-1-1-16-16-35-23-57-23h-25189c-4 0-7 2-10 6l-48-16c17-11 36-18 58-18h25190c29 0 54 12 74 32 1 1 1 1 2 2z">
          <text:p/>
        </draw:path>
        <draw:path draw:style-name="gr2" draw:text-style-name="P2" draw:layer="layout" svg:width="25.323cm" svg:height="0.051cm" svg:x="0.55cm" svg:y="15.162cm" svg:viewBox="0 0 25324 52" svg:d="M48 19c3 5 6 7 10 7h25189c22 0 41-8 57-25 0 0 0-1 1-1l19 20c-1 0-1 1-2 1-20 21-45 31-75 31h-25189c-22 0-41-6-58-17z">
          <text:p/>
        </draw:path>
        <draw:path draw:style-name="gr2" draw:text-style-name="P2" draw:layer="layout" svg:width="0.049cm" svg:height="2.584cm" svg:x="25.853cm" svg:y="12.598cm" svg:viewBox="0 0 50 2585" svg:d="M0 2566c15-15 23-34 23-56v-2435c0-22-8-41-23-56l18-19c21 21 32 46 32 75v2435c0 29-11 54-32 75z">
          <text:p/>
        </draw:path>
        <draw:polygon draw:style-name="gr14" draw:text-style-name="P15" draw:layer="layout" svg:width="25.4cm" svg:height="2.646cm" svg:x="0.502cm" svg:y="12.567cm" svg:viewBox="0 0 25401 2647" draw:points="0,0 25401,0 25401,2647 0,2647">
          <text:p/>
        </draw:polygon>
        <draw:path draw:style-name="gr14" draw:text-style-name="P15" draw:layer="layout" svg:width="0.555cm" svg:height="0.582cm" svg:x="1.111cm" svg:y="13.255cm" svg:viewBox="0 0 556 583" svg:d="M0 304v-26c0-18 2-36 5-54 4-18 9-36 16-52 7-17 15-33 26-49 10-15 21-29 34-42 13-12 27-24 42-34s31-19 48-26 34-12 52-16c18-3 36-5 56-5 18 0 36 2 54 5 18 4 35 9 52 16s33 16 48 26 29 22 42 34c13 13 24 27 35 43 10 15 18 31 25 48 7 16 12 34 16 52s5 36 5 54v26c0 19-1 37-5 55-4 17-9 35-16 52s-15 33-25 49c-11 15-22 29-35 42s-27 24-42 34-31 19-48 26-34 12-52 16c-18 3-36 5-54 5-20 0-38-2-56-5-18-4-35-9-52-16s-33-16-48-26-29-21-42-34-24-27-34-42c-11-15-19-32-26-49s-12-35-16-52c-3-18-5-36-5-55z">
          <text:p/>
        </draw:path>
        <draw:frame draw:style-name="gr18" draw:text-style-name="P19" draw:layer="layout" svg:width="1.664cm" svg:height="0.539cm" svg:x="14.226cm" svg:y="10.677cm">
          <draw:text-box>
            <text:p text:style-name="P3"><text:span text:style-name="T17"><text:s/></text:span><text:span text:style-name="T16">YAGNI</text:span></text:p>
          </draw:text-box>
        </draw:frame>
        <draw:frame draw:style-name="gr13" draw:text-style-name="P14" draw:layer="layout" svg:width="0.406cm" svg:height="0.454cm" svg:x="1.281cm" svg:y="13.284cm">
          <draw:text-box>
            <text:p text:style-name="P3"><text:span text:style-name="T83">7</text:span></text:p>
          </draw:text-box>
        </draw:frame>
        <draw:frame draw:style-name="gr16" draw:text-style-name="P17" draw:layer="layout" svg:width="6.219cm" svg:height="0.827cm" svg:x="1.813cm" svg:y="12.982cm">
          <draw:text-box>
            <text:p text:style-name="P3"><text:span text:style-name="T84"><text:s/></text:span><text:span text:style-name="T85">Modularity is key</text:span></text:p>
          </draw:text-box>
        </draw:frame>
        <draw:frame draw:style-name="gr75" draw:text-style-name="P59" draw:layer="layout" svg:width="11.574cm" svg:height="0.463cm" svg:x="0.919cm" svg:y="7.064cm">
          <draw:text-box>
            <text:p text:style-name="P3"><text:span text:style-name="T86">The Socratic wizard catches ambiguities before a line of code is</text:span></text:p>
          </draw:text-box>
        </draw:frame>
        <draw:path draw:style-name="gr33" draw:text-style-name="P34" draw:layer="layout" svg:width="3.28cm" svg:height="0.476cm" svg:x="0.926cm" svg:y="9.498cm" svg:viewBox="0 0 3281 477" svg:d="M0 398v-319c0-10 2-20 6-30s9-18 17-26c7-7 16-13 26-17 9-4 19-6 30-6h3123c11 0 21 2 30 6 10 4 19 10 26 17 8 8 13 16 17 26s6 20 6 30v319c0 10-2 20-6 30s-9 18-17 26c-7 7-16 13-26 17-9 4-19 6-30 6h-3123c-11 0-21-2-30-6-10-4-19-10-26-17-8-8-13-16-17-26s-6-20-6-30z">
          <text:p/>
        </draw:path>
        <draw:frame draw:style-name="gr75" draw:text-style-name="P59" draw:layer="layout" svg:width="1.326cm" svg:height="0.463cm" svg:x="0.919cm" svg:y="7.594cm">
          <draw:text-box>
            <text:p text:style-name="P3"><text:span text:style-name="T86">written.</text:span></text:p>
          </draw:text-box>
        </draw:frame>
        <draw:frame draw:style-name="gr103" draw:text-style-name="P62" draw:layer="layout" svg:width="2.298cm" svg:height="0.386cm" svg:x="1.006cm" svg:y="9.545cm">
          <draw:text-box>
            <text:p text:style-name="P3"><text:span text:style-name="T61">typing.Protocol</text:span></text:p>
          </draw:text-box>
        </draw:frame>
        <draw:frame draw:style-name="gr75" draw:text-style-name="P59" draw:layer="layout" svg:width="8.151cm" svg:height="0.463cm" svg:x="4.218cm" svg:y="9.472cm">
          <draw:text-box>
            <text:p text:style-name="P3"><text:span text:style-name="T86"><text:s/>enabled parallel development across teams.</text:span></text:p>
          </draw:text-box>
        </draw:frame>
        <draw:frame draw:style-name="gr75" draw:text-style-name="P59" draw:layer="layout" svg:width="10.113cm" svg:height="0.463cm" svg:x="0.919cm" svg:y="11.351cm">
          <draw:text-box>
            <text:p text:style-name="P3"><text:span text:style-name="T86">Getting the right info into the prompt, within token limits.</text:span></text:p>
          </draw:text-box>
        </draw:frame>
        <draw:frame draw:style-name="gr75" draw:text-style-name="P59" draw:layer="layout" svg:width="12.144cm" svg:height="0.463cm" svg:x="13.763cm" svg:y="7.064cm">
          <draw:text-box>
            <text:p text:style-name="P3"><text:span text:style-name="T86">Every rejection teaches the system. The heuristic updater captures</text:span></text:p>
          </draw:text-box>
        </draw:frame>
        <draw:frame draw:style-name="gr75" draw:text-style-name="P59" draw:layer="layout" svg:width="0.755cm" svg:height="0.463cm" svg:x="13.763cm" svg:y="7.594cm">
          <draw:text-box>
            <text:p text:style-name="P3"><text:span text:style-name="T86">this.</text:span></text:p>
          </draw:text-box>
        </draw:frame>
        <draw:frame draw:style-name="gr75" draw:text-style-name="P59" draw:layer="layout" svg:width="8.926cm" svg:height="0.463cm" svg:x="13.763cm" svg:y="9.472cm">
          <draw:text-box>
            <text:p text:style-name="P3"><text:span text:style-name="T86">Engineers live in the terminal. Corge feels native.</text:span></text:p>
          </draw:text-box>
        </draw:frame>
        <draw:frame draw:style-name="gr75" draw:text-style-name="P59" draw:layer="layout" svg:width="11.302cm" svg:height="0.463cm" svg:x="13.763cm" svg:y="11.351cm">
          <draw:text-box>
            <text:p text:style-name="P3"><text:span text:style-name="T86">Every deferred feature has a named ceiling and upgrade path.</text:span></text:p>
          </draw:text-box>
        </draw:frame>
        <draw:polygon draw:style-name="gr6" draw:text-style-name="P7" draw:layer="layout" svg:width="0.714cm" svg:height="0.635cm" svg:x="25.479cm" svg:y="18.388cm" svg:viewBox="0 0 715 636" draw:points="0,0 715,0 715,636 0,636">
          <text:p/>
        </draw:polygon>
        <draw:frame draw:style-name="gr104" draw:text-style-name="P81" draw:layer="layout" svg:width="10.624cm" svg:height="0.708cm" svg:x="1.101cm" svg:y="14.009cm">
          <draw:text-box>
            <text:p text:style-name="P3"><text:span text:style-name="T87">Modular software is not just for POCs.</text:span></text:p>
          </draw:text-box>
        </draw:frame>
        <draw:frame draw:style-name="gr7" draw:text-style-name="P8" draw:layer="layout" svg:width="0.412cm" svg:height="0.412cm" svg:x="25.617cm" svg:y="18.503cm">
          <draw:text-box>
            <text:p text:style-name="P3"><text:span text:style-name="T6">37</text:span></text:p>
          </draw:text-box>
        </draw:frame>
      </draw:page>
      <draw:page draw:name="page38" draw:style-name="dp1" draw:master-page-name="master-page3">
        <draw:polygon draw:style-name="gr1" draw:text-style-name="P1" draw:layer="layout" svg:width="26.405cm" svg:height="19.235cm" svg:x="0cm" svg:y="0cm" svg:viewBox="0 0 26406 19236" draw:points="0,0 26406,0 26406,19236 0,19236">
          <text:p/>
        </draw:polygon>
        <draw:polygon draw:style-name="gr14" draw:text-style-name="P15" draw:layer="layout" svg:width="26.405cm" svg:height="19.235cm" svg:x="0cm" svg:y="0cm" svg:viewBox="0 0 26406 19236" draw:points="0,0 26406,0 26406,19236 0,19236">
          <text:p/>
        </draw:polygon>
        <draw:polygon draw:style-name="gr14" draw:text-style-name="P15" draw:layer="layout" svg:width="25.4cm" svg:height="7.171cm" svg:x="0.502cm" svg:y="6.058cm" svg:viewBox="0 0 25401 7172" draw:points="0,0 25401,0 25401,7172 0,7172">
          <text:p/>
        </draw:polygon>
        <draw:path draw:style-name="gr105" draw:text-style-name="P82" draw:layer="layout" svg:width="4.233cm" svg:height="0.079cm" svg:x="11.086cm" svg:y="9.763cm" svg:viewBox="0 0 4234 80" svg:d="M0 39c0-5 1-10 3-15s4-9 8-13 8-6 13-8 10-3 15-3h4155c5 0 11 1 15 3 5 2 10 4 13 8 4 4 7 8 9 13s3 10 3 15c0 6-1 11-3 15-2 5-5 10-9 13-3 4-8 8-13 10-4 2-10 3-15 3h-4155c-5 0-10-1-15-3s-9-6-13-10c-4-3-6-8-8-13-2-4-3-9-3-15z">
          <text:p/>
        </draw:path>
        <draw:frame draw:style-name="gr106" draw:text-style-name="P83" draw:layer="layout" svg:width="7.782cm" svg:height="1.492cm" svg:x="9.002cm" svg:y="6.122cm">
          <draw:text-box>
            <text:p text:style-name="P3"><text:span text:style-name="T88">THANK YOU</text:span></text:p>
          </draw:text-box>
        </draw:frame>
        <draw:frame draw:style-name="gr16" draw:text-style-name="P17" draw:layer="layout" svg:width="17.008cm" svg:height="0.827cm" svg:x="5.335cm" svg:y="10.786cm">
          <draw:text-box>
            <text:p text:style-name="P3"><text:span text:style-name="T89">Corge</text:span><text:span text:style-name="T13"> — Specification-Driven Agentic Development</text:span></text:p>
          </draw:text-box>
        </draw:frame>
        <draw:frame draw:style-name="gr16" draw:text-style-name="P17" draw:layer="layout" svg:width="10.378cm" svg:height="0.827cm" svg:x="8.448cm" svg:y="11.739cm">
          <draw:text-box>
            <text:p text:style-name="P3"><text:span text:style-name="T13">Human-Led · Machine-Assisted</text:span></text:p>
          </draw:text-box>
        </draw:frame>
        <draw:polygon draw:style-name="gr6" draw:text-style-name="P7" draw:layer="layout" svg:width="0.714cm" svg:height="0.635cm" svg:x="25.479cm" svg:y="18.388cm" svg:viewBox="0 0 715 636" draw:points="0,0 715,0 715,636 0,636">
          <text:p/>
        </draw:polygon>
        <draw:frame draw:style-name="gr107" draw:text-style-name="P84" draw:layer="layout" svg:width="4.135cm" svg:height="0.916cm" svg:x="11.318cm" svg:y="8.205cm">
          <draw:text-box>
            <text:p text:style-name="P3"><text:span text:style-name="T90">Questions?</text:span></text:p>
          </draw:text-box>
        </draw:frame>
        <draw:frame draw:style-name="gr7" draw:text-style-name="P8" draw:layer="layout" svg:width="0.412cm" svg:height="0.412cm" svg:x="25.617cm" svg:y="18.503cm">
          <draw:text-box>
            <text:p text:style-name="P3"><text:span text:style-name="T6">38</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Mono" svg:font-family="JetBrainsMono"/>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SourceSansPro" svg:font-family="SourceSansPro"/>
    <style:font-face style:name="SourceSansPro-It" svg:font-family="SourceSansPro-It"/>
    <style:font-face style:name="SourceSansPro-SemiboldIt" svg:font-family="SourceSansPro-SemiboldIt"/>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Liberation Sans1" style:font-size-asian="24pt" style:language-asian="zh" style:country-asian="CN" style:font-name-complex="Liberation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6.424cm" fo:page-height="19.26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object-count="1785"/>
    <meta:generator>LibreOffice/26.2.3.2$Linux_X86_64 LibreOffice_project/620$Build-2</meta:generator>
  </office:meta>
</office:document-meta>
</file>